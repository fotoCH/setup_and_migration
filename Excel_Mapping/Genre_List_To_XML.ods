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5.69pt"/>
    </style:style>
    <style:style style:name="co2" style:family="table-column">
      <style:table-column-properties fo:break-before="auto" style:column-width="155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6pt" fo:break-before="auto" style:use-optimal-row-height="false"/>
    </style:style>
    <style:style style:name="ro2" style:family="table-row">
      <style:table-row-properties style:row-height="55.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Conca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dno</text:p>
          </table:table-cell>
          <table:table-cell table:style-name="ce5" office:value-type="string" calcext:value-type="string">
            <text:p>Export</text:p>
          </table:table-cell>
        </table:table-row>
        <table:table-row table:style-name="ro3">
          <table:table-cell office:value-type="string" calcext:value-type="string">
            <text:p>Personen</text:p>
          </table:table-cell>
          <table:table-cell office:value-type="string" calcext:value-type="string">
            <text:p>personen</text:p>
          </table:table-cell>
          <table:table-cell table:formula="of:=[Snippets.$B$17]&amp;[Translations.A3]&amp;[Snippets.$C$17]&amp;[Translations.A3]&amp;[Snippets.$D$17]" office:value-type="string" office:string-value="&lt;label locale=&quot;de_CH&quot; preferred=&quot;1&quot;&gt;&lt;name_singular&gt;Personen&lt;/name_singular&gt;&lt;name_plural&gt;Personen&lt;/name_plural&gt;&lt;/label&gt;" calcext:value-type="string">
            <text:p>&lt;label locale="de_CH" preferred="1"&gt;&lt;name_singular&gt;Personen&lt;/name_singular&gt;&lt;name_plural&gt;Personen&lt;/name_plural&gt;&lt;/label&gt;</text:p>
          </table:table-cell>
          <table:table-cell table:formula="of:=[Snippets.$B$18]&amp;[Translations.B3]&amp;[Snippets.$C$18]&amp;[Translations.B3]&amp;[Snippets.$D$18]" office:value-type="string" office:string-value="&lt;label locale=&quot;fr_CH&quot; preferred=&quot;1&quot;&gt;&lt;name_singular&gt;Personne&lt;/name_singular&gt;&lt;name_plural&gt;Personne&lt;/name_plural&gt;&lt;/label&gt;" calcext:value-type="string">
            <text:p>&lt;label locale="fr_CH" preferred="1"&gt;&lt;name_singular&gt;Personne&lt;/name_singular&gt;&lt;name_plural&gt;Personne&lt;/name_plural&gt;&lt;/label&gt;</text:p>
          </table:table-cell>
          <table:table-cell table:formula="of:=[Snippets.$B$19]&amp;[Translations.C3]&amp;[Snippets.$C$19]&amp;[Translations.C3]&amp;[Snippets.$D$19]" office:value-type="string" office:string-value="&lt;label locale=&quot;it_CH&quot; preferred=&quot;1&quot;&gt;&lt;name_singular&gt;Persona&lt;/name_singular&gt;&lt;name_plural&gt;Persona&lt;/name_plural&gt;&lt;/label&gt;" calcext:value-type="string">
            <text:p>&lt;label locale="it_CH" preferred="1"&gt;&lt;name_singular&gt;Persona&lt;/name_singular&gt;&lt;name_plural&gt;Persona&lt;/name_plural&gt;&lt;/label&gt;</text:p>
          </table:table-cell>
          <table:table-cell table:formula="of:=[Snippets.$B$20]&amp;[Translations.D3]&amp;[Snippets.$C$20]&amp;[Translations.D3]&amp;[Snippets.$D$20]" office:value-type="string" office:string-value="&lt;label locale=&quot;rm_CH&quot; preferred=&quot;1&quot;&gt;&lt;name_singular&gt;Persunas&lt;/name_singular&gt;&lt;name_plural&gt;Persunas&lt;/name_plural&gt;&lt;/label&gt;" calcext:value-type="string">
            <text:p>&lt;label locale="rm_CH" preferred="1"&gt;&lt;name_singular&gt;Persunas&lt;/name_singular&gt;&lt;name_plural&gt;Persunas&lt;/name_plural&gt;&lt;/label&gt;</text:p>
          </table:table-cell>
          <table:table-cell table:formula="of:=[Snippets.$B$21]&amp;[Translations.E3]&amp;[Snippets.$C$21]&amp;[Translations.E3]&amp;[Snippets.$D$21]" office:value-type="string" office:string-value="&lt;label locale=&quot;en_US&quot; preferred=&quot;1&quot;&gt;&lt;name_singular&gt;People&lt;/name_singular&gt;&lt;name_plural&gt;People&lt;/name_plural&gt;&lt;/label&gt;" calcext:value-type="string">
            <text:p>&lt;label locale="en_US" preferred="1"&gt;&lt;name_singular&gt;People&lt;/name_singular&gt;&lt;name_plural&gt;People&lt;/name_plural&gt;&lt;/label&gt;</text:p>
          </table:table-cell>
          <table:table-cell table:formula="of:=[Snippets.B$15]&amp;[.B3]&amp;[Snippets.C$15]" office:value-type="string" office:string-value="&lt;item idno=&quot;personen&quot; enabled=&quot;1&quot; default=&quot;0&quot; value=&quot;0&quot;&gt;" calcext:value-type="string">
            <text:p>&lt;item idno="personen" enabled="1" default="0" value="0"&gt;</text:p>
          </table:table-cell>
          <table:table-cell table:formula="of:=[.H3]&amp;[Snippets.B$16]&amp;[.C3]&amp;[.D3]&amp;[.E3]&amp;[.F3]&amp;[.G3]&amp;[Snippets.B$22]&amp;[Snippets.B$23]" office:value-type="string" office:string-value="&lt;item idno=&quot;personen&quot; enabled=&quot;1&quot; default=&quot;0&quot; value=&quot;0&quot;&gt;&lt;labels&gt;&lt;label locale=&quot;de_CH&quot; preferred=&quot;1&quot;&gt;&lt;name_singular&gt;Personen&lt;/name_singular&gt;&lt;name_plural&gt;Personen&lt;/name_plural&gt;&lt;/label&gt;&lt;label locale=&quot;fr_CH&quot; preferred=&quot;1&quot;&gt;&lt;name_singular&gt;Personne&lt;/name_singular&gt;&lt;name_plural&gt;Personne&lt;/name_plural&gt;&lt;/label&gt;&lt;label locale=&quot;it_CH&quot; preferred=&quot;1&quot;&gt;&lt;name_singular&gt;Persona&lt;/name_singular&gt;&lt;name_plural&gt;Persona&lt;/name_plural&gt;&lt;/label&gt;&lt;label locale=&quot;rm_CH&quot; preferred=&quot;1&quot;&gt;&lt;name_singular&gt;Persunas&lt;/name_singular&gt;&lt;name_plural&gt;Persunas&lt;/name_plural&gt;&lt;/label&gt;&lt;label locale=&quot;en_US&quot; preferred=&quot;1&quot;&gt;&lt;name_singular&gt;People&lt;/name_singular&gt;&lt;name_plural&gt;People&lt;/name_plural&gt;&lt;/label&gt;&lt;/labels&gt;&lt;/item&gt;" calcext:value-type="string">
            <text:p>&lt;item idno="personen" enabled="1" default="0" value="0"&gt;&lt;labels&gt;&lt;label locale="de_CH" preferred="1"&gt;&lt;name_singular&gt;Personen&lt;/name_singular&gt;&lt;name_plural&gt;Personen&lt;/name_plural&gt;&lt;/label&gt;&lt;label locale="fr_CH" preferred="1"&gt;&lt;name_singular&gt;Personne&lt;/name_singular&gt;&lt;name_plural&gt;Personne&lt;/name_plural&gt;&lt;/label&gt;&lt;label locale="it_CH" preferred="1"&gt;&lt;name_singular&gt;Persona&lt;/name_singular&gt;&lt;name_plural&gt;Persona&lt;/name_plural&gt;&lt;/label&gt;&lt;label locale="rm_CH" preferred="1"&gt;&lt;name_singular&gt;Persunas&lt;/name_singular&gt;&lt;name_plural&gt;Persunas&lt;/name_plural&gt;&lt;/label&gt;&lt;label locale="en_US" preferred="1"&gt;&lt;name_singular&gt;People&lt;/name_singular&gt;&lt;name_plural&gt;Peopl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Reportage</text:p>
          </table:table-cell>
          <table:table-cell office:value-type="string" calcext:value-type="string">
            <text:p>reportage</text:p>
          </table:table-cell>
          <table:table-cell table:formula="of:=[Snippets.$B$17]&amp;[Translations.A4]&amp;[Snippets.$C$17]&amp;[Translations.A4]&amp;[Snippets.$D$17]" office:value-type="string" office:string-value="&lt;label locale=&quot;de_CH&quot; preferred=&quot;1&quot;&gt;&lt;name_singular&gt;Reportage&lt;/name_singular&gt;&lt;name_plural&gt;Reportage&lt;/name_plural&gt;&lt;/label&gt;" calcext:value-type="string">
            <text:p>&lt;label locale="de_CH" preferred="1"&gt;&lt;name_singular&gt;Reportage&lt;/name_singular&gt;&lt;name_plural&gt;Reportage&lt;/name_plural&gt;&lt;/label&gt;</text:p>
          </table:table-cell>
          <table:table-cell table:formula="of:=[Snippets.$B$18]&amp;[Translations.B4]&amp;[Snippets.$C$18]&amp;[Translations.B4]&amp;[Snippets.$D$18]" office:value-type="string" office:string-value="&lt;label locale=&quot;fr_CH&quot; preferred=&quot;1&quot;&gt;&lt;name_singular&gt;Reportage&lt;/name_singular&gt;&lt;name_plural&gt;Reportage&lt;/name_plural&gt;&lt;/label&gt;" calcext:value-type="string">
            <text:p>&lt;label locale="fr_CH" preferred="1"&gt;&lt;name_singular&gt;Reportage&lt;/name_singular&gt;&lt;name_plural&gt;Reportage&lt;/name_plural&gt;&lt;/label&gt;</text:p>
          </table:table-cell>
          <table:table-cell table:formula="of:=[Snippets.$B$19]&amp;[Translations.C4]&amp;[Snippets.$C$19]&amp;[Translations.C4]&amp;[Snippets.$D$19]" office:value-type="string" office:string-value="&lt;label locale=&quot;it_CH&quot; preferred=&quot;1&quot;&gt;&lt;name_singular&gt;Reportage&lt;/name_singular&gt;&lt;name_plural&gt;Reportage&lt;/name_plural&gt;&lt;/label&gt;" calcext:value-type="string">
            <text:p>&lt;label locale="it_CH" preferred="1"&gt;&lt;name_singular&gt;Reportage&lt;/name_singular&gt;&lt;name_plural&gt;Reportage&lt;/name_plural&gt;&lt;/label&gt;</text:p>
          </table:table-cell>
          <table:table-cell table:formula="of:=[Snippets.$B$20]&amp;[Translations.D4]&amp;[Snippets.$C$20]&amp;[Translations.D4]&amp;[Snippets.$D$20]" office:value-type="string" office:string-value="&lt;label locale=&quot;rm_CH&quot; preferred=&quot;1&quot;&gt;&lt;name_singular&gt;Reportascha&lt;/name_singular&gt;&lt;name_plural&gt;Reportascha&lt;/name_plural&gt;&lt;/label&gt;" calcext:value-type="string">
            <text:p>&lt;label locale="rm_CH" preferred="1"&gt;&lt;name_singular&gt;Reportascha&lt;/name_singular&gt;&lt;name_plural&gt;Reportascha&lt;/name_plural&gt;&lt;/label&gt;</text:p>
          </table:table-cell>
          <table:table-cell table:formula="of:=[Snippets.$B$21]&amp;[Translations.E4]&amp;[Snippets.$C$21]&amp;[Translations.E4]&amp;[Snippets.$D$21]" office:value-type="string" office:string-value="&lt;label locale=&quot;en_US&quot; preferred=&quot;1&quot;&gt;&lt;name_singular&gt;Reportage&lt;/name_singular&gt;&lt;name_plural&gt;Reportage&lt;/name_plural&gt;&lt;/label&gt;" calcext:value-type="string">
            <text:p>&lt;label locale="en_US" preferred="1"&gt;&lt;name_singular&gt;Reportage&lt;/name_singular&gt;&lt;name_plural&gt;Reportage&lt;/name_plural&gt;&lt;/label&gt;</text:p>
          </table:table-cell>
          <table:table-cell table:formula="of:=[Snippets.B$15]&amp;[.B4]&amp;[Snippets.C$15]" office:value-type="string" office:string-value="&lt;item idno=&quot;reportage&quot; enabled=&quot;1&quot; default=&quot;0&quot; value=&quot;0&quot;&gt;" calcext:value-type="string">
            <text:p>&lt;item idno="reportage" enabled="1" default="0" value="0"&gt;</text:p>
          </table:table-cell>
          <table:table-cell table:formula="of:=[.H4]&amp;[Snippets.B$16]&amp;[.C4]&amp;[.D4]&amp;[.E4]&amp;[.F4]&amp;[.G4]&amp;[Snippets.B$22]&amp;[Snippets.B$23]" office:value-type="string" office:string-value="&lt;item idno=&quot;reportage&quot; enabled=&quot;1&quot; default=&quot;0&quot; value=&quot;0&quot;&gt;&lt;labels&gt;&lt;label locale=&quot;de_CH&quot; preferred=&quot;1&quot;&gt;&lt;name_singular&gt;Reportage&lt;/name_singular&gt;&lt;name_plural&gt;Reportage&lt;/name_plural&gt;&lt;/label&gt;&lt;label locale=&quot;fr_CH&quot; preferred=&quot;1&quot;&gt;&lt;name_singular&gt;Reportage&lt;/name_singular&gt;&lt;name_plural&gt;Reportage&lt;/name_plural&gt;&lt;/label&gt;&lt;label locale=&quot;it_CH&quot; preferred=&quot;1&quot;&gt;&lt;name_singular&gt;Reportage&lt;/name_singular&gt;&lt;name_plural&gt;Reportage&lt;/name_plural&gt;&lt;/label&gt;&lt;label locale=&quot;rm_CH&quot; preferred=&quot;1&quot;&gt;&lt;name_singular&gt;Reportascha&lt;/name_singular&gt;&lt;name_plural&gt;Reportascha&lt;/name_plural&gt;&lt;/label&gt;&lt;label locale=&quot;en_US&quot; preferred=&quot;1&quot;&gt;&lt;name_singular&gt;Reportage&lt;/name_singular&gt;&lt;name_plural&gt;Reportage&lt;/name_plural&gt;&lt;/label&gt;&lt;/labels&gt;&lt;/item&gt;" calcext:value-type="string">
            <text:p>&lt;item idno="reportage" enabled="1" default="0" value="0"&gt;&lt;labels&gt;&lt;label locale="de_CH" preferred="1"&gt;&lt;name_singular&gt;Reportage&lt;/name_singular&gt;&lt;name_plural&gt;Reportage&lt;/name_plural&gt;&lt;/label&gt;&lt;label locale="fr_CH" preferred="1"&gt;&lt;name_singular&gt;Reportage&lt;/name_singular&gt;&lt;name_plural&gt;Reportage&lt;/name_plural&gt;&lt;/label&gt;&lt;label locale="it_CH" preferred="1"&gt;&lt;name_singular&gt;Reportage&lt;/name_singular&gt;&lt;name_plural&gt;Reportage&lt;/name_plural&gt;&lt;/label&gt;&lt;label locale="rm_CH" preferred="1"&gt;&lt;name_singular&gt;Reportascha&lt;/name_singular&gt;&lt;name_plural&gt;Reportascha&lt;/name_plural&gt;&lt;/label&gt;&lt;label locale="en_US" preferred="1"&gt;&lt;name_singular&gt;Reportage&lt;/name_singular&gt;&lt;name_plural&gt;Reportag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Presse</text:p>
          </table:table-cell>
          <table:table-cell office:value-type="string" calcext:value-type="string">
            <text:p>presse</text:p>
          </table:table-cell>
          <table:table-cell table:formula="of:=[Snippets.$B$17]&amp;[Translations.A5]&amp;[Snippets.$C$17]&amp;[Translations.A5]&amp;[Snippets.$D$17]" office:value-type="string" office:string-value="&lt;label locale=&quot;de_CH&quot; preferred=&quot;1&quot;&gt;&lt;name_singular&gt;Presse&lt;/name_singular&gt;&lt;name_plural&gt;Presse&lt;/name_plural&gt;&lt;/label&gt;" calcext:value-type="string">
            <text:p>&lt;label locale="de_CH" preferred="1"&gt;&lt;name_singular&gt;Presse&lt;/name_singular&gt;&lt;name_plural&gt;Presse&lt;/name_plural&gt;&lt;/label&gt;</text:p>
          </table:table-cell>
          <table:table-cell table:formula="of:=[Snippets.$B$18]&amp;[Translations.B5]&amp;[Snippets.$C$18]&amp;[Translations.B5]&amp;[Snippets.$D$18]" office:value-type="string" office:string-value="&lt;label locale=&quot;fr_CH&quot; preferred=&quot;1&quot;&gt;&lt;name_singular&gt;Photojournalisme&lt;/name_singular&gt;&lt;name_plural&gt;Photojournalisme&lt;/name_plural&gt;&lt;/label&gt;" calcext:value-type="string">
            <text:p>&lt;label locale="fr_CH" preferred="1"&gt;&lt;name_singular&gt;Photojournalisme&lt;/name_singular&gt;&lt;name_plural&gt;Photojournalisme&lt;/name_plural&gt;&lt;/label&gt;</text:p>
          </table:table-cell>
          <table:table-cell table:formula="of:=[Snippets.$B$19]&amp;[Translations.C5]&amp;[Snippets.$C$19]&amp;[Translations.C5]&amp;[Snippets.$D$19]" office:value-type="string" office:string-value="&lt;label locale=&quot;it_CH&quot; preferred=&quot;1&quot;&gt;&lt;name_singular&gt;Fotogiornalismo&lt;/name_singular&gt;&lt;name_plural&gt;Fotogiornalismo&lt;/name_plural&gt;&lt;/label&gt;" calcext:value-type="string">
            <text:p>&lt;label locale="it_CH" preferred="1"&gt;&lt;name_singular&gt;Fotogiornalismo&lt;/name_singular&gt;&lt;name_plural&gt;Fotogiornalismo&lt;/name_plural&gt;&lt;/label&gt;</text:p>
          </table:table-cell>
          <table:table-cell table:formula="of:=[Snippets.$B$20]&amp;[Translations.D5]&amp;[Snippets.$C$20]&amp;[Translations.D5]&amp;[Snippets.$D$20]" office:value-type="string" office:string-value="&lt;label locale=&quot;rm_CH&quot; preferred=&quot;1&quot;&gt;&lt;name_singular&gt;Pressa&lt;/name_singular&gt;&lt;name_plural&gt;Pressa&lt;/name_plural&gt;&lt;/label&gt;" calcext:value-type="string">
            <text:p>&lt;label locale="rm_CH" preferred="1"&gt;&lt;name_singular&gt;Pressa&lt;/name_singular&gt;&lt;name_plural&gt;Pressa&lt;/name_plural&gt;&lt;/label&gt;</text:p>
          </table:table-cell>
          <table:table-cell table:formula="of:=[Snippets.$B$21]&amp;[Translations.E5]&amp;[Snippets.$C$21]&amp;[Translations.E5]&amp;[Snippets.$D$21]" office:value-type="string" office:string-value="&lt;label locale=&quot;en_US&quot; preferred=&quot;1&quot;&gt;&lt;name_singular&gt;Press&lt;/name_singular&gt;&lt;name_plural&gt;Press&lt;/name_plural&gt;&lt;/label&gt;" calcext:value-type="string">
            <text:p>&lt;label locale="en_US" preferred="1"&gt;&lt;name_singular&gt;Press&lt;/name_singular&gt;&lt;name_plural&gt;Press&lt;/name_plural&gt;&lt;/label&gt;</text:p>
          </table:table-cell>
          <table:table-cell table:formula="of:=[Snippets.B$15]&amp;[.B5]&amp;[Snippets.C$15]" office:value-type="string" office:string-value="&lt;item idno=&quot;presse&quot; enabled=&quot;1&quot; default=&quot;0&quot; value=&quot;0&quot;&gt;" calcext:value-type="string">
            <text:p>&lt;item idno="presse" enabled="1" default="0" value="0"&gt;</text:p>
          </table:table-cell>
          <table:table-cell table:formula="of:=[.H5]&amp;[Snippets.B$16]&amp;[.C5]&amp;[.D5]&amp;[.E5]&amp;[.F5]&amp;[.G5]&amp;[Snippets.B$22]&amp;[Snippets.B$23]" office:value-type="string" office:string-value="&lt;item idno=&quot;presse&quot; enabled=&quot;1&quot; default=&quot;0&quot; value=&quot;0&quot;&gt;&lt;labels&gt;&lt;label locale=&quot;de_CH&quot; preferred=&quot;1&quot;&gt;&lt;name_singular&gt;Presse&lt;/name_singular&gt;&lt;name_plural&gt;Presse&lt;/name_plural&gt;&lt;/label&gt;&lt;label locale=&quot;fr_CH&quot; preferred=&quot;1&quot;&gt;&lt;name_singular&gt;Photojournalisme&lt;/name_singular&gt;&lt;name_plural&gt;Photojournalisme&lt;/name_plural&gt;&lt;/label&gt;&lt;label locale=&quot;it_CH&quot; preferred=&quot;1&quot;&gt;&lt;name_singular&gt;Fotogiornalismo&lt;/name_singular&gt;&lt;name_plural&gt;Fotogiornalismo&lt;/name_plural&gt;&lt;/label&gt;&lt;label locale=&quot;rm_CH&quot; preferred=&quot;1&quot;&gt;&lt;name_singular&gt;Pressa&lt;/name_singular&gt;&lt;name_plural&gt;Pressa&lt;/name_plural&gt;&lt;/label&gt;&lt;label locale=&quot;en_US&quot; preferred=&quot;1&quot;&gt;&lt;name_singular&gt;Press&lt;/name_singular&gt;&lt;name_plural&gt;Press&lt;/name_plural&gt;&lt;/label&gt;&lt;/labels&gt;&lt;/item&gt;" calcext:value-type="string">
            <text:p>&lt;item idno="presse" enabled="1" default="0" value="0"&gt;&lt;labels&gt;&lt;label locale="de_CH" preferred="1"&gt;&lt;name_singular&gt;Presse&lt;/name_singular&gt;&lt;name_plural&gt;Presse&lt;/name_plural&gt;&lt;/label&gt;&lt;label locale="fr_CH" preferred="1"&gt;&lt;name_singular&gt;Photojournalisme&lt;/name_singular&gt;&lt;name_plural&gt;Photojournalisme&lt;/name_plural&gt;&lt;/label&gt;&lt;label locale="it_CH" preferred="1"&gt;&lt;name_singular&gt;Fotogiornalismo&lt;/name_singular&gt;&lt;name_plural&gt;Fotogiornalismo&lt;/name_plural&gt;&lt;/label&gt;&lt;label locale="rm_CH" preferred="1"&gt;&lt;name_singular&gt;Pressa&lt;/name_singular&gt;&lt;name_plural&gt;Pressa&lt;/name_plural&gt;&lt;/label&gt;&lt;label locale="en_US" preferred="1"&gt;&lt;name_singular&gt;Press&lt;/name_singular&gt;&lt;name_plural&gt;Press&lt;/name_plural&gt;&lt;/label&gt;&lt;/labels&gt;&lt;/item&gt;</text:p>
          </table:table-cell>
        </table:table-row>
        <table:table-row table:style-name="ro3">
          <table:table-cell table:style-name="ce1" office:value-type="string" calcext:value-type="string">
            <text:p>Porträt</text:p>
          </table:table-cell>
          <table:table-cell table:style-name="ce1" office:value-type="string" calcext:value-type="string">
            <text:p>portraet</text:p>
          </table:table-cell>
          <table:table-cell table:formula="of:=[Snippets.$B$17]&amp;[Translations.A6]&amp;[Snippets.$C$17]&amp;[Translations.A6]&amp;[Snippets.$D$17]" office:value-type="string" office:string-value="&lt;label locale=&quot;de_CH&quot; preferred=&quot;1&quot;&gt;&lt;name_singular&gt;Porträt&lt;/name_singular&gt;&lt;name_plural&gt;Porträt&lt;/name_plural&gt;&lt;/label&gt;" calcext:value-type="string">
            <text:p>&lt;label locale="de_CH" preferred="1"&gt;&lt;name_singular&gt;Porträt&lt;/name_singular&gt;&lt;name_plural&gt;Porträt&lt;/name_plural&gt;&lt;/label&gt;</text:p>
          </table:table-cell>
          <table:table-cell table:formula="of:=[Snippets.$B$18]&amp;[Translations.B6]&amp;[Snippets.$C$18]&amp;[Translations.B6]&amp;[Snippets.$D$18]" office:value-type="string" office:string-value="&lt;label locale=&quot;fr_CH&quot; preferred=&quot;1&quot;&gt;&lt;name_singular&gt;Portrait&lt;/name_singular&gt;&lt;name_plural&gt;Portrait&lt;/name_plural&gt;&lt;/label&gt;" calcext:value-type="string">
            <text:p>&lt;label locale="fr_CH" preferred="1"&gt;&lt;name_singular&gt;Portrait&lt;/name_singular&gt;&lt;name_plural&gt;Portrait&lt;/name_plural&gt;&lt;/label&gt;</text:p>
          </table:table-cell>
          <table:table-cell table:formula="of:=[Snippets.$B$19]&amp;[Translations.C6]&amp;[Snippets.$C$19]&amp;[Translations.C6]&amp;[Snippets.$D$19]" office:value-type="string" office:string-value="&lt;label locale=&quot;it_CH&quot; preferred=&quot;1&quot;&gt;&lt;name_singular&gt;Ritratto&lt;/name_singular&gt;&lt;name_plural&gt;Ritratto&lt;/name_plural&gt;&lt;/label&gt;" calcext:value-type="string">
            <text:p>&lt;label locale="it_CH" preferred="1"&gt;&lt;name_singular&gt;Ritratto&lt;/name_singular&gt;&lt;name_plural&gt;Ritratto&lt;/name_plural&gt;&lt;/label&gt;</text:p>
          </table:table-cell>
          <table:table-cell table:formula="of:=[Snippets.$B$20]&amp;[Translations.D6]&amp;[Snippets.$C$20]&amp;[Translations.D6]&amp;[Snippets.$D$20]" office:value-type="string" office:string-value="&lt;label locale=&quot;rm_CH&quot; preferred=&quot;1&quot;&gt;&lt;name_singular&gt;Purtret&lt;/name_singular&gt;&lt;name_plural&gt;Purtret&lt;/name_plural&gt;&lt;/label&gt;" calcext:value-type="string">
            <text:p>&lt;label locale="rm_CH" preferred="1"&gt;&lt;name_singular&gt;Purtret&lt;/name_singular&gt;&lt;name_plural&gt;Purtret&lt;/name_plural&gt;&lt;/label&gt;</text:p>
          </table:table-cell>
          <table:table-cell table:formula="of:=[Snippets.$B$21]&amp;[Translations.E6]&amp;[Snippets.$C$21]&amp;[Translations.E6]&amp;[Snippets.$D$21]" office:value-type="string" office:string-value="&lt;label locale=&quot;en_US&quot; preferred=&quot;1&quot;&gt;&lt;name_singular&gt;Portrait&lt;/name_singular&gt;&lt;name_plural&gt;Portrait&lt;/name_plural&gt;&lt;/label&gt;" calcext:value-type="string">
            <text:p>&lt;label locale="en_US" preferred="1"&gt;&lt;name_singular&gt;Portrait&lt;/name_singular&gt;&lt;name_plural&gt;Portrait&lt;/name_plural&gt;&lt;/label&gt;</text:p>
          </table:table-cell>
          <table:table-cell table:formula="of:=[Snippets.B$15]&amp;[.B6]&amp;[Snippets.C$15]" office:value-type="string" office:string-value="&lt;item idno=&quot;portraet&quot; enabled=&quot;1&quot; default=&quot;0&quot; value=&quot;0&quot;&gt;" calcext:value-type="string">
            <text:p>&lt;item idno="portraet" enabled="1" default="0" value="0"&gt;</text:p>
          </table:table-cell>
          <table:table-cell table:formula="of:=[.H6]&amp;[Snippets.B$16]&amp;[.C6]&amp;[.D6]&amp;[.E6]&amp;[.F6]&amp;[.G6]&amp;[Snippets.B$22]&amp;[Snippets.B$23]" office:value-type="string" office:string-value="&lt;item idno=&quot;portraet&quot; enabled=&quot;1&quot; default=&quot;0&quot; value=&quot;0&quot;&gt;&lt;labels&gt;&lt;label locale=&quot;de_CH&quot; preferred=&quot;1&quot;&gt;&lt;name_singular&gt;Porträt&lt;/name_singular&gt;&lt;name_plural&gt;Porträt&lt;/name_plural&gt;&lt;/label&gt;&lt;label locale=&quot;fr_CH&quot; preferred=&quot;1&quot;&gt;&lt;name_singular&gt;Portrait&lt;/name_singular&gt;&lt;name_plural&gt;Portrait&lt;/name_plural&gt;&lt;/label&gt;&lt;label locale=&quot;it_CH&quot; preferred=&quot;1&quot;&gt;&lt;name_singular&gt;Ritratto&lt;/name_singular&gt;&lt;name_plural&gt;Ritratto&lt;/name_plural&gt;&lt;/label&gt;&lt;label locale=&quot;rm_CH&quot; preferred=&quot;1&quot;&gt;&lt;name_singular&gt;Purtret&lt;/name_singular&gt;&lt;name_plural&gt;Purtret&lt;/name_plural&gt;&lt;/label&gt;&lt;label locale=&quot;en_US&quot; preferred=&quot;1&quot;&gt;&lt;name_singular&gt;Portrait&lt;/name_singular&gt;&lt;name_plural&gt;Portrait&lt;/name_plural&gt;&lt;/label&gt;&lt;/labels&gt;&lt;/item&gt;" calcext:value-type="string">
            <text:p>&lt;item idno="portraet" enabled="1" default="0" value="0"&gt;&lt;labels&gt;&lt;label locale="de_CH" preferred="1"&gt;&lt;name_singular&gt;Porträt&lt;/name_singular&gt;&lt;name_plural&gt;Porträt&lt;/name_plural&gt;&lt;/label&gt;&lt;label locale="fr_CH" preferred="1"&gt;&lt;name_singular&gt;Portrait&lt;/name_singular&gt;&lt;name_plural&gt;Portrait&lt;/name_plural&gt;&lt;/label&gt;&lt;label locale="it_CH" preferred="1"&gt;&lt;name_singular&gt;Ritratto&lt;/name_singular&gt;&lt;name_plural&gt;Ritratto&lt;/name_plural&gt;&lt;/label&gt;&lt;label locale="rm_CH" preferred="1"&gt;&lt;name_singular&gt;Purtret&lt;/name_singular&gt;&lt;name_plural&gt;Purtret&lt;/name_plural&gt;&lt;/label&gt;&lt;label locale="en_US" preferred="1"&gt;&lt;name_singular&gt;Portrait&lt;/name_singular&gt;&lt;name_plural&gt;Portrait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Ortsbild</text:p>
          </table:table-cell>
          <table:table-cell office:value-type="string" calcext:value-type="string">
            <text:p>ortsbild</text:p>
          </table:table-cell>
          <table:table-cell table:formula="of:=[Snippets.$B$17]&amp;[Translations.A7]&amp;[Snippets.$C$17]&amp;[Translations.A7]&amp;[Snippets.$D$17]" office:value-type="string" office:string-value="&lt;label locale=&quot;de_CH&quot; preferred=&quot;1&quot;&gt;&lt;name_singular&gt;Ortsbild&lt;/name_singular&gt;&lt;name_plural&gt;Ortsbild&lt;/name_plural&gt;&lt;/label&gt;" calcext:value-type="string">
            <text:p>&lt;label locale="de_CH" preferred="1"&gt;&lt;name_singular&gt;Ortsbild&lt;/name_singular&gt;&lt;name_plural&gt;Ortsbild&lt;/name_plural&gt;&lt;/label&gt;</text:p>
          </table:table-cell>
          <table:table-cell table:formula="of:=[Snippets.$B$18]&amp;[Translations.B7]&amp;[Snippets.$C$18]&amp;[Translations.B7]&amp;[Snippets.$D$18]" office:value-type="string" office:string-value="&lt;label locale=&quot;fr_CH&quot; preferred=&quot;1&quot;&gt;&lt;name_singular&gt;Paysage urbain&lt;/name_singular&gt;&lt;name_plural&gt;Paysage urbain&lt;/name_plural&gt;&lt;/label&gt;" calcext:value-type="string">
            <text:p>&lt;label locale="fr_CH" preferred="1"&gt;&lt;name_singular&gt;Paysage urbain&lt;/name_singular&gt;&lt;name_plural&gt;Paysage urbain&lt;/name_plural&gt;&lt;/label&gt;</text:p>
          </table:table-cell>
          <table:table-cell table:formula="of:=[Snippets.$B$19]&amp;[Translations.C7]&amp;[Snippets.$C$19]&amp;[Translations.C7]&amp;[Snippets.$D$19]" office:value-type="string" office:string-value="&lt;label locale=&quot;it_CH&quot; preferred=&quot;1&quot;&gt;&lt;name_singular&gt;Paesaggio urbano&lt;/name_singular&gt;&lt;name_plural&gt;Paesaggio urbano&lt;/name_plural&gt;&lt;/label&gt;" calcext:value-type="string">
            <text:p>&lt;label locale="it_CH" preferred="1"&gt;&lt;name_singular&gt;Paesaggio urbano&lt;/name_singular&gt;&lt;name_plural&gt;Paesaggio urbano&lt;/name_plural&gt;&lt;/label&gt;</text:p>
          </table:table-cell>
          <table:table-cell table:formula="of:=[Snippets.$B$20]&amp;[Translations.D7]&amp;[Snippets.$C$20]&amp;[Translations.D7]&amp;[Snippets.$D$20]" office:value-type="string" office:string-value="&lt;label locale=&quot;rm_CH&quot; preferred=&quot;1&quot;&gt;&lt;name_singular&gt;Maletg dal vitg&lt;/name_singular&gt;&lt;name_plural&gt;Maletg dal vitg&lt;/name_plural&gt;&lt;/label&gt;" calcext:value-type="string">
            <text:p>&lt;label locale="rm_CH" preferred="1"&gt;&lt;name_singular&gt;Maletg dal vitg&lt;/name_singular&gt;&lt;name_plural&gt;Maletg dal vitg&lt;/name_plural&gt;&lt;/label&gt;</text:p>
          </table:table-cell>
          <table:table-cell table:formula="of:=[Snippets.$B$21]&amp;[Translations.E7]&amp;[Snippets.$C$21]&amp;[Translations.E7]&amp;[Snippets.$D$21]" office:value-type="string" office:string-value="&lt;label locale=&quot;en_US&quot; preferred=&quot;1&quot;&gt;&lt;name_singular&gt;Townscape&lt;/name_singular&gt;&lt;name_plural&gt;Townscape&lt;/name_plural&gt;&lt;/label&gt;" calcext:value-type="string">
            <text:p>&lt;label locale="en_US" preferred="1"&gt;&lt;name_singular&gt;Townscape&lt;/name_singular&gt;&lt;name_plural&gt;Townscape&lt;/name_plural&gt;&lt;/label&gt;</text:p>
          </table:table-cell>
          <table:table-cell table:formula="of:=[Snippets.B$15]&amp;[.B7]&amp;[Snippets.C$15]" office:value-type="string" office:string-value="&lt;item idno=&quot;ortsbild&quot; enabled=&quot;1&quot; default=&quot;0&quot; value=&quot;0&quot;&gt;" calcext:value-type="string">
            <text:p>&lt;item idno="ortsbild" enabled="1" default="0" value="0"&gt;</text:p>
          </table:table-cell>
          <table:table-cell table:formula="of:=[.H7]&amp;[Snippets.B$16]&amp;[.C7]&amp;[.D7]&amp;[.E7]&amp;[.F7]&amp;[.G7]&amp;[Snippets.B$22]&amp;[Snippets.B$23]" office:value-type="string" office:string-value="&lt;item idno=&quot;ortsbild&quot; enabled=&quot;1&quot; default=&quot;0&quot; value=&quot;0&quot;&gt;&lt;labels&gt;&lt;label locale=&quot;de_CH&quot; preferred=&quot;1&quot;&gt;&lt;name_singular&gt;Ortsbild&lt;/name_singular&gt;&lt;name_plural&gt;Ortsbild&lt;/name_plural&gt;&lt;/label&gt;&lt;label locale=&quot;fr_CH&quot; preferred=&quot;1&quot;&gt;&lt;name_singular&gt;Paysage urbain&lt;/name_singular&gt;&lt;name_plural&gt;Paysage urbain&lt;/name_plural&gt;&lt;/label&gt;&lt;label locale=&quot;it_CH&quot; preferred=&quot;1&quot;&gt;&lt;name_singular&gt;Paesaggio urbano&lt;/name_singular&gt;&lt;name_plural&gt;Paesaggio urbano&lt;/name_plural&gt;&lt;/label&gt;&lt;label locale=&quot;rm_CH&quot; preferred=&quot;1&quot;&gt;&lt;name_singular&gt;Maletg dal vitg&lt;/name_singular&gt;&lt;name_plural&gt;Maletg dal vitg&lt;/name_plural&gt;&lt;/label&gt;&lt;label locale=&quot;en_US&quot; preferred=&quot;1&quot;&gt;&lt;name_singular&gt;Townscape&lt;/name_singular&gt;&lt;name_plural&gt;Townscape&lt;/name_plural&gt;&lt;/label&gt;&lt;/labels&gt;&lt;/item&gt;" calcext:value-type="string">
            <text:p>&lt;item idno="ortsbild" enabled="1" default="0" value="0"&gt;&lt;labels&gt;&lt;label locale="de_CH" preferred="1"&gt;&lt;name_singular&gt;Ortsbild&lt;/name_singular&gt;&lt;name_plural&gt;Ortsbild&lt;/name_plural&gt;&lt;/label&gt;&lt;label locale="fr_CH" preferred="1"&gt;&lt;name_singular&gt;Paysage urbain&lt;/name_singular&gt;&lt;name_plural&gt;Paysage urbain&lt;/name_plural&gt;&lt;/label&gt;&lt;label locale="it_CH" preferred="1"&gt;&lt;name_singular&gt;Paesaggio urbano&lt;/name_singular&gt;&lt;name_plural&gt;Paesaggio urbano&lt;/name_plural&gt;&lt;/label&gt;&lt;label locale="rm_CH" preferred="1"&gt;&lt;name_singular&gt;Maletg dal vitg&lt;/name_singular&gt;&lt;name_plural&gt;Maletg dal vitg&lt;/name_plural&gt;&lt;/label&gt;&lt;label locale="en_US" preferred="1"&gt;&lt;name_singular&gt;Townscape&lt;/name_singular&gt;&lt;name_plural&gt;Townscap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Architektur</text:p>
          </table:table-cell>
          <table:table-cell office:value-type="string" calcext:value-type="string">
            <text:p>architektur</text:p>
          </table:table-cell>
          <table:table-cell table:formula="of:=[Snippets.$B$17]&amp;[Translations.A8]&amp;[Snippets.$C$17]&amp;[Translations.A8]&amp;[Snippets.$D$17]" office:value-type="string" office:string-value="&lt;label locale=&quot;de_CH&quot; preferred=&quot;1&quot;&gt;&lt;name_singular&gt;Architektur&lt;/name_singular&gt;&lt;name_plural&gt;Architektur&lt;/name_plural&gt;&lt;/label&gt;" calcext:value-type="string">
            <text:p>&lt;label locale="de_CH" preferred="1"&gt;&lt;name_singular&gt;Architektur&lt;/name_singular&gt;&lt;name_plural&gt;Architektur&lt;/name_plural&gt;&lt;/label&gt;</text:p>
          </table:table-cell>
          <table:table-cell table:formula="of:=[Snippets.$B$18]&amp;[Translations.B8]&amp;[Snippets.$C$18]&amp;[Translations.B8]&amp;[Snippets.$D$18]" office:value-type="string" office:string-value="&lt;label locale=&quot;fr_CH&quot; preferred=&quot;1&quot;&gt;&lt;name_singular&gt;Architecture&lt;/name_singular&gt;&lt;name_plural&gt;Architecture&lt;/name_plural&gt;&lt;/label&gt;" calcext:value-type="string">
            <text:p>&lt;label locale="fr_CH" preferred="1"&gt;&lt;name_singular&gt;Architecture&lt;/name_singular&gt;&lt;name_plural&gt;Architecture&lt;/name_plural&gt;&lt;/label&gt;</text:p>
          </table:table-cell>
          <table:table-cell table:formula="of:=[Snippets.$B$19]&amp;[Translations.C8]&amp;[Snippets.$C$19]&amp;[Translations.C8]&amp;[Snippets.$D$19]" office:value-type="string" office:string-value="&lt;label locale=&quot;it_CH&quot; preferred=&quot;1&quot;&gt;&lt;name_singular&gt;Architettura&lt;/name_singular&gt;&lt;name_plural&gt;Architettura&lt;/name_plural&gt;&lt;/label&gt;" calcext:value-type="string">
            <text:p>&lt;label locale="it_CH" preferred="1"&gt;&lt;name_singular&gt;Architettura&lt;/name_singular&gt;&lt;name_plural&gt;Architettura&lt;/name_plural&gt;&lt;/label&gt;</text:p>
          </table:table-cell>
          <table:table-cell table:formula="of:=[Snippets.$B$20]&amp;[Translations.D8]&amp;[Snippets.$C$20]&amp;[Translations.D8]&amp;[Snippets.$D$20]" office:value-type="string" office:string-value="&lt;label locale=&quot;rm_CH&quot; preferred=&quot;1&quot;&gt;&lt;name_singular&gt;Architectura&lt;/name_singular&gt;&lt;name_plural&gt;Architectura&lt;/name_plural&gt;&lt;/label&gt;" calcext:value-type="string">
            <text:p>&lt;label locale="rm_CH" preferred="1"&gt;&lt;name_singular&gt;Architectura&lt;/name_singular&gt;&lt;name_plural&gt;Architectura&lt;/name_plural&gt;&lt;/label&gt;</text:p>
          </table:table-cell>
          <table:table-cell table:formula="of:=[Snippets.$B$21]&amp;[Translations.E8]&amp;[Snippets.$C$21]&amp;[Translations.E8]&amp;[Snippets.$D$21]" office:value-type="string" office:string-value="&lt;label locale=&quot;en_US&quot; preferred=&quot;1&quot;&gt;&lt;name_singular&gt;Architecture&lt;/name_singular&gt;&lt;name_plural&gt;Architecture&lt;/name_plural&gt;&lt;/label&gt;" calcext:value-type="string">
            <text:p>&lt;label locale="en_US" preferred="1"&gt;&lt;name_singular&gt;Architecture&lt;/name_singular&gt;&lt;name_plural&gt;Architecture&lt;/name_plural&gt;&lt;/label&gt;</text:p>
          </table:table-cell>
          <table:table-cell table:formula="of:=[Snippets.B$15]&amp;[.B8]&amp;[Snippets.C$15]" office:value-type="string" office:string-value="&lt;item idno=&quot;architektur&quot; enabled=&quot;1&quot; default=&quot;0&quot; value=&quot;0&quot;&gt;" calcext:value-type="string">
            <text:p>&lt;item idno="architektur" enabled="1" default="0" value="0"&gt;</text:p>
          </table:table-cell>
          <table:table-cell table:formula="of:=[.H8]&amp;[Snippets.B$16]&amp;[.C8]&amp;[.D8]&amp;[.E8]&amp;[.F8]&amp;[.G8]&amp;[Snippets.B$22]&amp;[Snippets.B$23]" office:value-type="string" office:string-value="&lt;item idno=&quot;architektur&quot; enabled=&quot;1&quot; default=&quot;0&quot; value=&quot;0&quot;&gt;&lt;labels&gt;&lt;label locale=&quot;de_CH&quot; preferred=&quot;1&quot;&gt;&lt;name_singular&gt;Architektur&lt;/name_singular&gt;&lt;name_plural&gt;Architektur&lt;/name_plural&gt;&lt;/label&gt;&lt;label locale=&quot;fr_CH&quot; preferred=&quot;1&quot;&gt;&lt;name_singular&gt;Architecture&lt;/name_singular&gt;&lt;name_plural&gt;Architecture&lt;/name_plural&gt;&lt;/label&gt;&lt;label locale=&quot;it_CH&quot; preferred=&quot;1&quot;&gt;&lt;name_singular&gt;Architettura&lt;/name_singular&gt;&lt;name_plural&gt;Architettura&lt;/name_plural&gt;&lt;/label&gt;&lt;label locale=&quot;rm_CH&quot; preferred=&quot;1&quot;&gt;&lt;name_singular&gt;Architectura&lt;/name_singular&gt;&lt;name_plural&gt;Architectura&lt;/name_plural&gt;&lt;/label&gt;&lt;label locale=&quot;en_US&quot; preferred=&quot;1&quot;&gt;&lt;name_singular&gt;Architecture&lt;/name_singular&gt;&lt;name_plural&gt;Architecture&lt;/name_plural&gt;&lt;/label&gt;&lt;/labels&gt;&lt;/item&gt;" calcext:value-type="string">
            <text:p>&lt;item idno="architektur" enabled="1" default="0" value="0"&gt;&lt;labels&gt;&lt;label locale="de_CH" preferred="1"&gt;&lt;name_singular&gt;Architektur&lt;/name_singular&gt;&lt;name_plural&gt;Architektur&lt;/name_plural&gt;&lt;/label&gt;&lt;label locale="fr_CH" preferred="1"&gt;&lt;name_singular&gt;Architecture&lt;/name_singular&gt;&lt;name_plural&gt;Architecture&lt;/name_plural&gt;&lt;/label&gt;&lt;label locale="it_CH" preferred="1"&gt;&lt;name_singular&gt;Architettura&lt;/name_singular&gt;&lt;name_plural&gt;Architettura&lt;/name_plural&gt;&lt;/label&gt;&lt;label locale="rm_CH" preferred="1"&gt;&lt;name_singular&gt;Architectura&lt;/name_singular&gt;&lt;name_plural&gt;Architectura&lt;/name_plural&gt;&lt;/label&gt;&lt;label locale="en_US" preferred="1"&gt;&lt;name_singular&gt;Architecture&lt;/name_singular&gt;&lt;name_plural&gt;Architectur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Landschaft</text:p>
          </table:table-cell>
          <table:table-cell office:value-type="string" calcext:value-type="string">
            <text:p>landschaft</text:p>
          </table:table-cell>
          <table:table-cell table:formula="of:=[Snippets.$B$17]&amp;[Translations.A9]&amp;[Snippets.$C$17]&amp;[Translations.A9]&amp;[Snippets.$D$17]" office:value-type="string" office:string-value="&lt;label locale=&quot;de_CH&quot; preferred=&quot;1&quot;&gt;&lt;name_singular&gt;Landschaft&lt;/name_singular&gt;&lt;name_plural&gt;Landschaft&lt;/name_plural&gt;&lt;/label&gt;" calcext:value-type="string">
            <text:p>&lt;label locale="de_CH" preferred="1"&gt;&lt;name_singular&gt;Landschaft&lt;/name_singular&gt;&lt;name_plural&gt;Landschaft&lt;/name_plural&gt;&lt;/label&gt;</text:p>
          </table:table-cell>
          <table:table-cell table:formula="of:=[Snippets.$B$18]&amp;[Translations.B9]&amp;[Snippets.$C$18]&amp;[Translations.B9]&amp;[Snippets.$D$18]" office:value-type="string" office:string-value="&lt;label locale=&quot;fr_CH&quot; preferred=&quot;1&quot;&gt;&lt;name_singular&gt;Paysage&lt;/name_singular&gt;&lt;name_plural&gt;Paysage&lt;/name_plural&gt;&lt;/label&gt;" calcext:value-type="string">
            <text:p>&lt;label locale="fr_CH" preferred="1"&gt;&lt;name_singular&gt;Paysage&lt;/name_singular&gt;&lt;name_plural&gt;Paysage&lt;/name_plural&gt;&lt;/label&gt;</text:p>
          </table:table-cell>
          <table:table-cell table:formula="of:=[Snippets.$B$19]&amp;[Translations.C9]&amp;[Snippets.$C$19]&amp;[Translations.C9]&amp;[Snippets.$D$19]" office:value-type="string" office:string-value="&lt;label locale=&quot;it_CH&quot; preferred=&quot;1&quot;&gt;&lt;name_singular&gt;Paesaggio&lt;/name_singular&gt;&lt;name_plural&gt;Paesaggio&lt;/name_plural&gt;&lt;/label&gt;" calcext:value-type="string">
            <text:p>&lt;label locale="it_CH" preferred="1"&gt;&lt;name_singular&gt;Paesaggio&lt;/name_singular&gt;&lt;name_plural&gt;Paesaggio&lt;/name_plural&gt;&lt;/label&gt;</text:p>
          </table:table-cell>
          <table:table-cell table:formula="of:=[Snippets.$B$20]&amp;[Translations.D9]&amp;[Snippets.$C$20]&amp;[Translations.D9]&amp;[Snippets.$D$20]" office:value-type="string" office:string-value="&lt;label locale=&quot;rm_CH&quot; preferred=&quot;1&quot;&gt;&lt;name_singular&gt;Cuntrada&lt;/name_singular&gt;&lt;name_plural&gt;Cuntrada&lt;/name_plural&gt;&lt;/label&gt;" calcext:value-type="string">
            <text:p>&lt;label locale="rm_CH" preferred="1"&gt;&lt;name_singular&gt;Cuntrada&lt;/name_singular&gt;&lt;name_plural&gt;Cuntrada&lt;/name_plural&gt;&lt;/label&gt;</text:p>
          </table:table-cell>
          <table:table-cell table:formula="of:=[Snippets.$B$21]&amp;[Translations.E9]&amp;[Snippets.$C$21]&amp;[Translations.E9]&amp;[Snippets.$D$21]" office:value-type="string" office:string-value="&lt;label locale=&quot;en_US&quot; preferred=&quot;1&quot;&gt;&lt;name_singular&gt;Landscape&lt;/name_singular&gt;&lt;name_plural&gt;Landscape&lt;/name_plural&gt;&lt;/label&gt;" calcext:value-type="string">
            <text:p>&lt;label locale="en_US" preferred="1"&gt;&lt;name_singular&gt;Landscape&lt;/name_singular&gt;&lt;name_plural&gt;Landscape&lt;/name_plural&gt;&lt;/label&gt;</text:p>
          </table:table-cell>
          <table:table-cell table:formula="of:=[Snippets.B$15]&amp;[.B9]&amp;[Snippets.C$15]" office:value-type="string" office:string-value="&lt;item idno=&quot;landschaft&quot; enabled=&quot;1&quot; default=&quot;0&quot; value=&quot;0&quot;&gt;" calcext:value-type="string">
            <text:p>&lt;item idno="landschaft" enabled="1" default="0" value="0"&gt;</text:p>
          </table:table-cell>
          <table:table-cell table:formula="of:=[.H9]&amp;[Snippets.B$16]&amp;[.C9]&amp;[.D9]&amp;[.E9]&amp;[.F9]&amp;[.G9]&amp;[Snippets.B$22]&amp;[Snippets.B$23]" office:value-type="string" office:string-value="&lt;item idno=&quot;landschaft&quot; enabled=&quot;1&quot; default=&quot;0&quot; value=&quot;0&quot;&gt;&lt;labels&gt;&lt;label locale=&quot;de_CH&quot; preferred=&quot;1&quot;&gt;&lt;name_singular&gt;Landschaft&lt;/name_singular&gt;&lt;name_plural&gt;Landschaft&lt;/name_plural&gt;&lt;/label&gt;&lt;label locale=&quot;fr_CH&quot; preferred=&quot;1&quot;&gt;&lt;name_singular&gt;Paysage&lt;/name_singular&gt;&lt;name_plural&gt;Paysage&lt;/name_plural&gt;&lt;/label&gt;&lt;label locale=&quot;it_CH&quot; preferred=&quot;1&quot;&gt;&lt;name_singular&gt;Paesaggio&lt;/name_singular&gt;&lt;name_plural&gt;Paesaggio&lt;/name_plural&gt;&lt;/label&gt;&lt;label locale=&quot;rm_CH&quot; preferred=&quot;1&quot;&gt;&lt;name_singular&gt;Cuntrada&lt;/name_singular&gt;&lt;name_plural&gt;Cuntrada&lt;/name_plural&gt;&lt;/label&gt;&lt;label locale=&quot;en_US&quot; preferred=&quot;1&quot;&gt;&lt;name_singular&gt;Landscape&lt;/name_singular&gt;&lt;name_plural&gt;Landscape&lt;/name_plural&gt;&lt;/label&gt;&lt;/labels&gt;&lt;/item&gt;" calcext:value-type="string">
            <text:p>&lt;item idno="landschaft" enabled="1" default="0" value="0"&gt;&lt;labels&gt;&lt;label locale="de_CH" preferred="1"&gt;&lt;name_singular&gt;Landschaft&lt;/name_singular&gt;&lt;name_plural&gt;Landschaft&lt;/name_plural&gt;&lt;/label&gt;&lt;label locale="fr_CH" preferred="1"&gt;&lt;name_singular&gt;Paysage&lt;/name_singular&gt;&lt;name_plural&gt;Paysage&lt;/name_plural&gt;&lt;/label&gt;&lt;label locale="it_CH" preferred="1"&gt;&lt;name_singular&gt;Paesaggio&lt;/name_singular&gt;&lt;name_plural&gt;Paesaggio&lt;/name_plural&gt;&lt;/label&gt;&lt;label locale="rm_CH" preferred="1"&gt;&lt;name_singular&gt;Cuntrada&lt;/name_singular&gt;&lt;name_plural&gt;Cuntrada&lt;/name_plural&gt;&lt;/label&gt;&lt;label locale="en_US" preferred="1"&gt;&lt;name_singular&gt;Landscape&lt;/name_singular&gt;&lt;name_plural&gt;Landscap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Natur</text:p>
          </table:table-cell>
          <table:table-cell office:value-type="string" calcext:value-type="string">
            <text:p>natur</text:p>
          </table:table-cell>
          <table:table-cell table:formula="of:=[Snippets.$B$17]&amp;[Translations.A10]&amp;[Snippets.$C$17]&amp;[Translations.A10]&amp;[Snippets.$D$17]" office:value-type="string" office:string-value="&lt;label locale=&quot;de_CH&quot; preferred=&quot;1&quot;&gt;&lt;name_singular&gt;Natur&lt;/name_singular&gt;&lt;name_plural&gt;Natur&lt;/name_plural&gt;&lt;/label&gt;" calcext:value-type="string">
            <text:p>&lt;label locale="de_CH" preferred="1"&gt;&lt;name_singular&gt;Natur&lt;/name_singular&gt;&lt;name_plural&gt;Natur&lt;/name_plural&gt;&lt;/label&gt;</text:p>
          </table:table-cell>
          <table:table-cell table:formula="of:=[Snippets.$B$18]&amp;[Translations.B10]&amp;[Snippets.$C$18]&amp;[Translations.B10]&amp;[Snippets.$D$18]" office:value-type="string" office:string-value="&lt;label locale=&quot;fr_CH&quot; preferred=&quot;1&quot;&gt;&lt;name_singular&gt;Nature&lt;/name_singular&gt;&lt;name_plural&gt;Nature&lt;/name_plural&gt;&lt;/label&gt;" calcext:value-type="string">
            <text:p>&lt;label locale="fr_CH" preferred="1"&gt;&lt;name_singular&gt;Nature&lt;/name_singular&gt;&lt;name_plural&gt;Nature&lt;/name_plural&gt;&lt;/label&gt;</text:p>
          </table:table-cell>
          <table:table-cell table:formula="of:=[Snippets.$B$19]&amp;[Translations.C10]&amp;[Snippets.$C$19]&amp;[Translations.C10]&amp;[Snippets.$D$19]" office:value-type="string" office:string-value="&lt;label locale=&quot;it_CH&quot; preferred=&quot;1&quot;&gt;&lt;name_singular&gt;Natura&lt;/name_singular&gt;&lt;name_plural&gt;Natura&lt;/name_plural&gt;&lt;/label&gt;" calcext:value-type="string">
            <text:p>&lt;label locale="it_CH" preferred="1"&gt;&lt;name_singular&gt;Natura&lt;/name_singular&gt;&lt;name_plural&gt;Natura&lt;/name_plural&gt;&lt;/label&gt;</text:p>
          </table:table-cell>
          <table:table-cell table:formula="of:=[Snippets.$B$20]&amp;[Translations.D10]&amp;[Snippets.$C$20]&amp;[Translations.D10]&amp;[Snippets.$D$20]" office:value-type="string" office:string-value="&lt;label locale=&quot;rm_CH&quot; preferred=&quot;1&quot;&gt;&lt;name_singular&gt;Natira&lt;/name_singular&gt;&lt;name_plural&gt;Natira&lt;/name_plural&gt;&lt;/label&gt;" calcext:value-type="string">
            <text:p>&lt;label locale="rm_CH" preferred="1"&gt;&lt;name_singular&gt;Natira&lt;/name_singular&gt;&lt;name_plural&gt;Natira&lt;/name_plural&gt;&lt;/label&gt;</text:p>
          </table:table-cell>
          <table:table-cell table:formula="of:=[Snippets.$B$21]&amp;[Translations.E10]&amp;[Snippets.$C$21]&amp;[Translations.E10]&amp;[Snippets.$D$21]" office:value-type="string" office:string-value="&lt;label locale=&quot;en_US&quot; preferred=&quot;1&quot;&gt;&lt;name_singular&gt;Nature&lt;/name_singular&gt;&lt;name_plural&gt;Nature&lt;/name_plural&gt;&lt;/label&gt;" calcext:value-type="string">
            <text:p>&lt;label locale="en_US" preferred="1"&gt;&lt;name_singular&gt;Nature&lt;/name_singular&gt;&lt;name_plural&gt;Nature&lt;/name_plural&gt;&lt;/label&gt;</text:p>
          </table:table-cell>
          <table:table-cell table:formula="of:=[Snippets.B$15]&amp;[.B10]&amp;[Snippets.C$15]" office:value-type="string" office:string-value="&lt;item idno=&quot;natur&quot; enabled=&quot;1&quot; default=&quot;0&quot; value=&quot;0&quot;&gt;" calcext:value-type="string">
            <text:p>&lt;item idno="natur" enabled="1" default="0" value="0"&gt;</text:p>
          </table:table-cell>
          <table:table-cell table:formula="of:=[.H10]&amp;[Snippets.B$16]&amp;[.C10]&amp;[.D10]&amp;[.E10]&amp;[.F10]&amp;[.G10]&amp;[Snippets.B$22]&amp;[Snippets.B$23]" office:value-type="string" office:string-value="&lt;item idno=&quot;natur&quot; enabled=&quot;1&quot; default=&quot;0&quot; value=&quot;0&quot;&gt;&lt;labels&gt;&lt;label locale=&quot;de_CH&quot; preferred=&quot;1&quot;&gt;&lt;name_singular&gt;Natur&lt;/name_singular&gt;&lt;name_plural&gt;Natur&lt;/name_plural&gt;&lt;/label&gt;&lt;label locale=&quot;fr_CH&quot; preferred=&quot;1&quot;&gt;&lt;name_singular&gt;Nature&lt;/name_singular&gt;&lt;name_plural&gt;Nature&lt;/name_plural&gt;&lt;/label&gt;&lt;label locale=&quot;it_CH&quot; preferred=&quot;1&quot;&gt;&lt;name_singular&gt;Natura&lt;/name_singular&gt;&lt;name_plural&gt;Natura&lt;/name_plural&gt;&lt;/label&gt;&lt;label locale=&quot;rm_CH&quot; preferred=&quot;1&quot;&gt;&lt;name_singular&gt;Natira&lt;/name_singular&gt;&lt;name_plural&gt;Natira&lt;/name_plural&gt;&lt;/label&gt;&lt;label locale=&quot;en_US&quot; preferred=&quot;1&quot;&gt;&lt;name_singular&gt;Nature&lt;/name_singular&gt;&lt;name_plural&gt;Nature&lt;/name_plural&gt;&lt;/label&gt;&lt;/labels&gt;&lt;/item&gt;" calcext:value-type="string">
            <text:p>&lt;item idno="natur" enabled="1" default="0" value="0"&gt;&lt;labels&gt;&lt;label locale="de_CH" preferred="1"&gt;&lt;name_singular&gt;Natur&lt;/name_singular&gt;&lt;name_plural&gt;Natur&lt;/name_plural&gt;&lt;/label&gt;&lt;label locale="fr_CH" preferred="1"&gt;&lt;name_singular&gt;Nature&lt;/name_singular&gt;&lt;name_plural&gt;Nature&lt;/name_plural&gt;&lt;/label&gt;&lt;label locale="it_CH" preferred="1"&gt;&lt;name_singular&gt;Natura&lt;/name_singular&gt;&lt;name_plural&gt;Natura&lt;/name_plural&gt;&lt;/label&gt;&lt;label locale="rm_CH" preferred="1"&gt;&lt;name_singular&gt;Natira&lt;/name_singular&gt;&lt;name_plural&gt;Natira&lt;/name_plural&gt;&lt;/label&gt;&lt;label locale="en_US" preferred="1"&gt;&lt;name_singular&gt;Nature&lt;/name_singular&gt;&lt;name_plural&gt;Natur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Bergfotografie</text:p>
          </table:table-cell>
          <table:table-cell office:value-type="string" calcext:value-type="string">
            <text:p>bergfotografie</text:p>
          </table:table-cell>
          <table:table-cell table:formula="of:=[Snippets.$B$17]&amp;[Translations.A11]&amp;[Snippets.$C$17]&amp;[Translations.A11]&amp;[Snippets.$D$17]" office:value-type="string" office:string-value="&lt;label locale=&quot;de_CH&quot; preferred=&quot;1&quot;&gt;&lt;name_singular&gt;Bergfotografie&lt;/name_singular&gt;&lt;name_plural&gt;Bergfotografie&lt;/name_plural&gt;&lt;/label&gt;" calcext:value-type="string">
            <text:p>&lt;label locale="de_CH" preferred="1"&gt;&lt;name_singular&gt;Bergfotografie&lt;/name_singular&gt;&lt;name_plural&gt;Bergfotografie&lt;/name_plural&gt;&lt;/label&gt;</text:p>
          </table:table-cell>
          <table:table-cell table:formula="of:=[Snippets.$B$18]&amp;[Translations.B11]&amp;[Snippets.$C$18]&amp;[Translations.B11]&amp;[Snippets.$D$18]" office:value-type="string" office:string-value="&lt;label locale=&quot;fr_CH&quot; preferred=&quot;1&quot;&gt;&lt;name_singular&gt;Photographie de montagne&lt;/name_singular&gt;&lt;name_plural&gt;Photographie de montagne&lt;/name_plural&gt;&lt;/label&gt;" calcext:value-type="string">
            <text:p>&lt;label locale="fr_CH" preferred="1"&gt;&lt;name_singular&gt;Photographie de montagne&lt;/name_singular&gt;&lt;name_plural&gt;Photographie de montagne&lt;/name_plural&gt;&lt;/label&gt;</text:p>
          </table:table-cell>
          <table:table-cell table:formula="of:=[Snippets.$B$19]&amp;[Translations.C11]&amp;[Snippets.$C$19]&amp;[Translations.C11]&amp;[Snippets.$D$19]" office:value-type="string" office:string-value="&lt;label locale=&quot;it_CH&quot; preferred=&quot;1&quot;&gt;&lt;name_singular&gt;Fotografia di montagna&lt;/name_singular&gt;&lt;name_plural&gt;Fotografia di montagna&lt;/name_plural&gt;&lt;/label&gt;" calcext:value-type="string">
            <text:p>&lt;label locale="it_CH" preferred="1"&gt;&lt;name_singular&gt;Fotografia di montagna&lt;/name_singular&gt;&lt;name_plural&gt;Fotografia di montagna&lt;/name_plural&gt;&lt;/label&gt;</text:p>
          </table:table-cell>
          <table:table-cell table:formula="of:=[Snippets.$B$20]&amp;[Translations.D11]&amp;[Snippets.$C$20]&amp;[Translations.D11]&amp;[Snippets.$D$20]" office:value-type="string" office:string-value="&lt;label locale=&quot;rm_CH&quot; preferred=&quot;1&quot;&gt;&lt;name_singular&gt;Fotografia da muntogna&lt;/name_singular&gt;&lt;name_plural&gt;Fotografia da muntogna&lt;/name_plural&gt;&lt;/label&gt;" calcext:value-type="string">
            <text:p>&lt;label locale="rm_CH" preferred="1"&gt;&lt;name_singular&gt;Fotografia da muntogna&lt;/name_singular&gt;&lt;name_plural&gt;Fotografia da muntogna&lt;/name_plural&gt;&lt;/label&gt;</text:p>
          </table:table-cell>
          <table:table-cell table:formula="of:=[Snippets.$B$21]&amp;[Translations.E11]&amp;[Snippets.$C$21]&amp;[Translations.E11]&amp;[Snippets.$D$21]" office:value-type="string" office:string-value="&lt;label locale=&quot;en_US&quot; preferred=&quot;1&quot;&gt;&lt;name_singular&gt;Alpine photography&lt;/name_singular&gt;&lt;name_plural&gt;Alpine photography&lt;/name_plural&gt;&lt;/label&gt;" calcext:value-type="string">
            <text:p>&lt;label locale="en_US" preferred="1"&gt;&lt;name_singular&gt;Alpine photography&lt;/name_singular&gt;&lt;name_plural&gt;Alpine photography&lt;/name_plural&gt;&lt;/label&gt;</text:p>
          </table:table-cell>
          <table:table-cell table:formula="of:=[Snippets.B$15]&amp;[.B11]&amp;[Snippets.C$15]" office:value-type="string" office:string-value="&lt;item idno=&quot;bergfotografie&quot; enabled=&quot;1&quot; default=&quot;0&quot; value=&quot;0&quot;&gt;" calcext:value-type="string">
            <text:p>&lt;item idno="bergfotografie" enabled="1" default="0" value="0"&gt;</text:p>
          </table:table-cell>
          <table:table-cell table:formula="of:=[.H11]&amp;[Snippets.B$16]&amp;[.C11]&amp;[.D11]&amp;[.E11]&amp;[.F11]&amp;[.G11]&amp;[Snippets.B$22]&amp;[Snippets.B$23]" office:value-type="string" office:string-value="&lt;item idno=&quot;bergfotografie&quot; enabled=&quot;1&quot; default=&quot;0&quot; value=&quot;0&quot;&gt;&lt;labels&gt;&lt;label locale=&quot;de_CH&quot; preferred=&quot;1&quot;&gt;&lt;name_singular&gt;Bergfotografie&lt;/name_singular&gt;&lt;name_plural&gt;Bergfotografie&lt;/name_plural&gt;&lt;/label&gt;&lt;label locale=&quot;fr_CH&quot; preferred=&quot;1&quot;&gt;&lt;name_singular&gt;Photographie de montagne&lt;/name_singular&gt;&lt;name_plural&gt;Photographie de montagne&lt;/name_plural&gt;&lt;/label&gt;&lt;label locale=&quot;it_CH&quot; preferred=&quot;1&quot;&gt;&lt;name_singular&gt;Fotografia di montagna&lt;/name_singular&gt;&lt;name_plural&gt;Fotografia di montagna&lt;/name_plural&gt;&lt;/label&gt;&lt;label locale=&quot;rm_CH&quot; preferred=&quot;1&quot;&gt;&lt;name_singular&gt;Fotografia da muntogna&lt;/name_singular&gt;&lt;name_plural&gt;Fotografia da muntogna&lt;/name_plural&gt;&lt;/label&gt;&lt;label locale=&quot;en_US&quot; preferred=&quot;1&quot;&gt;&lt;name_singular&gt;Alpine photography&lt;/name_singular&gt;&lt;name_plural&gt;Alpine photography&lt;/name_plural&gt;&lt;/label&gt;&lt;/labels&gt;&lt;/item&gt;" calcext:value-type="string">
            <text:p>&lt;item idno="bergfotografie" enabled="1" default="0" value="0"&gt;&lt;labels&gt;&lt;label locale="de_CH" preferred="1"&gt;&lt;name_singular&gt;Bergfotografie&lt;/name_singular&gt;&lt;name_plural&gt;Bergfotografie&lt;/name_plural&gt;&lt;/label&gt;&lt;label locale="fr_CH" preferred="1"&gt;&lt;name_singular&gt;Photographie de montagne&lt;/name_singular&gt;&lt;name_plural&gt;Photographie de montagne&lt;/name_plural&gt;&lt;/label&gt;&lt;label locale="it_CH" preferred="1"&gt;&lt;name_singular&gt;Fotografia di montagna&lt;/name_singular&gt;&lt;name_plural&gt;Fotografia di montagna&lt;/name_plural&gt;&lt;/label&gt;&lt;label locale="rm_CH" preferred="1"&gt;&lt;name_singular&gt;Fotografia da muntogna&lt;/name_singular&gt;&lt;name_plural&gt;Fotografia da muntogna&lt;/name_plural&gt;&lt;/label&gt;&lt;label locale="en_US" preferred="1"&gt;&lt;name_singular&gt;Alpine photography&lt;/name_singular&gt;&lt;name_plural&gt;Alpine photography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Flugaufnahme</text:p>
          </table:table-cell>
          <table:table-cell office:value-type="string" calcext:value-type="string">
            <text:p>flugaufnahme</text:p>
          </table:table-cell>
          <table:table-cell table:formula="of:=[Snippets.$B$17]&amp;[Translations.A12]&amp;[Snippets.$C$17]&amp;[Translations.A12]&amp;[Snippets.$D$17]" office:value-type="string" office:string-value="&lt;label locale=&quot;de_CH&quot; preferred=&quot;1&quot;&gt;&lt;name_singular&gt;Flugaufnahme&lt;/name_singular&gt;&lt;name_plural&gt;Flugaufnahme&lt;/name_plural&gt;&lt;/label&gt;" calcext:value-type="string">
            <text:p>&lt;label locale="de_CH" preferred="1"&gt;&lt;name_singular&gt;Flugaufnahme&lt;/name_singular&gt;&lt;name_plural&gt;Flugaufnahme&lt;/name_plural&gt;&lt;/label&gt;</text:p>
          </table:table-cell>
          <table:table-cell table:formula="of:=[Snippets.$B$18]&amp;[Translations.B12]&amp;[Snippets.$C$18]&amp;[Translations.B12]&amp;[Snippets.$D$18]" office:value-type="string" office:string-value="&lt;label locale=&quot;fr_CH&quot; preferred=&quot;1&quot;&gt;&lt;name_singular&gt;Photographie aérienne&lt;/name_singular&gt;&lt;name_plural&gt;Photographie aérienne&lt;/name_plural&gt;&lt;/label&gt;" calcext:value-type="string">
            <text:p>&lt;label locale="fr_CH" preferred="1"&gt;&lt;name_singular&gt;Photographie aérienne&lt;/name_singular&gt;&lt;name_plural&gt;Photographie aérienne&lt;/name_plural&gt;&lt;/label&gt;</text:p>
          </table:table-cell>
          <table:table-cell table:formula="of:=[Snippets.$B$19]&amp;[Translations.C12]&amp;[Snippets.$C$19]&amp;[Translations.C12]&amp;[Snippets.$D$19]" office:value-type="string" office:string-value="&lt;label locale=&quot;it_CH&quot; preferred=&quot;1&quot;&gt;&lt;name_singular&gt;Fotografia aerea&lt;/name_singular&gt;&lt;name_plural&gt;Fotografia aerea&lt;/name_plural&gt;&lt;/label&gt;" calcext:value-type="string">
            <text:p>&lt;label locale="it_CH" preferred="1"&gt;&lt;name_singular&gt;Fotografia aerea&lt;/name_singular&gt;&lt;name_plural&gt;Fotografia aerea&lt;/name_plural&gt;&lt;/label&gt;</text:p>
          </table:table-cell>
          <table:table-cell table:formula="of:=[Snippets.$B$20]&amp;[Translations.D12]&amp;[Snippets.$C$20]&amp;[Translations.D12]&amp;[Snippets.$D$20]" office:value-type="string" office:string-value="&lt;label locale=&quot;rm_CH&quot; preferred=&quot;1&quot;&gt;&lt;name_singular&gt;Fotografia or da l'aria&lt;/name_singular&gt;&lt;name_plural&gt;Fotografia or da l'aria&lt;/name_plural&gt;&lt;/label&gt;" calcext:value-type="string">
            <text:p>&lt;label locale="rm_CH" preferred="1"&gt;&lt;name_singular&gt;Fotografia or da l'aria&lt;/name_singular&gt;&lt;name_plural&gt;Fotografia or da l'aria&lt;/name_plural&gt;&lt;/label&gt;</text:p>
          </table:table-cell>
          <table:table-cell table:formula="of:=[Snippets.$B$21]&amp;[Translations.E12]&amp;[Snippets.$C$21]&amp;[Translations.E12]&amp;[Snippets.$D$21]" office:value-type="string" office:string-value="&lt;label locale=&quot;en_US&quot; preferred=&quot;1&quot;&gt;&lt;name_singular&gt;Aerial photography&lt;/name_singular&gt;&lt;name_plural&gt;Aerial photography&lt;/name_plural&gt;&lt;/label&gt;" calcext:value-type="string">
            <text:p>&lt;label locale="en_US" preferred="1"&gt;&lt;name_singular&gt;Aerial photography&lt;/name_singular&gt;&lt;name_plural&gt;Aerial photography&lt;/name_plural&gt;&lt;/label&gt;</text:p>
          </table:table-cell>
          <table:table-cell table:formula="of:=[Snippets.B$15]&amp;[.B12]&amp;[Snippets.C$15]" office:value-type="string" office:string-value="&lt;item idno=&quot;flugaufnahme&quot; enabled=&quot;1&quot; default=&quot;0&quot; value=&quot;0&quot;&gt;" calcext:value-type="string">
            <text:p>&lt;item idno="flugaufnahme" enabled="1" default="0" value="0"&gt;</text:p>
          </table:table-cell>
          <table:table-cell table:formula="of:=[.H12]&amp;[Snippets.B$16]&amp;[.C12]&amp;[.D12]&amp;[.E12]&amp;[.F12]&amp;[.G12]&amp;[Snippets.B$22]&amp;[Snippets.B$23]" office:value-type="string" office:string-value="&lt;item idno=&quot;flugaufnahme&quot; enabled=&quot;1&quot; default=&quot;0&quot; value=&quot;0&quot;&gt;&lt;labels&gt;&lt;label locale=&quot;de_CH&quot; preferred=&quot;1&quot;&gt;&lt;name_singular&gt;Flugaufnahme&lt;/name_singular&gt;&lt;name_plural&gt;Flugaufnahme&lt;/name_plural&gt;&lt;/label&gt;&lt;label locale=&quot;fr_CH&quot; preferred=&quot;1&quot;&gt;&lt;name_singular&gt;Photographie aérienne&lt;/name_singular&gt;&lt;name_plural&gt;Photographie aérienne&lt;/name_plural&gt;&lt;/label&gt;&lt;label locale=&quot;it_CH&quot; preferred=&quot;1&quot;&gt;&lt;name_singular&gt;Fotografia aerea&lt;/name_singular&gt;&lt;name_plural&gt;Fotografia aerea&lt;/name_plural&gt;&lt;/label&gt;&lt;label locale=&quot;rm_CH&quot; preferred=&quot;1&quot;&gt;&lt;name_singular&gt;Fotografia or da l'aria&lt;/name_singular&gt;&lt;name_plural&gt;Fotografia or da l'aria&lt;/name_plural&gt;&lt;/label&gt;&lt;label locale=&quot;en_US&quot; preferred=&quot;1&quot;&gt;&lt;name_singular&gt;Aerial photography&lt;/name_singular&gt;&lt;name_plural&gt;Aerial photography&lt;/name_plural&gt;&lt;/label&gt;&lt;/labels&gt;&lt;/item&gt;" calcext:value-type="string">
            <text:p>&lt;item idno="flugaufnahme" enabled="1" default="0" value="0"&gt;&lt;labels&gt;&lt;label locale="de_CH" preferred="1"&gt;&lt;name_singular&gt;Flugaufnahme&lt;/name_singular&gt;&lt;name_plural&gt;Flugaufnahme&lt;/name_plural&gt;&lt;/label&gt;&lt;label locale="fr_CH" preferred="1"&gt;&lt;name_singular&gt;Photographie aérienne&lt;/name_singular&gt;&lt;name_plural&gt;Photographie aérienne&lt;/name_plural&gt;&lt;/label&gt;&lt;label locale="it_CH" preferred="1"&gt;&lt;name_singular&gt;Fotografia aerea&lt;/name_singular&gt;&lt;name_plural&gt;Fotografia aerea&lt;/name_plural&gt;&lt;/label&gt;&lt;label locale="rm_CH" preferred="1"&gt;&lt;name_singular&gt;Fotografia or da l'aria&lt;/name_singular&gt;&lt;name_plural&gt;Fotografia or da l'aria&lt;/name_plural&gt;&lt;/label&gt;&lt;label locale="en_US" preferred="1"&gt;&lt;name_singular&gt;Aerial photography&lt;/name_singular&gt;&lt;name_plural&gt;Aerial photography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Gewerbe</text:p>
          </table:table-cell>
          <table:table-cell office:value-type="string" calcext:value-type="string">
            <text:p>gewerbe</text:p>
          </table:table-cell>
          <table:table-cell table:formula="of:=[Snippets.$B$17]&amp;[Translations.A13]&amp;[Snippets.$C$17]&amp;[Translations.A13]&amp;[Snippets.$D$17]" office:value-type="string" office:string-value="&lt;label locale=&quot;de_CH&quot; preferred=&quot;1&quot;&gt;&lt;name_singular&gt;Gewerbe&lt;/name_singular&gt;&lt;name_plural&gt;Gewerbe&lt;/name_plural&gt;&lt;/label&gt;" calcext:value-type="string">
            <text:p>&lt;label locale="de_CH" preferred="1"&gt;&lt;name_singular&gt;Gewerbe&lt;/name_singular&gt;&lt;name_plural&gt;Gewerbe&lt;/name_plural&gt;&lt;/label&gt;</text:p>
          </table:table-cell>
          <table:table-cell table:formula="of:=[Snippets.$B$18]&amp;[Translations.B13]&amp;[Snippets.$C$18]&amp;[Translations.B13]&amp;[Snippets.$D$18]" office:value-type="string" office:string-value="&lt;label locale=&quot;fr_CH&quot; preferred=&quot;1&quot;&gt;&lt;name_singular&gt;Métier&lt;/name_singular&gt;&lt;name_plural&gt;Métier&lt;/name_plural&gt;&lt;/label&gt;" calcext:value-type="string">
            <text:p>&lt;label locale="fr_CH" preferred="1"&gt;&lt;name_singular&gt;Métier&lt;/name_singular&gt;&lt;name_plural&gt;Métier&lt;/name_plural&gt;&lt;/label&gt;</text:p>
          </table:table-cell>
          <table:table-cell table:formula="of:=[Snippets.$B$19]&amp;[Translations.C13]&amp;[Snippets.$C$19]&amp;[Translations.C13]&amp;[Snippets.$D$19]" office:value-type="string" office:string-value="&lt;label locale=&quot;it_CH&quot; preferred=&quot;1&quot;&gt;&lt;name_singular&gt;Arti e mestieri&lt;/name_singular&gt;&lt;name_plural&gt;Arti e mestieri&lt;/name_plural&gt;&lt;/label&gt;" calcext:value-type="string">
            <text:p>&lt;label locale="it_CH" preferred="1"&gt;&lt;name_singular&gt;Arti e mestieri&lt;/name_singular&gt;&lt;name_plural&gt;Arti e mestieri&lt;/name_plural&gt;&lt;/label&gt;</text:p>
          </table:table-cell>
          <table:table-cell table:formula="of:=[Snippets.$B$20]&amp;[Translations.D13]&amp;[Snippets.$C$20]&amp;[Translations.D13]&amp;[Snippets.$D$20]" office:value-type="string" office:string-value="&lt;label locale=&quot;rm_CH&quot; preferred=&quot;1&quot;&gt;&lt;name_singular&gt;Commerzi&lt;/name_singular&gt;&lt;name_plural&gt;Commerzi&lt;/name_plural&gt;&lt;/label&gt;" calcext:value-type="string">
            <text:p>&lt;label locale="rm_CH" preferred="1"&gt;&lt;name_singular&gt;Commerzi&lt;/name_singular&gt;&lt;name_plural&gt;Commerzi&lt;/name_plural&gt;&lt;/label&gt;</text:p>
          </table:table-cell>
          <table:table-cell table:formula="of:=[Snippets.$B$21]&amp;[Translations.E13]&amp;[Snippets.$C$21]&amp;[Translations.E13]&amp;[Snippets.$D$21]" office:value-type="string" office:string-value="&lt;label locale=&quot;en_US&quot; preferred=&quot;1&quot;&gt;&lt;name_singular&gt;Commercial photography&lt;/name_singular&gt;&lt;name_plural&gt;Commercial photography&lt;/name_plural&gt;&lt;/label&gt;" calcext:value-type="string">
            <text:p>&lt;label locale="en_US" preferred="1"&gt;&lt;name_singular&gt;Commercial photography&lt;/name_singular&gt;&lt;name_plural&gt;Commercial photography&lt;/name_plural&gt;&lt;/label&gt;</text:p>
          </table:table-cell>
          <table:table-cell table:formula="of:=[Snippets.B$15]&amp;[.B13]&amp;[Snippets.C$15]" office:value-type="string" office:string-value="&lt;item idno=&quot;gewerbe&quot; enabled=&quot;1&quot; default=&quot;0&quot; value=&quot;0&quot;&gt;" calcext:value-type="string">
            <text:p>&lt;item idno="gewerbe" enabled="1" default="0" value="0"&gt;</text:p>
          </table:table-cell>
          <table:table-cell table:formula="of:=[.H13]&amp;[Snippets.B$16]&amp;[.C13]&amp;[.D13]&amp;[.E13]&amp;[.F13]&amp;[.G13]&amp;[Snippets.B$22]&amp;[Snippets.B$23]" office:value-type="string" office:string-value="&lt;item idno=&quot;gewerbe&quot; enabled=&quot;1&quot; default=&quot;0&quot; value=&quot;0&quot;&gt;&lt;labels&gt;&lt;label locale=&quot;de_CH&quot; preferred=&quot;1&quot;&gt;&lt;name_singular&gt;Gewerbe&lt;/name_singular&gt;&lt;name_plural&gt;Gewerbe&lt;/name_plural&gt;&lt;/label&gt;&lt;label locale=&quot;fr_CH&quot; preferred=&quot;1&quot;&gt;&lt;name_singular&gt;Métier&lt;/name_singular&gt;&lt;name_plural&gt;Métier&lt;/name_plural&gt;&lt;/label&gt;&lt;label locale=&quot;it_CH&quot; preferred=&quot;1&quot;&gt;&lt;name_singular&gt;Arti e mestieri&lt;/name_singular&gt;&lt;name_plural&gt;Arti e mestieri&lt;/name_plural&gt;&lt;/label&gt;&lt;label locale=&quot;rm_CH&quot; preferred=&quot;1&quot;&gt;&lt;name_singular&gt;Commerzi&lt;/name_singular&gt;&lt;name_plural&gt;Commerzi&lt;/name_plural&gt;&lt;/label&gt;&lt;label locale=&quot;en_US&quot; preferred=&quot;1&quot;&gt;&lt;name_singular&gt;Commercial photography&lt;/name_singular&gt;&lt;name_plural&gt;Commercial photography&lt;/name_plural&gt;&lt;/label&gt;&lt;/labels&gt;&lt;/item&gt;" calcext:value-type="string">
            <text:p>&lt;item idno="gewerbe" enabled="1" default="0" value="0"&gt;&lt;labels&gt;&lt;label locale="de_CH" preferred="1"&gt;&lt;name_singular&gt;Gewerbe&lt;/name_singular&gt;&lt;name_plural&gt;Gewerbe&lt;/name_plural&gt;&lt;/label&gt;&lt;label locale="fr_CH" preferred="1"&gt;&lt;name_singular&gt;Métier&lt;/name_singular&gt;&lt;name_plural&gt;Métier&lt;/name_plural&gt;&lt;/label&gt;&lt;label locale="it_CH" preferred="1"&gt;&lt;name_singular&gt;Arti e mestieri&lt;/name_singular&gt;&lt;name_plural&gt;Arti e mestieri&lt;/name_plural&gt;&lt;/label&gt;&lt;label locale="rm_CH" preferred="1"&gt;&lt;name_singular&gt;Commerzi&lt;/name_singular&gt;&lt;name_plural&gt;Commerzi&lt;/name_plural&gt;&lt;/label&gt;&lt;label locale="en_US" preferred="1"&gt;&lt;name_singular&gt;Commercial photography&lt;/name_singular&gt;&lt;name_plural&gt;Commercial photography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Industrie</text:p>
          </table:table-cell>
          <table:table-cell office:value-type="string" calcext:value-type="string">
            <text:p>industrie</text:p>
          </table:table-cell>
          <table:table-cell table:formula="of:=[Snippets.$B$17]&amp;[Translations.A14]&amp;[Snippets.$C$17]&amp;[Translations.A14]&amp;[Snippets.$D$17]" office:value-type="string" office:string-value="&lt;label locale=&quot;de_CH&quot; preferred=&quot;1&quot;&gt;&lt;name_singular&gt;Industrie&lt;/name_singular&gt;&lt;name_plural&gt;Industrie&lt;/name_plural&gt;&lt;/label&gt;" calcext:value-type="string">
            <text:p>&lt;label locale="de_CH" preferred="1"&gt;&lt;name_singular&gt;Industrie&lt;/name_singular&gt;&lt;name_plural&gt;Industrie&lt;/name_plural&gt;&lt;/label&gt;</text:p>
          </table:table-cell>
          <table:table-cell table:formula="of:=[Snippets.$B$18]&amp;[Translations.B14]&amp;[Snippets.$C$18]&amp;[Translations.B14]&amp;[Snippets.$D$18]" office:value-type="string" office:string-value="&lt;label locale=&quot;fr_CH&quot; preferred=&quot;1&quot;&gt;&lt;name_singular&gt;Industrie&lt;/name_singular&gt;&lt;name_plural&gt;Industrie&lt;/name_plural&gt;&lt;/label&gt;" calcext:value-type="string">
            <text:p>&lt;label locale="fr_CH" preferred="1"&gt;&lt;name_singular&gt;Industrie&lt;/name_singular&gt;&lt;name_plural&gt;Industrie&lt;/name_plural&gt;&lt;/label&gt;</text:p>
          </table:table-cell>
          <table:table-cell table:formula="of:=[Snippets.$B$19]&amp;[Translations.C14]&amp;[Snippets.$C$19]&amp;[Translations.C14]&amp;[Snippets.$D$19]" office:value-type="string" office:string-value="&lt;label locale=&quot;it_CH&quot; preferred=&quot;1&quot;&gt;&lt;name_singular&gt;Industria&lt;/name_singular&gt;&lt;name_plural&gt;Industria&lt;/name_plural&gt;&lt;/label&gt;" calcext:value-type="string">
            <text:p>&lt;label locale="it_CH" preferred="1"&gt;&lt;name_singular&gt;Industria&lt;/name_singular&gt;&lt;name_plural&gt;Industria&lt;/name_plural&gt;&lt;/label&gt;</text:p>
          </table:table-cell>
          <table:table-cell table:formula="of:=[Snippets.$B$20]&amp;[Translations.D14]&amp;[Snippets.$C$20]&amp;[Translations.D14]&amp;[Snippets.$D$20]" office:value-type="string" office:string-value="&lt;label locale=&quot;rm_CH&quot; preferred=&quot;1&quot;&gt;&lt;name_singular&gt;Industria&lt;/name_singular&gt;&lt;name_plural&gt;Industria&lt;/name_plural&gt;&lt;/label&gt;" calcext:value-type="string">
            <text:p>&lt;label locale="rm_CH" preferred="1"&gt;&lt;name_singular&gt;Industria&lt;/name_singular&gt;&lt;name_plural&gt;Industria&lt;/name_plural&gt;&lt;/label&gt;</text:p>
          </table:table-cell>
          <table:table-cell table:formula="of:=[Snippets.$B$21]&amp;[Translations.E14]&amp;[Snippets.$C$21]&amp;[Translations.E14]&amp;[Snippets.$D$21]" office:value-type="string" office:string-value="&lt;label locale=&quot;en_US&quot; preferred=&quot;1&quot;&gt;&lt;name_singular&gt;Industrial photography&lt;/name_singular&gt;&lt;name_plural&gt;Industrial photography&lt;/name_plural&gt;&lt;/label&gt;" calcext:value-type="string">
            <text:p>&lt;label locale="en_US" preferred="1"&gt;&lt;name_singular&gt;Industrial photography&lt;/name_singular&gt;&lt;name_plural&gt;Industrial photography&lt;/name_plural&gt;&lt;/label&gt;</text:p>
          </table:table-cell>
          <table:table-cell table:formula="of:=[Snippets.B$15]&amp;[.B14]&amp;[Snippets.C$15]" office:value-type="string" office:string-value="&lt;item idno=&quot;industrie&quot; enabled=&quot;1&quot; default=&quot;0&quot; value=&quot;0&quot;&gt;" calcext:value-type="string">
            <text:p>&lt;item idno="industrie" enabled="1" default="0" value="0"&gt;</text:p>
          </table:table-cell>
          <table:table-cell table:formula="of:=[.H14]&amp;[Snippets.B$16]&amp;[.C14]&amp;[.D14]&amp;[.E14]&amp;[.F14]&amp;[.G14]&amp;[Snippets.B$22]&amp;[Snippets.B$23]" office:value-type="string" office:string-value="&lt;item idno=&quot;industrie&quot; enabled=&quot;1&quot; default=&quot;0&quot; value=&quot;0&quot;&gt;&lt;labels&gt;&lt;label locale=&quot;de_CH&quot; preferred=&quot;1&quot;&gt;&lt;name_singular&gt;Industrie&lt;/name_singular&gt;&lt;name_plural&gt;Industrie&lt;/name_plural&gt;&lt;/label&gt;&lt;label locale=&quot;fr_CH&quot; preferred=&quot;1&quot;&gt;&lt;name_singular&gt;Industrie&lt;/name_singular&gt;&lt;name_plural&gt;Industrie&lt;/name_plural&gt;&lt;/label&gt;&lt;label locale=&quot;it_CH&quot; preferred=&quot;1&quot;&gt;&lt;name_singular&gt;Industria&lt;/name_singular&gt;&lt;name_plural&gt;Industria&lt;/name_plural&gt;&lt;/label&gt;&lt;label locale=&quot;rm_CH&quot; preferred=&quot;1&quot;&gt;&lt;name_singular&gt;Industria&lt;/name_singular&gt;&lt;name_plural&gt;Industria&lt;/name_plural&gt;&lt;/label&gt;&lt;label locale=&quot;en_US&quot; preferred=&quot;1&quot;&gt;&lt;name_singular&gt;Industrial photography&lt;/name_singular&gt;&lt;name_plural&gt;Industrial photography&lt;/name_plural&gt;&lt;/label&gt;&lt;/labels&gt;&lt;/item&gt;" calcext:value-type="string">
            <text:p>&lt;item idno="industrie" enabled="1" default="0" value="0"&gt;&lt;labels&gt;&lt;label locale="de_CH" preferred="1"&gt;&lt;name_singular&gt;Industrie&lt;/name_singular&gt;&lt;name_plural&gt;Industrie&lt;/name_plural&gt;&lt;/label&gt;&lt;label locale="fr_CH" preferred="1"&gt;&lt;name_singular&gt;Industrie&lt;/name_singular&gt;&lt;name_plural&gt;Industrie&lt;/name_plural&gt;&lt;/label&gt;&lt;label locale="it_CH" preferred="1"&gt;&lt;name_singular&gt;Industria&lt;/name_singular&gt;&lt;name_plural&gt;Industria&lt;/name_plural&gt;&lt;/label&gt;&lt;label locale="rm_CH" preferred="1"&gt;&lt;name_singular&gt;Industria&lt;/name_singular&gt;&lt;name_plural&gt;Industria&lt;/name_plural&gt;&lt;/label&gt;&lt;label locale="en_US" preferred="1"&gt;&lt;name_singular&gt;Industrial photography&lt;/name_singular&gt;&lt;name_plural&gt;Industrial photography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Tourismus</text:p>
          </table:table-cell>
          <table:table-cell office:value-type="string" calcext:value-type="string">
            <text:p>tourismus</text:p>
          </table:table-cell>
          <table:table-cell table:formula="of:=[Snippets.$B$17]&amp;[Translations.A15]&amp;[Snippets.$C$17]&amp;[Translations.A15]&amp;[Snippets.$D$17]" office:value-type="string" office:string-value="&lt;label locale=&quot;de_CH&quot; preferred=&quot;1&quot;&gt;&lt;name_singular&gt;Tourismus&lt;/name_singular&gt;&lt;name_plural&gt;Tourismus&lt;/name_plural&gt;&lt;/label&gt;" calcext:value-type="string">
            <text:p>&lt;label locale="de_CH" preferred="1"&gt;&lt;name_singular&gt;Tourismus&lt;/name_singular&gt;&lt;name_plural&gt;Tourismus&lt;/name_plural&gt;&lt;/label&gt;</text:p>
          </table:table-cell>
          <table:table-cell table:formula="of:=[Snippets.$B$18]&amp;[Translations.B15]&amp;[Snippets.$C$18]&amp;[Translations.B15]&amp;[Snippets.$D$18]" office:value-type="string" office:string-value="&lt;label locale=&quot;fr_CH&quot; preferred=&quot;1&quot;&gt;&lt;name_singular&gt;Tourisme&lt;/name_singular&gt;&lt;name_plural&gt;Tourisme&lt;/name_plural&gt;&lt;/label&gt;" calcext:value-type="string">
            <text:p>&lt;label locale="fr_CH" preferred="1"&gt;&lt;name_singular&gt;Tourisme&lt;/name_singular&gt;&lt;name_plural&gt;Tourisme&lt;/name_plural&gt;&lt;/label&gt;</text:p>
          </table:table-cell>
          <table:table-cell table:formula="of:=[Snippets.$B$19]&amp;[Translations.C15]&amp;[Snippets.$C$19]&amp;[Translations.C15]&amp;[Snippets.$D$19]" office:value-type="string" office:string-value="&lt;label locale=&quot;it_CH&quot; preferred=&quot;1&quot;&gt;&lt;name_singular&gt;Turismo&lt;/name_singular&gt;&lt;name_plural&gt;Turismo&lt;/name_plural&gt;&lt;/label&gt;" calcext:value-type="string">
            <text:p>&lt;label locale="it_CH" preferred="1"&gt;&lt;name_singular&gt;Turismo&lt;/name_singular&gt;&lt;name_plural&gt;Turismo&lt;/name_plural&gt;&lt;/label&gt;</text:p>
          </table:table-cell>
          <table:table-cell table:formula="of:=[Snippets.$B$20]&amp;[Translations.D15]&amp;[Snippets.$C$20]&amp;[Translations.D15]&amp;[Snippets.$D$20]" office:value-type="string" office:string-value="&lt;label locale=&quot;rm_CH&quot; preferred=&quot;1&quot;&gt;&lt;name_singular&gt;Turissem&lt;/name_singular&gt;&lt;name_plural&gt;Turissem&lt;/name_plural&gt;&lt;/label&gt;" calcext:value-type="string">
            <text:p>&lt;label locale="rm_CH" preferred="1"&gt;&lt;name_singular&gt;Turissem&lt;/name_singular&gt;&lt;name_plural&gt;Turissem&lt;/name_plural&gt;&lt;/label&gt;</text:p>
          </table:table-cell>
          <table:table-cell table:formula="of:=[Snippets.$B$21]&amp;[Translations.E15]&amp;[Snippets.$C$21]&amp;[Translations.E15]&amp;[Snippets.$D$21]" office:value-type="string" office:string-value="&lt;label locale=&quot;en_US&quot; preferred=&quot;1&quot;&gt;&lt;name_singular&gt;Tourism&lt;/name_singular&gt;&lt;name_plural&gt;Tourism&lt;/name_plural&gt;&lt;/label&gt;" calcext:value-type="string">
            <text:p>&lt;label locale="en_US" preferred="1"&gt;&lt;name_singular&gt;Tourism&lt;/name_singular&gt;&lt;name_plural&gt;Tourism&lt;/name_plural&gt;&lt;/label&gt;</text:p>
          </table:table-cell>
          <table:table-cell table:formula="of:=[Snippets.B$15]&amp;[.B15]&amp;[Snippets.C$15]" office:value-type="string" office:string-value="&lt;item idno=&quot;tourismus&quot; enabled=&quot;1&quot; default=&quot;0&quot; value=&quot;0&quot;&gt;" calcext:value-type="string">
            <text:p>&lt;item idno="tourismus" enabled="1" default="0" value="0"&gt;</text:p>
          </table:table-cell>
          <table:table-cell table:formula="of:=[.H15]&amp;[Snippets.B$16]&amp;[.C15]&amp;[.D15]&amp;[.E15]&amp;[.F15]&amp;[.G15]&amp;[Snippets.B$22]&amp;[Snippets.B$23]" office:value-type="string" office:string-value="&lt;item idno=&quot;tourismus&quot; enabled=&quot;1&quot; default=&quot;0&quot; value=&quot;0&quot;&gt;&lt;labels&gt;&lt;label locale=&quot;de_CH&quot; preferred=&quot;1&quot;&gt;&lt;name_singular&gt;Tourismus&lt;/name_singular&gt;&lt;name_plural&gt;Tourismus&lt;/name_plural&gt;&lt;/label&gt;&lt;label locale=&quot;fr_CH&quot; preferred=&quot;1&quot;&gt;&lt;name_singular&gt;Tourisme&lt;/name_singular&gt;&lt;name_plural&gt;Tourisme&lt;/name_plural&gt;&lt;/label&gt;&lt;label locale=&quot;it_CH&quot; preferred=&quot;1&quot;&gt;&lt;name_singular&gt;Turismo&lt;/name_singular&gt;&lt;name_plural&gt;Turismo&lt;/name_plural&gt;&lt;/label&gt;&lt;label locale=&quot;rm_CH&quot; preferred=&quot;1&quot;&gt;&lt;name_singular&gt;Turissem&lt;/name_singular&gt;&lt;name_plural&gt;Turissem&lt;/name_plural&gt;&lt;/label&gt;&lt;label locale=&quot;en_US&quot; preferred=&quot;1&quot;&gt;&lt;name_singular&gt;Tourism&lt;/name_singular&gt;&lt;name_plural&gt;Tourism&lt;/name_plural&gt;&lt;/label&gt;&lt;/labels&gt;&lt;/item&gt;" calcext:value-type="string">
            <text:p>&lt;item idno="tourismus" enabled="1" default="0" value="0"&gt;&lt;labels&gt;&lt;label locale="de_CH" preferred="1"&gt;&lt;name_singular&gt;Tourismus&lt;/name_singular&gt;&lt;name_plural&gt;Tourismus&lt;/name_plural&gt;&lt;/label&gt;&lt;label locale="fr_CH" preferred="1"&gt;&lt;name_singular&gt;Tourisme&lt;/name_singular&gt;&lt;name_plural&gt;Tourisme&lt;/name_plural&gt;&lt;/label&gt;&lt;label locale="it_CH" preferred="1"&gt;&lt;name_singular&gt;Turismo&lt;/name_singular&gt;&lt;name_plural&gt;Turismo&lt;/name_plural&gt;&lt;/label&gt;&lt;label locale="rm_CH" preferred="1"&gt;&lt;name_singular&gt;Turissem&lt;/name_singular&gt;&lt;name_plural&gt;Turissem&lt;/name_plural&gt;&lt;/label&gt;&lt;label locale="en_US" preferred="1"&gt;&lt;name_singular&gt;Tourism&lt;/name_singular&gt;&lt;name_plural&gt;Tourism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Landwirtschaft</text:p>
          </table:table-cell>
          <table:table-cell office:value-type="string" calcext:value-type="string">
            <text:p>landwirtschaft</text:p>
          </table:table-cell>
          <table:table-cell table:formula="of:=[Snippets.$B$17]&amp;[Translations.A16]&amp;[Snippets.$C$17]&amp;[Translations.A16]&amp;[Snippets.$D$17]" office:value-type="string" office:string-value="&lt;label locale=&quot;de_CH&quot; preferred=&quot;1&quot;&gt;&lt;name_singular&gt;Landwirtschaft&lt;/name_singular&gt;&lt;name_plural&gt;Landwirtschaft&lt;/name_plural&gt;&lt;/label&gt;" calcext:value-type="string">
            <text:p>&lt;label locale="de_CH" preferred="1"&gt;&lt;name_singular&gt;Landwirtschaft&lt;/name_singular&gt;&lt;name_plural&gt;Landwirtschaft&lt;/name_plural&gt;&lt;/label&gt;</text:p>
          </table:table-cell>
          <table:table-cell table:formula="of:=[Snippets.$B$18]&amp;[Translations.B16]&amp;[Snippets.$C$18]&amp;[Translations.B16]&amp;[Snippets.$D$18]" office:value-type="string" office:string-value="&lt;label locale=&quot;fr_CH&quot; preferred=&quot;1&quot;&gt;&lt;name_singular&gt;Agriculture&lt;/name_singular&gt;&lt;name_plural&gt;Agriculture&lt;/name_plural&gt;&lt;/label&gt;" calcext:value-type="string">
            <text:p>&lt;label locale="fr_CH" preferred="1"&gt;&lt;name_singular&gt;Agriculture&lt;/name_singular&gt;&lt;name_plural&gt;Agriculture&lt;/name_plural&gt;&lt;/label&gt;</text:p>
          </table:table-cell>
          <table:table-cell table:formula="of:=[Snippets.$B$19]&amp;[Translations.C16]&amp;[Snippets.$C$19]&amp;[Translations.C16]&amp;[Snippets.$D$19]" office:value-type="string" office:string-value="&lt;label locale=&quot;it_CH&quot; preferred=&quot;1&quot;&gt;&lt;name_singular&gt;Agricoltura&lt;/name_singular&gt;&lt;name_plural&gt;Agricoltura&lt;/name_plural&gt;&lt;/label&gt;" calcext:value-type="string">
            <text:p>&lt;label locale="it_CH" preferred="1"&gt;&lt;name_singular&gt;Agricoltura&lt;/name_singular&gt;&lt;name_plural&gt;Agricoltura&lt;/name_plural&gt;&lt;/label&gt;</text:p>
          </table:table-cell>
          <table:table-cell table:formula="of:=[Snippets.$B$20]&amp;[Translations.D16]&amp;[Snippets.$C$20]&amp;[Translations.D16]&amp;[Snippets.$D$20]" office:value-type="string" office:string-value="&lt;label locale=&quot;rm_CH&quot; preferred=&quot;1&quot;&gt;&lt;name_singular&gt;Agricultura&lt;/name_singular&gt;&lt;name_plural&gt;Agricultura&lt;/name_plural&gt;&lt;/label&gt;" calcext:value-type="string">
            <text:p>&lt;label locale="rm_CH" preferred="1"&gt;&lt;name_singular&gt;Agricultura&lt;/name_singular&gt;&lt;name_plural&gt;Agricultura&lt;/name_plural&gt;&lt;/label&gt;</text:p>
          </table:table-cell>
          <table:table-cell table:formula="of:=[Snippets.$B$21]&amp;[Translations.E16]&amp;[Snippets.$C$21]&amp;[Translations.E16]&amp;[Snippets.$D$21]" office:value-type="string" office:string-value="&lt;label locale=&quot;en_US&quot; preferred=&quot;1&quot;&gt;&lt;name_singular&gt;Agriculture&lt;/name_singular&gt;&lt;name_plural&gt;Agriculture&lt;/name_plural&gt;&lt;/label&gt;" calcext:value-type="string">
            <text:p>&lt;label locale="en_US" preferred="1"&gt;&lt;name_singular&gt;Agriculture&lt;/name_singular&gt;&lt;name_plural&gt;Agriculture&lt;/name_plural&gt;&lt;/label&gt;</text:p>
          </table:table-cell>
          <table:table-cell table:formula="of:=[Snippets.B$15]&amp;[.B16]&amp;[Snippets.C$15]" office:value-type="string" office:string-value="&lt;item idno=&quot;landwirtschaft&quot; enabled=&quot;1&quot; default=&quot;0&quot; value=&quot;0&quot;&gt;" calcext:value-type="string">
            <text:p>&lt;item idno="landwirtschaft" enabled="1" default="0" value="0"&gt;</text:p>
          </table:table-cell>
          <table:table-cell table:formula="of:=[.H16]&amp;[Snippets.B$16]&amp;[.C16]&amp;[.D16]&amp;[.E16]&amp;[.F16]&amp;[.G16]&amp;[Snippets.B$22]&amp;[Snippets.B$23]" office:value-type="string" office:string-value="&lt;item idno=&quot;landwirtschaft&quot; enabled=&quot;1&quot; default=&quot;0&quot; value=&quot;0&quot;&gt;&lt;labels&gt;&lt;label locale=&quot;de_CH&quot; preferred=&quot;1&quot;&gt;&lt;name_singular&gt;Landwirtschaft&lt;/name_singular&gt;&lt;name_plural&gt;Landwirtschaft&lt;/name_plural&gt;&lt;/label&gt;&lt;label locale=&quot;fr_CH&quot; preferred=&quot;1&quot;&gt;&lt;name_singular&gt;Agriculture&lt;/name_singular&gt;&lt;name_plural&gt;Agriculture&lt;/name_plural&gt;&lt;/label&gt;&lt;label locale=&quot;it_CH&quot; preferred=&quot;1&quot;&gt;&lt;name_singular&gt;Agricoltura&lt;/name_singular&gt;&lt;name_plural&gt;Agricoltura&lt;/name_plural&gt;&lt;/label&gt;&lt;label locale=&quot;rm_CH&quot; preferred=&quot;1&quot;&gt;&lt;name_singular&gt;Agricultura&lt;/name_singular&gt;&lt;name_plural&gt;Agricultura&lt;/name_plural&gt;&lt;/label&gt;&lt;label locale=&quot;en_US&quot; preferred=&quot;1&quot;&gt;&lt;name_singular&gt;Agriculture&lt;/name_singular&gt;&lt;name_plural&gt;Agriculture&lt;/name_plural&gt;&lt;/label&gt;&lt;/labels&gt;&lt;/item&gt;" calcext:value-type="string">
            <text:p>&lt;item idno="landwirtschaft" enabled="1" default="0" value="0"&gt;&lt;labels&gt;&lt;label locale="de_CH" preferred="1"&gt;&lt;name_singular&gt;Landwirtschaft&lt;/name_singular&gt;&lt;name_plural&gt;Landwirtschaft&lt;/name_plural&gt;&lt;/label&gt;&lt;label locale="fr_CH" preferred="1"&gt;&lt;name_singular&gt;Agriculture&lt;/name_singular&gt;&lt;name_plural&gt;Agriculture&lt;/name_plural&gt;&lt;/label&gt;&lt;label locale="it_CH" preferred="1"&gt;&lt;name_singular&gt;Agricoltura&lt;/name_singular&gt;&lt;name_plural&gt;Agricoltura&lt;/name_plural&gt;&lt;/label&gt;&lt;label locale="rm_CH" preferred="1"&gt;&lt;name_singular&gt;Agricultura&lt;/name_singular&gt;&lt;name_plural&gt;Agricultura&lt;/name_plural&gt;&lt;/label&gt;&lt;label locale="en_US" preferred="1"&gt;&lt;name_singular&gt;Agriculture&lt;/name_singular&gt;&lt;name_plural&gt;Agricultur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Tiere</text:p>
          </table:table-cell>
          <table:table-cell office:value-type="string" calcext:value-type="string">
            <text:p>tiere</text:p>
          </table:table-cell>
          <table:table-cell table:formula="of:=[Snippets.$B$17]&amp;[Translations.A17]&amp;[Snippets.$C$17]&amp;[Translations.A17]&amp;[Snippets.$D$17]" office:value-type="string" office:string-value="&lt;label locale=&quot;de_CH&quot; preferred=&quot;1&quot;&gt;&lt;name_singular&gt;Tiere&lt;/name_singular&gt;&lt;name_plural&gt;Tiere&lt;/name_plural&gt;&lt;/label&gt;" calcext:value-type="string">
            <text:p>&lt;label locale="de_CH" preferred="1"&gt;&lt;name_singular&gt;Tiere&lt;/name_singular&gt;&lt;name_plural&gt;Tiere&lt;/name_plural&gt;&lt;/label&gt;</text:p>
          </table:table-cell>
          <table:table-cell table:formula="of:=[Snippets.$B$18]&amp;[Translations.B17]&amp;[Snippets.$C$18]&amp;[Translations.B17]&amp;[Snippets.$D$18]" office:value-type="string" office:string-value="&lt;label locale=&quot;fr_CH&quot; preferred=&quot;1&quot;&gt;&lt;name_singular&gt;Photographie animalière&lt;/name_singular&gt;&lt;name_plural&gt;Photographie animalière&lt;/name_plural&gt;&lt;/label&gt;" calcext:value-type="string">
            <text:p>&lt;label locale="fr_CH" preferred="1"&gt;&lt;name_singular&gt;Photographie animalière&lt;/name_singular&gt;&lt;name_plural&gt;Photographie animalière&lt;/name_plural&gt;&lt;/label&gt;</text:p>
          </table:table-cell>
          <table:table-cell table:formula="of:=[Snippets.$B$19]&amp;[Translations.C17]&amp;[Snippets.$C$19]&amp;[Translations.C17]&amp;[Snippets.$D$19]" office:value-type="string" office:string-value="&lt;label locale=&quot;it_CH&quot; preferred=&quot;1&quot;&gt;&lt;name_singular&gt;Fotografia animale&lt;/name_singular&gt;&lt;name_plural&gt;Fotografia animale&lt;/name_plural&gt;&lt;/label&gt;" calcext:value-type="string">
            <text:p>&lt;label locale="it_CH" preferred="1"&gt;&lt;name_singular&gt;Fotografia animale&lt;/name_singular&gt;&lt;name_plural&gt;Fotografia animale&lt;/name_plural&gt;&lt;/label&gt;</text:p>
          </table:table-cell>
          <table:table-cell table:formula="of:=[Snippets.$B$20]&amp;[Translations.D17]&amp;[Snippets.$C$20]&amp;[Translations.D17]&amp;[Snippets.$D$20]" office:value-type="string" office:string-value="&lt;label locale=&quot;rm_CH&quot; preferred=&quot;1&quot;&gt;&lt;name_singular&gt;Animals&lt;/name_singular&gt;&lt;name_plural&gt;Animals&lt;/name_plural&gt;&lt;/label&gt;" calcext:value-type="string">
            <text:p>&lt;label locale="rm_CH" preferred="1"&gt;&lt;name_singular&gt;Animals&lt;/name_singular&gt;&lt;name_plural&gt;Animals&lt;/name_plural&gt;&lt;/label&gt;</text:p>
          </table:table-cell>
          <table:table-cell table:formula="of:=[Snippets.$B$21]&amp;[Translations.E17]&amp;[Snippets.$C$21]&amp;[Translations.E17]&amp;[Snippets.$D$21]" office:value-type="string" office:string-value="&lt;label locale=&quot;en_US&quot; preferred=&quot;1&quot;&gt;&lt;name_singular&gt;Animals&lt;/name_singular&gt;&lt;name_plural&gt;Animals&lt;/name_plural&gt;&lt;/label&gt;" calcext:value-type="string">
            <text:p>&lt;label locale="en_US" preferred="1"&gt;&lt;name_singular&gt;Animals&lt;/name_singular&gt;&lt;name_plural&gt;Animals&lt;/name_plural&gt;&lt;/label&gt;</text:p>
          </table:table-cell>
          <table:table-cell table:formula="of:=[Snippets.B$15]&amp;[.B17]&amp;[Snippets.C$15]" office:value-type="string" office:string-value="&lt;item idno=&quot;tiere&quot; enabled=&quot;1&quot; default=&quot;0&quot; value=&quot;0&quot;&gt;" calcext:value-type="string">
            <text:p>&lt;item idno="tiere" enabled="1" default="0" value="0"&gt;</text:p>
          </table:table-cell>
          <table:table-cell table:formula="of:=[.H17]&amp;[Snippets.B$16]&amp;[.C17]&amp;[.D17]&amp;[.E17]&amp;[.F17]&amp;[.G17]&amp;[Snippets.B$22]&amp;[Snippets.B$23]" office:value-type="string" office:string-value="&lt;item idno=&quot;tiere&quot; enabled=&quot;1&quot; default=&quot;0&quot; value=&quot;0&quot;&gt;&lt;labels&gt;&lt;label locale=&quot;de_CH&quot; preferred=&quot;1&quot;&gt;&lt;name_singular&gt;Tiere&lt;/name_singular&gt;&lt;name_plural&gt;Tiere&lt;/name_plural&gt;&lt;/label&gt;&lt;label locale=&quot;fr_CH&quot; preferred=&quot;1&quot;&gt;&lt;name_singular&gt;Photographie animalière&lt;/name_singular&gt;&lt;name_plural&gt;Photographie animalière&lt;/name_plural&gt;&lt;/label&gt;&lt;label locale=&quot;it_CH&quot; preferred=&quot;1&quot;&gt;&lt;name_singular&gt;Fotografia animale&lt;/name_singular&gt;&lt;name_plural&gt;Fotografia animale&lt;/name_plural&gt;&lt;/label&gt;&lt;label locale=&quot;rm_CH&quot; preferred=&quot;1&quot;&gt;&lt;name_singular&gt;Animals&lt;/name_singular&gt;&lt;name_plural&gt;Animals&lt;/name_plural&gt;&lt;/label&gt;&lt;label locale=&quot;en_US&quot; preferred=&quot;1&quot;&gt;&lt;name_singular&gt;Animals&lt;/name_singular&gt;&lt;name_plural&gt;Animals&lt;/name_plural&gt;&lt;/label&gt;&lt;/labels&gt;&lt;/item&gt;" calcext:value-type="string">
            <text:p>&lt;item idno="tiere" enabled="1" default="0" value="0"&gt;&lt;labels&gt;&lt;label locale="de_CH" preferred="1"&gt;&lt;name_singular&gt;Tiere&lt;/name_singular&gt;&lt;name_plural&gt;Tiere&lt;/name_plural&gt;&lt;/label&gt;&lt;label locale="fr_CH" preferred="1"&gt;&lt;name_singular&gt;Photographie animalière&lt;/name_singular&gt;&lt;name_plural&gt;Photographie animalière&lt;/name_plural&gt;&lt;/label&gt;&lt;label locale="it_CH" preferred="1"&gt;&lt;name_singular&gt;Fotografia animale&lt;/name_singular&gt;&lt;name_plural&gt;Fotografia animale&lt;/name_plural&gt;&lt;/label&gt;&lt;label locale="rm_CH" preferred="1"&gt;&lt;name_singular&gt;Animals&lt;/name_singular&gt;&lt;name_plural&gt;Animals&lt;/name_plural&gt;&lt;/label&gt;&lt;label locale="en_US" preferred="1"&gt;&lt;name_singular&gt;Animals&lt;/name_singular&gt;&lt;name_plural&gt;Animals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Sachaufnahme</text:p>
          </table:table-cell>
          <table:table-cell office:value-type="string" calcext:value-type="string">
            <text:p>sachaufnahme</text:p>
          </table:table-cell>
          <table:table-cell table:formula="of:=[Snippets.$B$17]&amp;[Translations.A18]&amp;[Snippets.$C$17]&amp;[Translations.A18]&amp;[Snippets.$D$17]" office:value-type="string" office:string-value="&lt;label locale=&quot;de_CH&quot; preferred=&quot;1&quot;&gt;&lt;name_singular&gt;Sachaufnahme&lt;/name_singular&gt;&lt;name_plural&gt;Sachaufnahme&lt;/name_plural&gt;&lt;/label&gt;" calcext:value-type="string">
            <text:p>&lt;label locale="de_CH" preferred="1"&gt;&lt;name_singular&gt;Sachaufnahme&lt;/name_singular&gt;&lt;name_plural&gt;Sachaufnahme&lt;/name_plural&gt;&lt;/label&gt;</text:p>
          </table:table-cell>
          <table:table-cell table:formula="of:=[Snippets.$B$18]&amp;[Translations.B18]&amp;[Snippets.$C$18]&amp;[Translations.B18]&amp;[Snippets.$D$18]" office:value-type="string" office:string-value="&lt;label locale=&quot;fr_CH&quot; preferred=&quot;1&quot;&gt;&lt;name_singular&gt;Objet&lt;/name_singular&gt;&lt;name_plural&gt;Objet&lt;/name_plural&gt;&lt;/label&gt;" calcext:value-type="string">
            <text:p>&lt;label locale="fr_CH" preferred="1"&gt;&lt;name_singular&gt;Objet&lt;/name_singular&gt;&lt;name_plural&gt;Objet&lt;/name_plural&gt;&lt;/label&gt;</text:p>
          </table:table-cell>
          <table:table-cell table:formula="of:=[Snippets.$B$19]&amp;[Translations.C18]&amp;[Snippets.$C$19]&amp;[Translations.C18]&amp;[Snippets.$D$19]" office:value-type="string" office:string-value="&lt;label locale=&quot;it_CH&quot; preferred=&quot;1&quot;&gt;&lt;name_singular&gt;Oggettistica&lt;/name_singular&gt;&lt;name_plural&gt;Oggettistica&lt;/name_plural&gt;&lt;/label&gt;" calcext:value-type="string">
            <text:p>&lt;label locale="it_CH" preferred="1"&gt;&lt;name_singular&gt;Oggettistica&lt;/name_singular&gt;&lt;name_plural&gt;Oggettistica&lt;/name_plural&gt;&lt;/label&gt;</text:p>
          </table:table-cell>
          <table:table-cell table:formula="of:=[Snippets.$B$20]&amp;[Translations.D18]&amp;[Snippets.$C$20]&amp;[Translations.D18]&amp;[Snippets.$D$20]" office:value-type="string" office:string-value="&lt;label locale=&quot;rm_CH&quot; preferred=&quot;1&quot;&gt;&lt;name_singular&gt;Object&lt;/name_singular&gt;&lt;name_plural&gt;Object&lt;/name_plural&gt;&lt;/label&gt;" calcext:value-type="string">
            <text:p>&lt;label locale="rm_CH" preferred="1"&gt;&lt;name_singular&gt;Object&lt;/name_singular&gt;&lt;name_plural&gt;Object&lt;/name_plural&gt;&lt;/label&gt;</text:p>
          </table:table-cell>
          <table:table-cell table:formula="of:=[Snippets.$B$21]&amp;[Translations.E18]&amp;[Snippets.$C$21]&amp;[Translations.E18]&amp;[Snippets.$D$21]" office:value-type="string" office:string-value="&lt;label locale=&quot;en_US&quot; preferred=&quot;1&quot;&gt;&lt;name_singular&gt;Object photography&lt;/name_singular&gt;&lt;name_plural&gt;Object photography&lt;/name_plural&gt;&lt;/label&gt;" calcext:value-type="string">
            <text:p>&lt;label locale="en_US" preferred="1"&gt;&lt;name_singular&gt;Object photography&lt;/name_singular&gt;&lt;name_plural&gt;Object photography&lt;/name_plural&gt;&lt;/label&gt;</text:p>
          </table:table-cell>
          <table:table-cell table:formula="of:=[Snippets.B$15]&amp;[.B18]&amp;[Snippets.C$15]" office:value-type="string" office:string-value="&lt;item idno=&quot;sachaufnahme&quot; enabled=&quot;1&quot; default=&quot;0&quot; value=&quot;0&quot;&gt;" calcext:value-type="string">
            <text:p>&lt;item idno="sachaufnahme" enabled="1" default="0" value="0"&gt;</text:p>
          </table:table-cell>
          <table:table-cell table:formula="of:=[.H18]&amp;[Snippets.B$16]&amp;[.C18]&amp;[.D18]&amp;[.E18]&amp;[.F18]&amp;[.G18]&amp;[Snippets.B$22]&amp;[Snippets.B$23]" office:value-type="string" office:string-value="&lt;item idno=&quot;sachaufnahme&quot; enabled=&quot;1&quot; default=&quot;0&quot; value=&quot;0&quot;&gt;&lt;labels&gt;&lt;label locale=&quot;de_CH&quot; preferred=&quot;1&quot;&gt;&lt;name_singular&gt;Sachaufnahme&lt;/name_singular&gt;&lt;name_plural&gt;Sachaufnahme&lt;/name_plural&gt;&lt;/label&gt;&lt;label locale=&quot;fr_CH&quot; preferred=&quot;1&quot;&gt;&lt;name_singular&gt;Objet&lt;/name_singular&gt;&lt;name_plural&gt;Objet&lt;/name_plural&gt;&lt;/label&gt;&lt;label locale=&quot;it_CH&quot; preferred=&quot;1&quot;&gt;&lt;name_singular&gt;Oggettistica&lt;/name_singular&gt;&lt;name_plural&gt;Oggettistica&lt;/name_plural&gt;&lt;/label&gt;&lt;label locale=&quot;rm_CH&quot; preferred=&quot;1&quot;&gt;&lt;name_singular&gt;Object&lt;/name_singular&gt;&lt;name_plural&gt;Object&lt;/name_plural&gt;&lt;/label&gt;&lt;label locale=&quot;en_US&quot; preferred=&quot;1&quot;&gt;&lt;name_singular&gt;Object photography&lt;/name_singular&gt;&lt;name_plural&gt;Object photography&lt;/name_plural&gt;&lt;/label&gt;&lt;/labels&gt;&lt;/item&gt;" calcext:value-type="string">
            <text:p>&lt;item idno="sachaufnahme" enabled="1" default="0" value="0"&gt;&lt;labels&gt;&lt;label locale="de_CH" preferred="1"&gt;&lt;name_singular&gt;Sachaufnahme&lt;/name_singular&gt;&lt;name_plural&gt;Sachaufnahme&lt;/name_plural&gt;&lt;/label&gt;&lt;label locale="fr_CH" preferred="1"&gt;&lt;name_singular&gt;Objet&lt;/name_singular&gt;&lt;name_plural&gt;Objet&lt;/name_plural&gt;&lt;/label&gt;&lt;label locale="it_CH" preferred="1"&gt;&lt;name_singular&gt;Oggettistica&lt;/name_singular&gt;&lt;name_plural&gt;Oggettistica&lt;/name_plural&gt;&lt;/label&gt;&lt;label locale="rm_CH" preferred="1"&gt;&lt;name_singular&gt;Object&lt;/name_singular&gt;&lt;name_plural&gt;Object&lt;/name_plural&gt;&lt;/label&gt;&lt;label locale="en_US" preferred="1"&gt;&lt;name_singular&gt;Object photography&lt;/name_singular&gt;&lt;name_plural&gt;Object photography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Reproduktion</text:p>
          </table:table-cell>
          <table:table-cell office:value-type="string" calcext:value-type="string">
            <text:p>reproduktion</text:p>
          </table:table-cell>
          <table:table-cell table:formula="of:=[Snippets.$B$17]&amp;[Translations.A19]&amp;[Snippets.$C$17]&amp;[Translations.A19]&amp;[Snippets.$D$17]" office:value-type="string" office:string-value="&lt;label locale=&quot;de_CH&quot; preferred=&quot;1&quot;&gt;&lt;name_singular&gt;Reproduktion&lt;/name_singular&gt;&lt;name_plural&gt;Reproduktion&lt;/name_plural&gt;&lt;/label&gt;" calcext:value-type="string">
            <text:p>&lt;label locale="de_CH" preferred="1"&gt;&lt;name_singular&gt;Reproduktion&lt;/name_singular&gt;&lt;name_plural&gt;Reproduktion&lt;/name_plural&gt;&lt;/label&gt;</text:p>
          </table:table-cell>
          <table:table-cell table:formula="of:=[Snippets.$B$18]&amp;[Translations.B19]&amp;[Snippets.$C$18]&amp;[Translations.B19]&amp;[Snippets.$D$18]" office:value-type="string" office:string-value="&lt;label locale=&quot;fr_CH&quot; preferred=&quot;1&quot;&gt;&lt;name_singular&gt;Reproduction&lt;/name_singular&gt;&lt;name_plural&gt;Reproduction&lt;/name_plural&gt;&lt;/label&gt;" calcext:value-type="string">
            <text:p>&lt;label locale="fr_CH" preferred="1"&gt;&lt;name_singular&gt;Reproduction&lt;/name_singular&gt;&lt;name_plural&gt;Reproduction&lt;/name_plural&gt;&lt;/label&gt;</text:p>
          </table:table-cell>
          <table:table-cell table:formula="of:=[Snippets.$B$19]&amp;[Translations.C19]&amp;[Snippets.$C$19]&amp;[Translations.C19]&amp;[Snippets.$D$19]" office:value-type="string" office:string-value="&lt;label locale=&quot;it_CH&quot; preferred=&quot;1&quot;&gt;&lt;name_singular&gt;Riproduzione&lt;/name_singular&gt;&lt;name_plural&gt;Riproduzione&lt;/name_plural&gt;&lt;/label&gt;" calcext:value-type="string">
            <text:p>&lt;label locale="it_CH" preferred="1"&gt;&lt;name_singular&gt;Riproduzione&lt;/name_singular&gt;&lt;name_plural&gt;Riproduzione&lt;/name_plural&gt;&lt;/label&gt;</text:p>
          </table:table-cell>
          <table:table-cell table:formula="of:=[Snippets.$B$20]&amp;[Translations.D19]&amp;[Snippets.$C$20]&amp;[Translations.D19]&amp;[Snippets.$D$20]" office:value-type="string" office:string-value="&lt;label locale=&quot;rm_CH&quot; preferred=&quot;1&quot;&gt;&lt;name_singular&gt;Reproducziun&lt;/name_singular&gt;&lt;name_plural&gt;Reproducziun&lt;/name_plural&gt;&lt;/label&gt;" calcext:value-type="string">
            <text:p>&lt;label locale="rm_CH" preferred="1"&gt;&lt;name_singular&gt;Reproducziun&lt;/name_singular&gt;&lt;name_plural&gt;Reproducziun&lt;/name_plural&gt;&lt;/label&gt;</text:p>
          </table:table-cell>
          <table:table-cell table:formula="of:=[Snippets.$B$21]&amp;[Translations.E19]&amp;[Snippets.$C$21]&amp;[Translations.E19]&amp;[Snippets.$D$21]" office:value-type="string" office:string-value="&lt;label locale=&quot;en_US&quot; preferred=&quot;1&quot;&gt;&lt;name_singular&gt;Reproduction&lt;/name_singular&gt;&lt;name_plural&gt;Reproduction&lt;/name_plural&gt;&lt;/label&gt;" calcext:value-type="string">
            <text:p>&lt;label locale="en_US" preferred="1"&gt;&lt;name_singular&gt;Reproduction&lt;/name_singular&gt;&lt;name_plural&gt;Reproduction&lt;/name_plural&gt;&lt;/label&gt;</text:p>
          </table:table-cell>
          <table:table-cell table:formula="of:=[Snippets.B$15]&amp;[.B19]&amp;[Snippets.C$15]" office:value-type="string" office:string-value="&lt;item idno=&quot;reproduktion&quot; enabled=&quot;1&quot; default=&quot;0&quot; value=&quot;0&quot;&gt;" calcext:value-type="string">
            <text:p>&lt;item idno="reproduktion" enabled="1" default="0" value="0"&gt;</text:p>
          </table:table-cell>
          <table:table-cell table:formula="of:=[.H19]&amp;[Snippets.B$16]&amp;[.C19]&amp;[.D19]&amp;[.E19]&amp;[.F19]&amp;[.G19]&amp;[Snippets.B$22]&amp;[Snippets.B$23]" office:value-type="string" office:string-value="&lt;item idno=&quot;reproduktion&quot; enabled=&quot;1&quot; default=&quot;0&quot; value=&quot;0&quot;&gt;&lt;labels&gt;&lt;label locale=&quot;de_CH&quot; preferred=&quot;1&quot;&gt;&lt;name_singular&gt;Reproduktion&lt;/name_singular&gt;&lt;name_plural&gt;Reproduktion&lt;/name_plural&gt;&lt;/label&gt;&lt;label locale=&quot;fr_CH&quot; preferred=&quot;1&quot;&gt;&lt;name_singular&gt;Reproduction&lt;/name_singular&gt;&lt;name_plural&gt;Reproduction&lt;/name_plural&gt;&lt;/label&gt;&lt;label locale=&quot;it_CH&quot; preferred=&quot;1&quot;&gt;&lt;name_singular&gt;Riproduzione&lt;/name_singular&gt;&lt;name_plural&gt;Riproduzione&lt;/name_plural&gt;&lt;/label&gt;&lt;label locale=&quot;rm_CH&quot; preferred=&quot;1&quot;&gt;&lt;name_singular&gt;Reproducziun&lt;/name_singular&gt;&lt;name_plural&gt;Reproducziun&lt;/name_plural&gt;&lt;/label&gt;&lt;label locale=&quot;en_US&quot; preferred=&quot;1&quot;&gt;&lt;name_singular&gt;Reproduction&lt;/name_singular&gt;&lt;name_plural&gt;Reproduction&lt;/name_plural&gt;&lt;/label&gt;&lt;/labels&gt;&lt;/item&gt;" calcext:value-type="string">
            <text:p>&lt;item idno="reproduktion" enabled="1" default="0" value="0"&gt;&lt;labels&gt;&lt;label locale="de_CH" preferred="1"&gt;&lt;name_singular&gt;Reproduktion&lt;/name_singular&gt;&lt;name_plural&gt;Reproduktion&lt;/name_plural&gt;&lt;/label&gt;&lt;label locale="fr_CH" preferred="1"&gt;&lt;name_singular&gt;Reproduction&lt;/name_singular&gt;&lt;name_plural&gt;Reproduction&lt;/name_plural&gt;&lt;/label&gt;&lt;label locale="it_CH" preferred="1"&gt;&lt;name_singular&gt;Riproduzione&lt;/name_singular&gt;&lt;name_plural&gt;Riproduzione&lt;/name_plural&gt;&lt;/label&gt;&lt;label locale="rm_CH" preferred="1"&gt;&lt;name_singular&gt;Reproducziun&lt;/name_singular&gt;&lt;name_plural&gt;Reproducziun&lt;/name_plural&gt;&lt;/label&gt;&lt;label locale="en_US" preferred="1"&gt;&lt;name_singular&gt;Reproduction&lt;/name_singular&gt;&lt;name_plural&gt;Reproduction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Werbung</text:p>
          </table:table-cell>
          <table:table-cell office:value-type="string" calcext:value-type="string">
            <text:p>werbung</text:p>
          </table:table-cell>
          <table:table-cell table:formula="of:=[Snippets.$B$17]&amp;[Translations.A20]&amp;[Snippets.$C$17]&amp;[Translations.A20]&amp;[Snippets.$D$17]" office:value-type="string" office:string-value="&lt;label locale=&quot;de_CH&quot; preferred=&quot;1&quot;&gt;&lt;name_singular&gt;Werbung&lt;/name_singular&gt;&lt;name_plural&gt;Werbung&lt;/name_plural&gt;&lt;/label&gt;" calcext:value-type="string">
            <text:p>&lt;label locale="de_CH" preferred="1"&gt;&lt;name_singular&gt;Werbung&lt;/name_singular&gt;&lt;name_plural&gt;Werbung&lt;/name_plural&gt;&lt;/label&gt;</text:p>
          </table:table-cell>
          <table:table-cell table:formula="of:=[Snippets.$B$18]&amp;[Translations.B20]&amp;[Snippets.$C$18]&amp;[Translations.B20]&amp;[Snippets.$D$18]" office:value-type="string" office:string-value="&lt;label locale=&quot;fr_CH&quot; preferred=&quot;1&quot;&gt;&lt;name_singular&gt;Publicité&lt;/name_singular&gt;&lt;name_plural&gt;Publicité&lt;/name_plural&gt;&lt;/label&gt;" calcext:value-type="string">
            <text:p>&lt;label locale="fr_CH" preferred="1"&gt;&lt;name_singular&gt;Publicité&lt;/name_singular&gt;&lt;name_plural&gt;Publicité&lt;/name_plural&gt;&lt;/label&gt;</text:p>
          </table:table-cell>
          <table:table-cell table:formula="of:=[Snippets.$B$19]&amp;[Translations.C20]&amp;[Snippets.$C$19]&amp;[Translations.C20]&amp;[Snippets.$D$19]" office:value-type="string" office:string-value="&lt;label locale=&quot;it_CH&quot; preferred=&quot;1&quot;&gt;&lt;name_singular&gt;Pubblicità&lt;/name_singular&gt;&lt;name_plural&gt;Pubblicità&lt;/name_plural&gt;&lt;/label&gt;" calcext:value-type="string">
            <text:p>&lt;label locale="it_CH" preferred="1"&gt;&lt;name_singular&gt;Pubblicità&lt;/name_singular&gt;&lt;name_plural&gt;Pubblicità&lt;/name_plural&gt;&lt;/label&gt;</text:p>
          </table:table-cell>
          <table:table-cell table:formula="of:=[Snippets.$B$20]&amp;[Translations.D20]&amp;[Snippets.$C$20]&amp;[Translations.D20]&amp;[Snippets.$D$20]" office:value-type="string" office:string-value="&lt;label locale=&quot;rm_CH&quot; preferred=&quot;1&quot;&gt;&lt;name_singular&gt;Reclama&lt;/name_singular&gt;&lt;name_plural&gt;Reclama&lt;/name_plural&gt;&lt;/label&gt;" calcext:value-type="string">
            <text:p>&lt;label locale="rm_CH" preferred="1"&gt;&lt;name_singular&gt;Reclama&lt;/name_singular&gt;&lt;name_plural&gt;Reclama&lt;/name_plural&gt;&lt;/label&gt;</text:p>
          </table:table-cell>
          <table:table-cell table:formula="of:=[Snippets.$B$21]&amp;[Translations.E20]&amp;[Snippets.$C$21]&amp;[Translations.E20]&amp;[Snippets.$D$21]" office:value-type="string" office:string-value="&lt;label locale=&quot;en_US&quot; preferred=&quot;1&quot;&gt;&lt;name_singular&gt;Publicity&lt;/name_singular&gt;&lt;name_plural&gt;Publicity&lt;/name_plural&gt;&lt;/label&gt;" calcext:value-type="string">
            <text:p>&lt;label locale="en_US" preferred="1"&gt;&lt;name_singular&gt;Publicity&lt;/name_singular&gt;&lt;name_plural&gt;Publicity&lt;/name_plural&gt;&lt;/label&gt;</text:p>
          </table:table-cell>
          <table:table-cell table:formula="of:=[Snippets.B$15]&amp;[.B20]&amp;[Snippets.C$15]" office:value-type="string" office:string-value="&lt;item idno=&quot;werbung&quot; enabled=&quot;1&quot; default=&quot;0&quot; value=&quot;0&quot;&gt;" calcext:value-type="string">
            <text:p>&lt;item idno="werbung" enabled="1" default="0" value="0"&gt;</text:p>
          </table:table-cell>
          <table:table-cell table:formula="of:=[.H20]&amp;[Snippets.B$16]&amp;[.C20]&amp;[.D20]&amp;[.E20]&amp;[.F20]&amp;[.G20]&amp;[Snippets.B$22]&amp;[Snippets.B$23]" office:value-type="string" office:string-value="&lt;item idno=&quot;werbung&quot; enabled=&quot;1&quot; default=&quot;0&quot; value=&quot;0&quot;&gt;&lt;labels&gt;&lt;label locale=&quot;de_CH&quot; preferred=&quot;1&quot;&gt;&lt;name_singular&gt;Werbung&lt;/name_singular&gt;&lt;name_plural&gt;Werbung&lt;/name_plural&gt;&lt;/label&gt;&lt;label locale=&quot;fr_CH&quot; preferred=&quot;1&quot;&gt;&lt;name_singular&gt;Publicité&lt;/name_singular&gt;&lt;name_plural&gt;Publicité&lt;/name_plural&gt;&lt;/label&gt;&lt;label locale=&quot;it_CH&quot; preferred=&quot;1&quot;&gt;&lt;name_singular&gt;Pubblicità&lt;/name_singular&gt;&lt;name_plural&gt;Pubblicità&lt;/name_plural&gt;&lt;/label&gt;&lt;label locale=&quot;rm_CH&quot; preferred=&quot;1&quot;&gt;&lt;name_singular&gt;Reclama&lt;/name_singular&gt;&lt;name_plural&gt;Reclama&lt;/name_plural&gt;&lt;/label&gt;&lt;label locale=&quot;en_US&quot; preferred=&quot;1&quot;&gt;&lt;name_singular&gt;Publicity&lt;/name_singular&gt;&lt;name_plural&gt;Publicity&lt;/name_plural&gt;&lt;/label&gt;&lt;/labels&gt;&lt;/item&gt;" calcext:value-type="string">
            <text:p>&lt;item idno="werbung" enabled="1" default="0" value="0"&gt;&lt;labels&gt;&lt;label locale="de_CH" preferred="1"&gt;&lt;name_singular&gt;Werbung&lt;/name_singular&gt;&lt;name_plural&gt;Werbung&lt;/name_plural&gt;&lt;/label&gt;&lt;label locale="fr_CH" preferred="1"&gt;&lt;name_singular&gt;Publicité&lt;/name_singular&gt;&lt;name_plural&gt;Publicité&lt;/name_plural&gt;&lt;/label&gt;&lt;label locale="it_CH" preferred="1"&gt;&lt;name_singular&gt;Pubblicità&lt;/name_singular&gt;&lt;name_plural&gt;Pubblicità&lt;/name_plural&gt;&lt;/label&gt;&lt;label locale="rm_CH" preferred="1"&gt;&lt;name_singular&gt;Reclama&lt;/name_singular&gt;&lt;name_plural&gt;Reclama&lt;/name_plural&gt;&lt;/label&gt;&lt;label locale="en_US" preferred="1"&gt;&lt;name_singular&gt;Publicity&lt;/name_singular&gt;&lt;name_plural&gt;Publicity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table:formula="of:=[Snippets.$B$17]&amp;[Translations.A21]&amp;[Snippets.$C$17]&amp;[Translations.A21]&amp;[Snippets.$D$17]" office:value-type="string" office:string-value="&lt;label locale=&quot;de_CH&quot; preferred=&quot;1&quot;&gt;&lt;name_singular&gt;Mode&lt;/name_singular&gt;&lt;name_plural&gt;Mode&lt;/name_plural&gt;&lt;/label&gt;" calcext:value-type="string">
            <text:p>&lt;label locale="de_CH" preferred="1"&gt;&lt;name_singular&gt;Mode&lt;/name_singular&gt;&lt;name_plural&gt;Mode&lt;/name_plural&gt;&lt;/label&gt;</text:p>
          </table:table-cell>
          <table:table-cell table:formula="of:=[Snippets.$B$18]&amp;[Translations.B21]&amp;[Snippets.$C$18]&amp;[Translations.B21]&amp;[Snippets.$D$18]" office:value-type="string" office:string-value="&lt;label locale=&quot;fr_CH&quot; preferred=&quot;1&quot;&gt;&lt;name_singular&gt;Mode&lt;/name_singular&gt;&lt;name_plural&gt;Mode&lt;/name_plural&gt;&lt;/label&gt;" calcext:value-type="string">
            <text:p>&lt;label locale="fr_CH" preferred="1"&gt;&lt;name_singular&gt;Mode&lt;/name_singular&gt;&lt;name_plural&gt;Mode&lt;/name_plural&gt;&lt;/label&gt;</text:p>
          </table:table-cell>
          <table:table-cell table:formula="of:=[Snippets.$B$19]&amp;[Translations.C21]&amp;[Snippets.$C$19]&amp;[Translations.C21]&amp;[Snippets.$D$19]" office:value-type="string" office:string-value="&lt;label locale=&quot;it_CH&quot; preferred=&quot;1&quot;&gt;&lt;name_singular&gt;Moda&lt;/name_singular&gt;&lt;name_plural&gt;Moda&lt;/name_plural&gt;&lt;/label&gt;" calcext:value-type="string">
            <text:p>&lt;label locale="it_CH" preferred="1"&gt;&lt;name_singular&gt;Moda&lt;/name_singular&gt;&lt;name_plural&gt;Moda&lt;/name_plural&gt;&lt;/label&gt;</text:p>
          </table:table-cell>
          <table:table-cell table:formula="of:=[Snippets.$B$20]&amp;[Translations.D21]&amp;[Snippets.$C$20]&amp;[Translations.D21]&amp;[Snippets.$D$20]" office:value-type="string" office:string-value="&lt;label locale=&quot;rm_CH&quot; preferred=&quot;1&quot;&gt;&lt;name_singular&gt;Moda&lt;/name_singular&gt;&lt;name_plural&gt;Moda&lt;/name_plural&gt;&lt;/label&gt;" calcext:value-type="string">
            <text:p>&lt;label locale="rm_CH" preferred="1"&gt;&lt;name_singular&gt;Moda&lt;/name_singular&gt;&lt;name_plural&gt;Moda&lt;/name_plural&gt;&lt;/label&gt;</text:p>
          </table:table-cell>
          <table:table-cell table:formula="of:=[Snippets.$B$21]&amp;[Translations.E21]&amp;[Snippets.$C$21]&amp;[Translations.E21]&amp;[Snippets.$D$21]" office:value-type="string" office:string-value="&lt;label locale=&quot;en_US&quot; preferred=&quot;1&quot;&gt;&lt;name_singular&gt;Fashion&lt;/name_singular&gt;&lt;name_plural&gt;Fashion&lt;/name_plural&gt;&lt;/label&gt;" calcext:value-type="string">
            <text:p>&lt;label locale="en_US" preferred="1"&gt;&lt;name_singular&gt;Fashion&lt;/name_singular&gt;&lt;name_plural&gt;Fashion&lt;/name_plural&gt;&lt;/label&gt;</text:p>
          </table:table-cell>
          <table:table-cell table:formula="of:=[Snippets.B$15]&amp;[.B21]&amp;[Snippets.C$15]" office:value-type="string" office:string-value="&lt;item idno=&quot;mode&quot; enabled=&quot;1&quot; default=&quot;0&quot; value=&quot;0&quot;&gt;" calcext:value-type="string">
            <text:p>&lt;item idno="mode" enabled="1" default="0" value="0"&gt;</text:p>
          </table:table-cell>
          <table:table-cell table:formula="of:=[.H21]&amp;[Snippets.B$16]&amp;[.C21]&amp;[.D21]&amp;[.E21]&amp;[.F21]&amp;[.G21]&amp;[Snippets.B$22]&amp;[Snippets.B$23]" office:value-type="string" office:string-value="&lt;item idno=&quot;mode&quot; enabled=&quot;1&quot; default=&quot;0&quot; value=&quot;0&quot;&gt;&lt;labels&gt;&lt;label locale=&quot;de_CH&quot; preferred=&quot;1&quot;&gt;&lt;name_singular&gt;Mode&lt;/name_singular&gt;&lt;name_plural&gt;Mode&lt;/name_plural&gt;&lt;/label&gt;&lt;label locale=&quot;fr_CH&quot; preferred=&quot;1&quot;&gt;&lt;name_singular&gt;Mode&lt;/name_singular&gt;&lt;name_plural&gt;Mode&lt;/name_plural&gt;&lt;/label&gt;&lt;label locale=&quot;it_CH&quot; preferred=&quot;1&quot;&gt;&lt;name_singular&gt;Moda&lt;/name_singular&gt;&lt;name_plural&gt;Moda&lt;/name_plural&gt;&lt;/label&gt;&lt;label locale=&quot;rm_CH&quot; preferred=&quot;1&quot;&gt;&lt;name_singular&gt;Moda&lt;/name_singular&gt;&lt;name_plural&gt;Moda&lt;/name_plural&gt;&lt;/label&gt;&lt;label locale=&quot;en_US&quot; preferred=&quot;1&quot;&gt;&lt;name_singular&gt;Fashion&lt;/name_singular&gt;&lt;name_plural&gt;Fashion&lt;/name_plural&gt;&lt;/label&gt;&lt;/labels&gt;&lt;/item&gt;" calcext:value-type="string">
            <text:p>&lt;item idno="mode" enabled="1" default="0" value="0"&gt;&lt;labels&gt;&lt;label locale="de_CH" preferred="1"&gt;&lt;name_singular&gt;Mode&lt;/name_singular&gt;&lt;name_plural&gt;Mode&lt;/name_plural&gt;&lt;/label&gt;&lt;label locale="fr_CH" preferred="1"&gt;&lt;name_singular&gt;Mode&lt;/name_singular&gt;&lt;name_plural&gt;Mode&lt;/name_plural&gt;&lt;/label&gt;&lt;label locale="it_CH" preferred="1"&gt;&lt;name_singular&gt;Moda&lt;/name_singular&gt;&lt;name_plural&gt;Moda&lt;/name_plural&gt;&lt;/label&gt;&lt;label locale="rm_CH" preferred="1"&gt;&lt;name_singular&gt;Moda&lt;/name_singular&gt;&lt;name_plural&gt;Moda&lt;/name_plural&gt;&lt;/label&gt;&lt;label locale="en_US" preferred="1"&gt;&lt;name_singular&gt;Fashion&lt;/name_singular&gt;&lt;name_plural&gt;Fashion&lt;/name_plural&gt;&lt;/label&gt;&lt;/labels&gt;&lt;/item&gt;</text:p>
          </table:table-cell>
        </table:table-row>
        <table:table-row table:style-name="ro3">
          <table:table-cell table:style-name="ce1" office:value-type="string" calcext:value-type="string">
            <text:p>Firmenporträt</text:p>
          </table:table-cell>
          <table:table-cell table:style-name="ce1" office:value-type="string" calcext:value-type="string">
            <text:p>firmenportraet</text:p>
          </table:table-cell>
          <table:table-cell table:formula="of:=[Snippets.$B$17]&amp;[Translations.A22]&amp;[Snippets.$C$17]&amp;[Translations.A22]&amp;[Snippets.$D$17]" office:value-type="string" office:string-value="&lt;label locale=&quot;de_CH&quot; preferred=&quot;1&quot;&gt;&lt;name_singular&gt;Firmenporträt&lt;/name_singular&gt;&lt;name_plural&gt;Firmenporträt&lt;/name_plural&gt;&lt;/label&gt;" calcext:value-type="string">
            <text:p>&lt;label locale="de_CH" preferred="1"&gt;&lt;name_singular&gt;Firmenporträt&lt;/name_singular&gt;&lt;name_plural&gt;Firmenporträt&lt;/name_plural&gt;&lt;/label&gt;</text:p>
          </table:table-cell>
          <table:table-cell table:formula="of:=[Snippets.$B$18]&amp;[Translations.B22]&amp;[Snippets.$C$18]&amp;[Translations.B22]&amp;[Snippets.$D$18]" office:value-type="string" office:string-value="&lt;label locale=&quot;fr_CH&quot; preferred=&quot;1&quot;&gt;&lt;name_singular&gt;Portrait d'entreprise&lt;/name_singular&gt;&lt;name_plural&gt;Portrait d'entreprise&lt;/name_plural&gt;&lt;/label&gt;" calcext:value-type="string">
            <text:p>&lt;label locale="fr_CH" preferred="1"&gt;&lt;name_singular&gt;Portrait d'entreprise&lt;/name_singular&gt;&lt;name_plural&gt;Portrait d'entreprise&lt;/name_plural&gt;&lt;/label&gt;</text:p>
          </table:table-cell>
          <table:table-cell table:formula="of:=[Snippets.$B$19]&amp;[Translations.C22]&amp;[Snippets.$C$19]&amp;[Translations.C22]&amp;[Snippets.$D$19]" office:value-type="string" office:string-value="&lt;label locale=&quot;it_CH&quot; preferred=&quot;1&quot;&gt;&lt;name_singular&gt;Ritratto d’impresa&lt;/name_singular&gt;&lt;name_plural&gt;Ritratto d’impresa&lt;/name_plural&gt;&lt;/label&gt;" calcext:value-type="string">
            <text:p>&lt;label locale="it_CH" preferred="1"&gt;&lt;name_singular&gt;Ritratto d’impresa&lt;/name_singular&gt;&lt;name_plural&gt;Ritratto d’impresa&lt;/name_plural&gt;&lt;/label&gt;</text:p>
          </table:table-cell>
          <table:table-cell table:formula="of:=[Snippets.$B$20]&amp;[Translations.D22]&amp;[Snippets.$C$20]&amp;[Translations.D22]&amp;[Snippets.$D$20]" office:value-type="string" office:string-value="&lt;label locale=&quot;rm_CH&quot; preferred=&quot;1&quot;&gt;&lt;name_singular&gt;Purtret da firma&lt;/name_singular&gt;&lt;name_plural&gt;Purtret da firma&lt;/name_plural&gt;&lt;/label&gt;" calcext:value-type="string">
            <text:p>&lt;label locale="rm_CH" preferred="1"&gt;&lt;name_singular&gt;Purtret da firma&lt;/name_singular&gt;&lt;name_plural&gt;Purtret da firma&lt;/name_plural&gt;&lt;/label&gt;</text:p>
          </table:table-cell>
          <table:table-cell table:formula="of:=[Snippets.$B$21]&amp;[Translations.E22]&amp;[Snippets.$C$21]&amp;[Translations.E22]&amp;[Snippets.$D$21]" office:value-type="string" office:string-value="&lt;label locale=&quot;en_US&quot; preferred=&quot;1&quot;&gt;&lt;name_singular&gt;Enterprise representation&lt;/name_singular&gt;&lt;name_plural&gt;Enterprise representation&lt;/name_plural&gt;&lt;/label&gt;" calcext:value-type="string">
            <text:p>&lt;label locale="en_US" preferred="1"&gt;&lt;name_singular&gt;Enterprise representation&lt;/name_singular&gt;&lt;name_plural&gt;Enterprise representation&lt;/name_plural&gt;&lt;/label&gt;</text:p>
          </table:table-cell>
          <table:table-cell table:formula="of:=[Snippets.B$15]&amp;[.B22]&amp;[Snippets.C$15]" office:value-type="string" office:string-value="&lt;item idno=&quot;firmenportraet&quot; enabled=&quot;1&quot; default=&quot;0&quot; value=&quot;0&quot;&gt;" calcext:value-type="string">
            <text:p>&lt;item idno="firmenportraet" enabled="1" default="0" value="0"&gt;</text:p>
          </table:table-cell>
          <table:table-cell table:formula="of:=[.H22]&amp;[Snippets.B$16]&amp;[.C22]&amp;[.D22]&amp;[.E22]&amp;[.F22]&amp;[.G22]&amp;[Snippets.B$22]&amp;[Snippets.B$23]" office:value-type="string" office:string-value="&lt;item idno=&quot;firmenportraet&quot; enabled=&quot;1&quot; default=&quot;0&quot; value=&quot;0&quot;&gt;&lt;labels&gt;&lt;label locale=&quot;de_CH&quot; preferred=&quot;1&quot;&gt;&lt;name_singular&gt;Firmenporträt&lt;/name_singular&gt;&lt;name_plural&gt;Firmenporträt&lt;/name_plural&gt;&lt;/label&gt;&lt;label locale=&quot;fr_CH&quot; preferred=&quot;1&quot;&gt;&lt;name_singular&gt;Portrait d'entreprise&lt;/name_singular&gt;&lt;name_plural&gt;Portrait d'entreprise&lt;/name_plural&gt;&lt;/label&gt;&lt;label locale=&quot;it_CH&quot; preferred=&quot;1&quot;&gt;&lt;name_singular&gt;Ritratto d’impresa&lt;/name_singular&gt;&lt;name_plural&gt;Ritratto d’impresa&lt;/name_plural&gt;&lt;/label&gt;&lt;label locale=&quot;rm_CH&quot; preferred=&quot;1&quot;&gt;&lt;name_singular&gt;Purtret da firma&lt;/name_singular&gt;&lt;name_plural&gt;Purtret da firma&lt;/name_plural&gt;&lt;/label&gt;&lt;label locale=&quot;en_US&quot; preferred=&quot;1&quot;&gt;&lt;name_singular&gt;Enterprise representation&lt;/name_singular&gt;&lt;name_plural&gt;Enterprise representation&lt;/name_plural&gt;&lt;/label&gt;&lt;/labels&gt;&lt;/item&gt;" calcext:value-type="string">
            <text:p>&lt;item idno="firmenportraet" enabled="1" default="0" value="0"&gt;&lt;labels&gt;&lt;label locale="de_CH" preferred="1"&gt;&lt;name_singular&gt;Firmenporträt&lt;/name_singular&gt;&lt;name_plural&gt;Firmenporträt&lt;/name_plural&gt;&lt;/label&gt;&lt;label locale="fr_CH" preferred="1"&gt;&lt;name_singular&gt;Portrait d'entreprise&lt;/name_singular&gt;&lt;name_plural&gt;Portrait d'entreprise&lt;/name_plural&gt;&lt;/label&gt;&lt;label locale="it_CH" preferred="1"&gt;&lt;name_singular&gt;Ritratto d’impresa&lt;/name_singular&gt;&lt;name_plural&gt;Ritratto d’impresa&lt;/name_plural&gt;&lt;/label&gt;&lt;label locale="rm_CH" preferred="1"&gt;&lt;name_singular&gt;Purtret da firma&lt;/name_singular&gt;&lt;name_plural&gt;Purtret da firma&lt;/name_plural&gt;&lt;/label&gt;&lt;label locale="en_US" preferred="1"&gt;&lt;name_singular&gt;Enterprise representation&lt;/name_singular&gt;&lt;name_plural&gt;Enterprise representation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Sport</text:p>
          </table:table-cell>
          <table:table-cell office:value-type="string" calcext:value-type="string">
            <text:p>sport</text:p>
          </table:table-cell>
          <table:table-cell table:formula="of:=[Snippets.$B$17]&amp;[Translations.A23]&amp;[Snippets.$C$17]&amp;[Translations.A23]&amp;[Snippets.$D$17]" office:value-type="string" office:string-value="&lt;label locale=&quot;de_CH&quot; preferred=&quot;1&quot;&gt;&lt;name_singular&gt;Sport&lt;/name_singular&gt;&lt;name_plural&gt;Sport&lt;/name_plural&gt;&lt;/label&gt;" calcext:value-type="string">
            <text:p>&lt;label locale="de_CH" preferred="1"&gt;&lt;name_singular&gt;Sport&lt;/name_singular&gt;&lt;name_plural&gt;Sport&lt;/name_plural&gt;&lt;/label&gt;</text:p>
          </table:table-cell>
          <table:table-cell table:formula="of:=[Snippets.$B$18]&amp;[Translations.B23]&amp;[Snippets.$C$18]&amp;[Translations.B23]&amp;[Snippets.$D$18]" office:value-type="string" office:string-value="&lt;label locale=&quot;fr_CH&quot; preferred=&quot;1&quot;&gt;&lt;name_singular&gt;Sport&lt;/name_singular&gt;&lt;name_plural&gt;Sport&lt;/name_plural&gt;&lt;/label&gt;" calcext:value-type="string">
            <text:p>&lt;label locale="fr_CH" preferred="1"&gt;&lt;name_singular&gt;Sport&lt;/name_singular&gt;&lt;name_plural&gt;Sport&lt;/name_plural&gt;&lt;/label&gt;</text:p>
          </table:table-cell>
          <table:table-cell table:formula="of:=[Snippets.$B$19]&amp;[Translations.C23]&amp;[Snippets.$C$19]&amp;[Translations.C23]&amp;[Snippets.$D$19]" office:value-type="string" office:string-value="&lt;label locale=&quot;it_CH&quot; preferred=&quot;1&quot;&gt;&lt;name_singular&gt;Sport&lt;/name_singular&gt;&lt;name_plural&gt;Sport&lt;/name_plural&gt;&lt;/label&gt;" calcext:value-type="string">
            <text:p>&lt;label locale="it_CH" preferred="1"&gt;&lt;name_singular&gt;Sport&lt;/name_singular&gt;&lt;name_plural&gt;Sport&lt;/name_plural&gt;&lt;/label&gt;</text:p>
          </table:table-cell>
          <table:table-cell table:formula="of:=[Snippets.$B$20]&amp;[Translations.D23]&amp;[Snippets.$C$20]&amp;[Translations.D23]&amp;[Snippets.$D$20]" office:value-type="string" office:string-value="&lt;label locale=&quot;rm_CH&quot; preferred=&quot;1&quot;&gt;&lt;name_singular&gt;Sport&lt;/name_singular&gt;&lt;name_plural&gt;Sport&lt;/name_plural&gt;&lt;/label&gt;" calcext:value-type="string">
            <text:p>&lt;label locale="rm_CH" preferred="1"&gt;&lt;name_singular&gt;Sport&lt;/name_singular&gt;&lt;name_plural&gt;Sport&lt;/name_plural&gt;&lt;/label&gt;</text:p>
          </table:table-cell>
          <table:table-cell table:formula="of:=[Snippets.$B$21]&amp;[Translations.E23]&amp;[Snippets.$C$21]&amp;[Translations.E23]&amp;[Snippets.$D$21]" office:value-type="string" office:string-value="&lt;label locale=&quot;en_US&quot; preferred=&quot;1&quot;&gt;&lt;name_singular&gt;Sports&lt;/name_singular&gt;&lt;name_plural&gt;Sports&lt;/name_plural&gt;&lt;/label&gt;" calcext:value-type="string">
            <text:p>&lt;label locale="en_US" preferred="1"&gt;&lt;name_singular&gt;Sports&lt;/name_singular&gt;&lt;name_plural&gt;Sports&lt;/name_plural&gt;&lt;/label&gt;</text:p>
          </table:table-cell>
          <table:table-cell table:formula="of:=[Snippets.B$15]&amp;[.B23]&amp;[Snippets.C$15]" office:value-type="string" office:string-value="&lt;item idno=&quot;sport&quot; enabled=&quot;1&quot; default=&quot;0&quot; value=&quot;0&quot;&gt;" calcext:value-type="string">
            <text:p>&lt;item idno="sport" enabled="1" default="0" value="0"&gt;</text:p>
          </table:table-cell>
          <table:table-cell table:formula="of:=[.H23]&amp;[Snippets.B$16]&amp;[.C23]&amp;[.D23]&amp;[.E23]&amp;[.F23]&amp;[.G23]&amp;[Snippets.B$22]&amp;[Snippets.B$23]" office:value-type="string" office:string-value="&lt;item idno=&quot;sport&quot; enabled=&quot;1&quot; default=&quot;0&quot; value=&quot;0&quot;&gt;&lt;labels&gt;&lt;label locale=&quot;de_CH&quot; preferred=&quot;1&quot;&gt;&lt;name_singular&gt;Sport&lt;/name_singular&gt;&lt;name_plural&gt;Sport&lt;/name_plural&gt;&lt;/label&gt;&lt;label locale=&quot;fr_CH&quot; preferred=&quot;1&quot;&gt;&lt;name_singular&gt;Sport&lt;/name_singular&gt;&lt;name_plural&gt;Sport&lt;/name_plural&gt;&lt;/label&gt;&lt;label locale=&quot;it_CH&quot; preferred=&quot;1&quot;&gt;&lt;name_singular&gt;Sport&lt;/name_singular&gt;&lt;name_plural&gt;Sport&lt;/name_plural&gt;&lt;/label&gt;&lt;label locale=&quot;rm_CH&quot; preferred=&quot;1&quot;&gt;&lt;name_singular&gt;Sport&lt;/name_singular&gt;&lt;name_plural&gt;Sport&lt;/name_plural&gt;&lt;/label&gt;&lt;label locale=&quot;en_US&quot; preferred=&quot;1&quot;&gt;&lt;name_singular&gt;Sports&lt;/name_singular&gt;&lt;name_plural&gt;Sports&lt;/name_plural&gt;&lt;/label&gt;&lt;/labels&gt;&lt;/item&gt;" calcext:value-type="string">
            <text:p>&lt;item idno="sport" enabled="1" default="0" value="0"&gt;&lt;labels&gt;&lt;label locale="de_CH" preferred="1"&gt;&lt;name_singular&gt;Sport&lt;/name_singular&gt;&lt;name_plural&gt;Sport&lt;/name_plural&gt;&lt;/label&gt;&lt;label locale="fr_CH" preferred="1"&gt;&lt;name_singular&gt;Sport&lt;/name_singular&gt;&lt;name_plural&gt;Sport&lt;/name_plural&gt;&lt;/label&gt;&lt;label locale="it_CH" preferred="1"&gt;&lt;name_singular&gt;Sport&lt;/name_singular&gt;&lt;name_plural&gt;Sport&lt;/name_plural&gt;&lt;/label&gt;&lt;label locale="rm_CH" preferred="1"&gt;&lt;name_singular&gt;Sport&lt;/name_singular&gt;&lt;name_plural&gt;Sport&lt;/name_plural&gt;&lt;/label&gt;&lt;label locale="en_US" preferred="1"&gt;&lt;name_singular&gt;Sports&lt;/name_singular&gt;&lt;name_plural&gt;Sports&lt;/name_plural&gt;&lt;/label&gt;&lt;/labels&gt;&lt;/item&gt;</text:p>
          </table:table-cell>
        </table:table-row>
        <table:table-row table:style-name="ro3">
          <table:table-cell table:style-name="ce2" office:value-type="string" calcext:value-type="string">
            <text:p>Unfall/Katastrophe</text:p>
          </table:table-cell>
          <table:table-cell table:style-name="ce2" office:value-type="string" calcext:value-type="string">
            <text:p>unfall</text:p>
          </table:table-cell>
          <table:table-cell table:formula="of:=[Snippets.$B$17]&amp;[Translations.A24]&amp;[Snippets.$C$17]&amp;[Translations.A24]&amp;[Snippets.$D$17]" office:value-type="string" office:string-value="&lt;label locale=&quot;de_CH&quot; preferred=&quot;1&quot;&gt;&lt;name_singular&gt;Unfall/Katastrophe&lt;/name_singular&gt;&lt;name_plural&gt;Unfall/Katastrophe&lt;/name_plural&gt;&lt;/label&gt;" calcext:value-type="string">
            <text:p>&lt;label locale="de_CH" preferred="1"&gt;&lt;name_singular&gt;Unfall/Katastrophe&lt;/name_singular&gt;&lt;name_plural&gt;Unfall/Katastrophe&lt;/name_plural&gt;&lt;/label&gt;</text:p>
          </table:table-cell>
          <table:table-cell table:formula="of:=[Snippets.$B$18]&amp;[Translations.B24]&amp;[Snippets.$C$18]&amp;[Translations.B24]&amp;[Snippets.$D$18]" office:value-type="string" office:string-value="&lt;label locale=&quot;fr_CH&quot; preferred=&quot;1&quot;&gt;&lt;name_singular&gt;Accident/catastrophe&lt;/name_singular&gt;&lt;name_plural&gt;Accident/catastrophe&lt;/name_plural&gt;&lt;/label&gt;" calcext:value-type="string">
            <text:p>&lt;label locale="fr_CH" preferred="1"&gt;&lt;name_singular&gt;Accident/catastrophe&lt;/name_singular&gt;&lt;name_plural&gt;Accident/catastrophe&lt;/name_plural&gt;&lt;/label&gt;</text:p>
          </table:table-cell>
          <table:table-cell table:formula="of:=[Snippets.$B$19]&amp;[Translations.C24]&amp;[Snippets.$C$19]&amp;[Translations.C24]&amp;[Snippets.$D$19]" office:value-type="string" office:string-value="&lt;label locale=&quot;it_CH&quot; preferred=&quot;1&quot;&gt;&lt;name_singular&gt;Incidente/catastrofe&lt;/name_singular&gt;&lt;name_plural&gt;Incidente/catastrofe&lt;/name_plural&gt;&lt;/label&gt;" calcext:value-type="string">
            <text:p>&lt;label locale="it_CH" preferred="1"&gt;&lt;name_singular&gt;Incidente/catastrofe&lt;/name_singular&gt;&lt;name_plural&gt;Incidente/catastrofe&lt;/name_plural&gt;&lt;/label&gt;</text:p>
          </table:table-cell>
          <table:table-cell table:formula="of:=[Snippets.$B$20]&amp;[Translations.D24]&amp;[Snippets.$C$20]&amp;[Translations.D24]&amp;[Snippets.$D$20]" office:value-type="string" office:string-value="&lt;label locale=&quot;rm_CH&quot; preferred=&quot;1&quot;&gt;&lt;name_singular&gt;Accident/catastrofa&lt;/name_singular&gt;&lt;name_plural&gt;Accident/catastrofa&lt;/name_plural&gt;&lt;/label&gt;" calcext:value-type="string">
            <text:p>&lt;label locale="rm_CH" preferred="1"&gt;&lt;name_singular&gt;Accident/catastrofa&lt;/name_singular&gt;&lt;name_plural&gt;Accident/catastrofa&lt;/name_plural&gt;&lt;/label&gt;</text:p>
          </table:table-cell>
          <table:table-cell table:formula="of:=[Snippets.$B$21]&amp;[Translations.E24]&amp;[Snippets.$C$21]&amp;[Translations.E24]&amp;[Snippets.$D$21]" office:value-type="string" office:string-value="&lt;label locale=&quot;en_US&quot; preferred=&quot;1&quot;&gt;&lt;name_singular&gt;Accident/catastrophy&lt;/name_singular&gt;&lt;name_plural&gt;Accident/catastrophy&lt;/name_plural&gt;&lt;/label&gt;" calcext:value-type="string">
            <text:p>&lt;label locale="en_US" preferred="1"&gt;&lt;name_singular&gt;Accident/catastrophy&lt;/name_singular&gt;&lt;name_plural&gt;Accident/catastrophy&lt;/name_plural&gt;&lt;/label&gt;</text:p>
          </table:table-cell>
          <table:table-cell table:formula="of:=[Snippets.B$15]&amp;[.B24]&amp;[Snippets.C$15]" office:value-type="string" office:string-value="&lt;item idno=&quot;unfall&quot; enabled=&quot;1&quot; default=&quot;0&quot; value=&quot;0&quot;&gt;" calcext:value-type="string">
            <text:p>&lt;item idno="unfall" enabled="1" default="0" value="0"&gt;</text:p>
          </table:table-cell>
          <table:table-cell table:formula="of:=[.H24]&amp;[Snippets.B$16]&amp;[.C24]&amp;[.D24]&amp;[.E24]&amp;[.F24]&amp;[.G24]&amp;[Snippets.B$22]&amp;[Snippets.B$23]" office:value-type="string" office:string-value="&lt;item idno=&quot;unfall&quot; enabled=&quot;1&quot; default=&quot;0&quot; value=&quot;0&quot;&gt;&lt;labels&gt;&lt;label locale=&quot;de_CH&quot; preferred=&quot;1&quot;&gt;&lt;name_singular&gt;Unfall/Katastrophe&lt;/name_singular&gt;&lt;name_plural&gt;Unfall/Katastrophe&lt;/name_plural&gt;&lt;/label&gt;&lt;label locale=&quot;fr_CH&quot; preferred=&quot;1&quot;&gt;&lt;name_singular&gt;Accident/catastrophe&lt;/name_singular&gt;&lt;name_plural&gt;Accident/catastrophe&lt;/name_plural&gt;&lt;/label&gt;&lt;label locale=&quot;it_CH&quot; preferred=&quot;1&quot;&gt;&lt;name_singular&gt;Incidente/catastrofe&lt;/name_singular&gt;&lt;name_plural&gt;Incidente/catastrofe&lt;/name_plural&gt;&lt;/label&gt;&lt;label locale=&quot;rm_CH&quot; preferred=&quot;1&quot;&gt;&lt;name_singular&gt;Accident/catastrofa&lt;/name_singular&gt;&lt;name_plural&gt;Accident/catastrofa&lt;/name_plural&gt;&lt;/label&gt;&lt;label locale=&quot;en_US&quot; preferred=&quot;1&quot;&gt;&lt;name_singular&gt;Accident/catastrophy&lt;/name_singular&gt;&lt;name_plural&gt;Accident/catastrophy&lt;/name_plural&gt;&lt;/label&gt;&lt;/labels&gt;&lt;/item&gt;" calcext:value-type="string">
            <text:p>&lt;item idno="unfall" enabled="1" default="0" value="0"&gt;&lt;labels&gt;&lt;label locale="de_CH" preferred="1"&gt;&lt;name_singular&gt;Unfall/Katastrophe&lt;/name_singular&gt;&lt;name_plural&gt;Unfall/Katastrophe&lt;/name_plural&gt;&lt;/label&gt;&lt;label locale="fr_CH" preferred="1"&gt;&lt;name_singular&gt;Accident/catastrophe&lt;/name_singular&gt;&lt;name_plural&gt;Accident/catastrophe&lt;/name_plural&gt;&lt;/label&gt;&lt;label locale="it_CH" preferred="1"&gt;&lt;name_singular&gt;Incidente/catastrofe&lt;/name_singular&gt;&lt;name_plural&gt;Incidente/catastrofe&lt;/name_plural&gt;&lt;/label&gt;&lt;label locale="rm_CH" preferred="1"&gt;&lt;name_singular&gt;Accident/catastrofa&lt;/name_singular&gt;&lt;name_plural&gt;Accident/catastrofa&lt;/name_plural&gt;&lt;/label&gt;&lt;label locale="en_US" preferred="1"&gt;&lt;name_singular&gt;Accident/catastrophy&lt;/name_singular&gt;&lt;name_plural&gt;Accident/catastrophy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Verkehr</text:p>
          </table:table-cell>
          <table:table-cell office:value-type="string" calcext:value-type="string">
            <text:p>verkehr</text:p>
          </table:table-cell>
          <table:table-cell table:formula="of:=[Snippets.$B$17]&amp;[Translations.A25]&amp;[Snippets.$C$17]&amp;[Translations.A25]&amp;[Snippets.$D$17]" office:value-type="string" office:string-value="&lt;label locale=&quot;de_CH&quot; preferred=&quot;1&quot;&gt;&lt;name_singular&gt;Verkehr&lt;/name_singular&gt;&lt;name_plural&gt;Verkehr&lt;/name_plural&gt;&lt;/label&gt;" calcext:value-type="string">
            <text:p>&lt;label locale="de_CH" preferred="1"&gt;&lt;name_singular&gt;Verkehr&lt;/name_singular&gt;&lt;name_plural&gt;Verkehr&lt;/name_plural&gt;&lt;/label&gt;</text:p>
          </table:table-cell>
          <table:table-cell table:formula="of:=[Snippets.$B$18]&amp;[Translations.B25]&amp;[Snippets.$C$18]&amp;[Translations.B25]&amp;[Snippets.$D$18]" office:value-type="string" office:string-value="&lt;label locale=&quot;fr_CH&quot; preferred=&quot;1&quot;&gt;&lt;name_singular&gt;Transport&lt;/name_singular&gt;&lt;name_plural&gt;Transport&lt;/name_plural&gt;&lt;/label&gt;" calcext:value-type="string">
            <text:p>&lt;label locale="fr_CH" preferred="1"&gt;&lt;name_singular&gt;Transport&lt;/name_singular&gt;&lt;name_plural&gt;Transport&lt;/name_plural&gt;&lt;/label&gt;</text:p>
          </table:table-cell>
          <table:table-cell table:formula="of:=[Snippets.$B$19]&amp;[Translations.C25]&amp;[Snippets.$C$19]&amp;[Translations.C25]&amp;[Snippets.$D$19]" office:value-type="string" office:string-value="&lt;label locale=&quot;it_CH&quot; preferred=&quot;1&quot;&gt;&lt;name_singular&gt;Trasporti&lt;/name_singular&gt;&lt;name_plural&gt;Trasporti&lt;/name_plural&gt;&lt;/label&gt;" calcext:value-type="string">
            <text:p>&lt;label locale="it_CH" preferred="1"&gt;&lt;name_singular&gt;Trasporti&lt;/name_singular&gt;&lt;name_plural&gt;Trasporti&lt;/name_plural&gt;&lt;/label&gt;</text:p>
          </table:table-cell>
          <table:table-cell table:formula="of:=[Snippets.$B$20]&amp;[Translations.D25]&amp;[Snippets.$C$20]&amp;[Translations.D25]&amp;[Snippets.$D$20]" office:value-type="string" office:string-value="&lt;label locale=&quot;rm_CH&quot; preferred=&quot;1&quot;&gt;&lt;name_singular&gt;Traffic&lt;/name_singular&gt;&lt;name_plural&gt;Traffic&lt;/name_plural&gt;&lt;/label&gt;" calcext:value-type="string">
            <text:p>&lt;label locale="rm_CH" preferred="1"&gt;&lt;name_singular&gt;Traffic&lt;/name_singular&gt;&lt;name_plural&gt;Traffic&lt;/name_plural&gt;&lt;/label&gt;</text:p>
          </table:table-cell>
          <table:table-cell table:formula="of:=[Snippets.$B$21]&amp;[Translations.E25]&amp;[Snippets.$C$21]&amp;[Translations.E25]&amp;[Snippets.$D$21]" office:value-type="string" office:string-value="&lt;label locale=&quot;en_US&quot; preferred=&quot;1&quot;&gt;&lt;name_singular&gt;Traffic&lt;/name_singular&gt;&lt;name_plural&gt;Traffic&lt;/name_plural&gt;&lt;/label&gt;" calcext:value-type="string">
            <text:p>&lt;label locale="en_US" preferred="1"&gt;&lt;name_singular&gt;Traffic&lt;/name_singular&gt;&lt;name_plural&gt;Traffic&lt;/name_plural&gt;&lt;/label&gt;</text:p>
          </table:table-cell>
          <table:table-cell table:formula="of:=[Snippets.B$15]&amp;[.B25]&amp;[Snippets.C$15]" office:value-type="string" office:string-value="&lt;item idno=&quot;verkehr&quot; enabled=&quot;1&quot; default=&quot;0&quot; value=&quot;0&quot;&gt;" calcext:value-type="string">
            <text:p>&lt;item idno="verkehr" enabled="1" default="0" value="0"&gt;</text:p>
          </table:table-cell>
          <table:table-cell table:formula="of:=[.H25]&amp;[Snippets.B$16]&amp;[.C25]&amp;[.D25]&amp;[.E25]&amp;[.F25]&amp;[.G25]&amp;[Snippets.B$22]&amp;[Snippets.B$23]" office:value-type="string" office:string-value="&lt;item idno=&quot;verkehr&quot; enabled=&quot;1&quot; default=&quot;0&quot; value=&quot;0&quot;&gt;&lt;labels&gt;&lt;label locale=&quot;de_CH&quot; preferred=&quot;1&quot;&gt;&lt;name_singular&gt;Verkehr&lt;/name_singular&gt;&lt;name_plural&gt;Verkehr&lt;/name_plural&gt;&lt;/label&gt;&lt;label locale=&quot;fr_CH&quot; preferred=&quot;1&quot;&gt;&lt;name_singular&gt;Transport&lt;/name_singular&gt;&lt;name_plural&gt;Transport&lt;/name_plural&gt;&lt;/label&gt;&lt;label locale=&quot;it_CH&quot; preferred=&quot;1&quot;&gt;&lt;name_singular&gt;Trasporti&lt;/name_singular&gt;&lt;name_plural&gt;Trasporti&lt;/name_plural&gt;&lt;/label&gt;&lt;label locale=&quot;rm_CH&quot; preferred=&quot;1&quot;&gt;&lt;name_singular&gt;Traffic&lt;/name_singular&gt;&lt;name_plural&gt;Traffic&lt;/name_plural&gt;&lt;/label&gt;&lt;label locale=&quot;en_US&quot; preferred=&quot;1&quot;&gt;&lt;name_singular&gt;Traffic&lt;/name_singular&gt;&lt;name_plural&gt;Traffic&lt;/name_plural&gt;&lt;/label&gt;&lt;/labels&gt;&lt;/item&gt;" calcext:value-type="string">
            <text:p>&lt;item idno="verkehr" enabled="1" default="0" value="0"&gt;&lt;labels&gt;&lt;label locale="de_CH" preferred="1"&gt;&lt;name_singular&gt;Verkehr&lt;/name_singular&gt;&lt;name_plural&gt;Verkehr&lt;/name_plural&gt;&lt;/label&gt;&lt;label locale="fr_CH" preferred="1"&gt;&lt;name_singular&gt;Transport&lt;/name_singular&gt;&lt;name_plural&gt;Transport&lt;/name_plural&gt;&lt;/label&gt;&lt;label locale="it_CH" preferred="1"&gt;&lt;name_singular&gt;Trasporti&lt;/name_singular&gt;&lt;name_plural&gt;Trasporti&lt;/name_plural&gt;&lt;/label&gt;&lt;label locale="rm_CH" preferred="1"&gt;&lt;name_singular&gt;Traffic&lt;/name_singular&gt;&lt;name_plural&gt;Traffic&lt;/name_plural&gt;&lt;/label&gt;&lt;label locale="en_US" preferred="1"&gt;&lt;name_singular&gt;Traffic&lt;/name_singular&gt;&lt;name_plural&gt;Traffic&lt;/name_plural&gt;&lt;/label&gt;&lt;/labels&gt;&lt;/item&gt;</text:p>
          </table:table-cell>
        </table:table-row>
        <table:table-row table:style-name="ro3">
          <table:table-cell table:style-name="ce1" office:value-type="string" calcext:value-type="string">
            <text:p>Militär</text:p>
          </table:table-cell>
          <table:table-cell table:style-name="ce1" office:value-type="string" calcext:value-type="string">
            <text:p>militaer</text:p>
          </table:table-cell>
          <table:table-cell table:formula="of:=[Snippets.$B$17]&amp;[Translations.A26]&amp;[Snippets.$C$17]&amp;[Translations.A26]&amp;[Snippets.$D$17]" office:value-type="string" office:string-value="&lt;label locale=&quot;de_CH&quot; preferred=&quot;1&quot;&gt;&lt;name_singular&gt;Militär&lt;/name_singular&gt;&lt;name_plural&gt;Militär&lt;/name_plural&gt;&lt;/label&gt;" calcext:value-type="string">
            <text:p>&lt;label locale="de_CH" preferred="1"&gt;&lt;name_singular&gt;Militär&lt;/name_singular&gt;&lt;name_plural&gt;Militär&lt;/name_plural&gt;&lt;/label&gt;</text:p>
          </table:table-cell>
          <table:table-cell table:formula="of:=[Snippets.$B$18]&amp;[Translations.B26]&amp;[Snippets.$C$18]&amp;[Translations.B26]&amp;[Snippets.$D$18]" office:value-type="string" office:string-value="&lt;label locale=&quot;fr_CH&quot; preferred=&quot;1&quot;&gt;&lt;name_singular&gt;Militaire&lt;/name_singular&gt;&lt;name_plural&gt;Militaire&lt;/name_plural&gt;&lt;/label&gt;" calcext:value-type="string">
            <text:p>&lt;label locale="fr_CH" preferred="1"&gt;&lt;name_singular&gt;Militaire&lt;/name_singular&gt;&lt;name_plural&gt;Militaire&lt;/name_plural&gt;&lt;/label&gt;</text:p>
          </table:table-cell>
          <table:table-cell table:formula="of:=[Snippets.$B$19]&amp;[Translations.C26]&amp;[Snippets.$C$19]&amp;[Translations.C26]&amp;[Snippets.$D$19]" office:value-type="string" office:string-value="&lt;label locale=&quot;it_CH&quot; preferred=&quot;1&quot;&gt;&lt;name_singular&gt;Militare&lt;/name_singular&gt;&lt;name_plural&gt;Militare&lt;/name_plural&gt;&lt;/label&gt;" calcext:value-type="string">
            <text:p>&lt;label locale="it_CH" preferred="1"&gt;&lt;name_singular&gt;Militare&lt;/name_singular&gt;&lt;name_plural&gt;Militare&lt;/name_plural&gt;&lt;/label&gt;</text:p>
          </table:table-cell>
          <table:table-cell table:formula="of:=[Snippets.$B$20]&amp;[Translations.D26]&amp;[Snippets.$C$20]&amp;[Translations.D26]&amp;[Snippets.$D$20]" office:value-type="string" office:string-value="&lt;label locale=&quot;rm_CH&quot; preferred=&quot;1&quot;&gt;&lt;name_singular&gt;Militar&lt;/name_singular&gt;&lt;name_plural&gt;Militar&lt;/name_plural&gt;&lt;/label&gt;" calcext:value-type="string">
            <text:p>&lt;label locale="rm_CH" preferred="1"&gt;&lt;name_singular&gt;Militar&lt;/name_singular&gt;&lt;name_plural&gt;Militar&lt;/name_plural&gt;&lt;/label&gt;</text:p>
          </table:table-cell>
          <table:table-cell table:formula="of:=[Snippets.$B$21]&amp;[Translations.E26]&amp;[Snippets.$C$21]&amp;[Translations.E26]&amp;[Snippets.$D$21]" office:value-type="string" office:string-value="&lt;label locale=&quot;en_US&quot; preferred=&quot;1&quot;&gt;&lt;name_singular&gt;Military&lt;/name_singular&gt;&lt;name_plural&gt;Military&lt;/name_plural&gt;&lt;/label&gt;" calcext:value-type="string">
            <text:p>&lt;label locale="en_US" preferred="1"&gt;&lt;name_singular&gt;Military&lt;/name_singular&gt;&lt;name_plural&gt;Military&lt;/name_plural&gt;&lt;/label&gt;</text:p>
          </table:table-cell>
          <table:table-cell table:formula="of:=[Snippets.B$15]&amp;[.B26]&amp;[Snippets.C$15]" office:value-type="string" office:string-value="&lt;item idno=&quot;militaer&quot; enabled=&quot;1&quot; default=&quot;0&quot; value=&quot;0&quot;&gt;" calcext:value-type="string">
            <text:p>&lt;item idno="militaer" enabled="1" default="0" value="0"&gt;</text:p>
          </table:table-cell>
          <table:table-cell table:formula="of:=[.H26]&amp;[Snippets.B$16]&amp;[.C26]&amp;[.D26]&amp;[.E26]&amp;[.F26]&amp;[.G26]&amp;[Snippets.B$22]&amp;[Snippets.B$23]" office:value-type="string" office:string-value="&lt;item idno=&quot;militaer&quot; enabled=&quot;1&quot; default=&quot;0&quot; value=&quot;0&quot;&gt;&lt;labels&gt;&lt;label locale=&quot;de_CH&quot; preferred=&quot;1&quot;&gt;&lt;name_singular&gt;Militär&lt;/name_singular&gt;&lt;name_plural&gt;Militär&lt;/name_plural&gt;&lt;/label&gt;&lt;label locale=&quot;fr_CH&quot; preferred=&quot;1&quot;&gt;&lt;name_singular&gt;Militaire&lt;/name_singular&gt;&lt;name_plural&gt;Militaire&lt;/name_plural&gt;&lt;/label&gt;&lt;label locale=&quot;it_CH&quot; preferred=&quot;1&quot;&gt;&lt;name_singular&gt;Militare&lt;/name_singular&gt;&lt;name_plural&gt;Militare&lt;/name_plural&gt;&lt;/label&gt;&lt;label locale=&quot;rm_CH&quot; preferred=&quot;1&quot;&gt;&lt;name_singular&gt;Militar&lt;/name_singular&gt;&lt;name_plural&gt;Militar&lt;/name_plural&gt;&lt;/label&gt;&lt;label locale=&quot;en_US&quot; preferred=&quot;1&quot;&gt;&lt;name_singular&gt;Military&lt;/name_singular&gt;&lt;name_plural&gt;Military&lt;/name_plural&gt;&lt;/label&gt;&lt;/labels&gt;&lt;/item&gt;" calcext:value-type="string">
            <text:p>&lt;item idno="militaer" enabled="1" default="0" value="0"&gt;&lt;labels&gt;&lt;label locale="de_CH" preferred="1"&gt;&lt;name_singular&gt;Militär&lt;/name_singular&gt;&lt;name_plural&gt;Militär&lt;/name_plural&gt;&lt;/label&gt;&lt;label locale="fr_CH" preferred="1"&gt;&lt;name_singular&gt;Militaire&lt;/name_singular&gt;&lt;name_plural&gt;Militaire&lt;/name_plural&gt;&lt;/label&gt;&lt;label locale="it_CH" preferred="1"&gt;&lt;name_singular&gt;Militare&lt;/name_singular&gt;&lt;name_plural&gt;Militare&lt;/name_plural&gt;&lt;/label&gt;&lt;label locale="rm_CH" preferred="1"&gt;&lt;name_singular&gt;Militar&lt;/name_singular&gt;&lt;name_plural&gt;Militar&lt;/name_plural&gt;&lt;/label&gt;&lt;label locale="en_US" preferred="1"&gt;&lt;name_singular&gt;Military&lt;/name_singular&gt;&lt;name_plural&gt;Military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Ethnologie</text:p>
          </table:table-cell>
          <table:table-cell office:value-type="string" calcext:value-type="string">
            <text:p>ethnologie</text:p>
          </table:table-cell>
          <table:table-cell table:formula="of:=[Snippets.$B$17]&amp;[Translations.A27]&amp;[Snippets.$C$17]&amp;[Translations.A27]&amp;[Snippets.$D$17]" office:value-type="string" office:string-value="&lt;label locale=&quot;de_CH&quot; preferred=&quot;1&quot;&gt;&lt;name_singular&gt;Ethnologie&lt;/name_singular&gt;&lt;name_plural&gt;Ethnologie&lt;/name_plural&gt;&lt;/label&gt;" calcext:value-type="string">
            <text:p>&lt;label locale="de_CH" preferred="1"&gt;&lt;name_singular&gt;Ethnologie&lt;/name_singular&gt;&lt;name_plural&gt;Ethnologie&lt;/name_plural&gt;&lt;/label&gt;</text:p>
          </table:table-cell>
          <table:table-cell table:formula="of:=[Snippets.$B$18]&amp;[Translations.B27]&amp;[Snippets.$C$18]&amp;[Translations.B27]&amp;[Snippets.$D$18]" office:value-type="string" office:string-value="&lt;label locale=&quot;fr_CH&quot; preferred=&quot;1&quot;&gt;&lt;name_singular&gt;Ethnologie&lt;/name_singular&gt;&lt;name_plural&gt;Ethnologie&lt;/name_plural&gt;&lt;/label&gt;" calcext:value-type="string">
            <text:p>&lt;label locale="fr_CH" preferred="1"&gt;&lt;name_singular&gt;Ethnologie&lt;/name_singular&gt;&lt;name_plural&gt;Ethnologie&lt;/name_plural&gt;&lt;/label&gt;</text:p>
          </table:table-cell>
          <table:table-cell table:formula="of:=[Snippets.$B$19]&amp;[Translations.C27]&amp;[Snippets.$C$19]&amp;[Translations.C27]&amp;[Snippets.$D$19]" office:value-type="string" office:string-value="&lt;label locale=&quot;it_CH&quot; preferred=&quot;1&quot;&gt;&lt;name_singular&gt;Etnologia&lt;/name_singular&gt;&lt;name_plural&gt;Etnologia&lt;/name_plural&gt;&lt;/label&gt;" calcext:value-type="string">
            <text:p>&lt;label locale="it_CH" preferred="1"&gt;&lt;name_singular&gt;Etnologia&lt;/name_singular&gt;&lt;name_plural&gt;Etnologia&lt;/name_plural&gt;&lt;/label&gt;</text:p>
          </table:table-cell>
          <table:table-cell table:formula="of:=[Snippets.$B$20]&amp;[Translations.D27]&amp;[Snippets.$C$20]&amp;[Translations.D27]&amp;[Snippets.$D$20]" office:value-type="string" office:string-value="&lt;label locale=&quot;rm_CH&quot; preferred=&quot;1&quot;&gt;&lt;name_singular&gt;Etnologia&lt;/name_singular&gt;&lt;name_plural&gt;Etnologia&lt;/name_plural&gt;&lt;/label&gt;" calcext:value-type="string">
            <text:p>&lt;label locale="rm_CH" preferred="1"&gt;&lt;name_singular&gt;Etnologia&lt;/name_singular&gt;&lt;name_plural&gt;Etnologia&lt;/name_plural&gt;&lt;/label&gt;</text:p>
          </table:table-cell>
          <table:table-cell table:formula="of:=[Snippets.$B$21]&amp;[Translations.E27]&amp;[Snippets.$C$21]&amp;[Translations.E27]&amp;[Snippets.$D$21]" office:value-type="string" office:string-value="&lt;label locale=&quot;en_US&quot; preferred=&quot;1&quot;&gt;&lt;name_singular&gt;Anthropology&lt;/name_singular&gt;&lt;name_plural&gt;Anthropology&lt;/name_plural&gt;&lt;/label&gt;" calcext:value-type="string">
            <text:p>&lt;label locale="en_US" preferred="1"&gt;&lt;name_singular&gt;Anthropology&lt;/name_singular&gt;&lt;name_plural&gt;Anthropology&lt;/name_plural&gt;&lt;/label&gt;</text:p>
          </table:table-cell>
          <table:table-cell table:formula="of:=[Snippets.B$15]&amp;[.B27]&amp;[Snippets.C$15]" office:value-type="string" office:string-value="&lt;item idno=&quot;ethnologie&quot; enabled=&quot;1&quot; default=&quot;0&quot; value=&quot;0&quot;&gt;" calcext:value-type="string">
            <text:p>&lt;item idno="ethnologie" enabled="1" default="0" value="0"&gt;</text:p>
          </table:table-cell>
          <table:table-cell table:formula="of:=[.H27]&amp;[Snippets.B$16]&amp;[.C27]&amp;[.D27]&amp;[.E27]&amp;[.F27]&amp;[.G27]&amp;[Snippets.B$22]&amp;[Snippets.B$23]" office:value-type="string" office:string-value="&lt;item idno=&quot;ethnologie&quot; enabled=&quot;1&quot; default=&quot;0&quot; value=&quot;0&quot;&gt;&lt;labels&gt;&lt;label locale=&quot;de_CH&quot; preferred=&quot;1&quot;&gt;&lt;name_singular&gt;Ethnologie&lt;/name_singular&gt;&lt;name_plural&gt;Ethnologie&lt;/name_plural&gt;&lt;/label&gt;&lt;label locale=&quot;fr_CH&quot; preferred=&quot;1&quot;&gt;&lt;name_singular&gt;Ethnologie&lt;/name_singular&gt;&lt;name_plural&gt;Ethnologie&lt;/name_plural&gt;&lt;/label&gt;&lt;label locale=&quot;it_CH&quot; preferred=&quot;1&quot;&gt;&lt;name_singular&gt;Etnologia&lt;/name_singular&gt;&lt;name_plural&gt;Etnologia&lt;/name_plural&gt;&lt;/label&gt;&lt;label locale=&quot;rm_CH&quot; preferred=&quot;1&quot;&gt;&lt;name_singular&gt;Etnologia&lt;/name_singular&gt;&lt;name_plural&gt;Etnologia&lt;/name_plural&gt;&lt;/label&gt;&lt;label locale=&quot;en_US&quot; preferred=&quot;1&quot;&gt;&lt;name_singular&gt;Anthropology&lt;/name_singular&gt;&lt;name_plural&gt;Anthropology&lt;/name_plural&gt;&lt;/label&gt;&lt;/labels&gt;&lt;/item&gt;" calcext:value-type="string">
            <text:p>&lt;item idno="ethnologie" enabled="1" default="0" value="0"&gt;&lt;labels&gt;&lt;label locale="de_CH" preferred="1"&gt;&lt;name_singular&gt;Ethnologie&lt;/name_singular&gt;&lt;name_plural&gt;Ethnologie&lt;/name_plural&gt;&lt;/label&gt;&lt;label locale="fr_CH" preferred="1"&gt;&lt;name_singular&gt;Ethnologie&lt;/name_singular&gt;&lt;name_plural&gt;Ethnologie&lt;/name_plural&gt;&lt;/label&gt;&lt;label locale="it_CH" preferred="1"&gt;&lt;name_singular&gt;Etnologia&lt;/name_singular&gt;&lt;name_plural&gt;Etnologia&lt;/name_plural&gt;&lt;/label&gt;&lt;label locale="rm_CH" preferred="1"&gt;&lt;name_singular&gt;Etnologia&lt;/name_singular&gt;&lt;name_plural&gt;Etnologia&lt;/name_plural&gt;&lt;/label&gt;&lt;label locale="en_US" preferred="1"&gt;&lt;name_singular&gt;Anthropology&lt;/name_singular&gt;&lt;name_plural&gt;Anthropology&lt;/name_plural&gt;&lt;/label&gt;&lt;/labels&gt;&lt;/item&gt;</text:p>
          </table:table-cell>
        </table:table-row>
        <table:table-row table:style-name="ro3">
          <table:table-cell table:style-name="ce1" office:value-type="string" calcext:value-type="string">
            <text:p>Archäologie</text:p>
          </table:table-cell>
          <table:table-cell table:style-name="ce1" office:value-type="string" calcext:value-type="string">
            <text:p>archaeologie</text:p>
          </table:table-cell>
          <table:table-cell table:formula="of:=[Snippets.$B$17]&amp;[Translations.A28]&amp;[Snippets.$C$17]&amp;[Translations.A28]&amp;[Snippets.$D$17]" office:value-type="string" office:string-value="&lt;label locale=&quot;de_CH&quot; preferred=&quot;1&quot;&gt;&lt;name_singular&gt;Archäologie&lt;/name_singular&gt;&lt;name_plural&gt;Archäologie&lt;/name_plural&gt;&lt;/label&gt;" calcext:value-type="string">
            <text:p>&lt;label locale="de_CH" preferred="1"&gt;&lt;name_singular&gt;Archäologie&lt;/name_singular&gt;&lt;name_plural&gt;Archäologie&lt;/name_plural&gt;&lt;/label&gt;</text:p>
          </table:table-cell>
          <table:table-cell table:formula="of:=[Snippets.$B$18]&amp;[Translations.B28]&amp;[Snippets.$C$18]&amp;[Translations.B28]&amp;[Snippets.$D$18]" office:value-type="string" office:string-value="&lt;label locale=&quot;fr_CH&quot; preferred=&quot;1&quot;&gt;&lt;name_singular&gt;Archéologie&lt;/name_singular&gt;&lt;name_plural&gt;Archéologie&lt;/name_plural&gt;&lt;/label&gt;" calcext:value-type="string">
            <text:p>&lt;label locale="fr_CH" preferred="1"&gt;&lt;name_singular&gt;Archéologie&lt;/name_singular&gt;&lt;name_plural&gt;Archéologie&lt;/name_plural&gt;&lt;/label&gt;</text:p>
          </table:table-cell>
          <table:table-cell table:formula="of:=[Snippets.$B$19]&amp;[Translations.C28]&amp;[Snippets.$C$19]&amp;[Translations.C28]&amp;[Snippets.$D$19]" office:value-type="string" office:string-value="&lt;label locale=&quot;it_CH&quot; preferred=&quot;1&quot;&gt;&lt;name_singular&gt;Archeologia&lt;/name_singular&gt;&lt;name_plural&gt;Archeologia&lt;/name_plural&gt;&lt;/label&gt;" calcext:value-type="string">
            <text:p>&lt;label locale="it_CH" preferred="1"&gt;&lt;name_singular&gt;Archeologia&lt;/name_singular&gt;&lt;name_plural&gt;Archeologia&lt;/name_plural&gt;&lt;/label&gt;</text:p>
          </table:table-cell>
          <table:table-cell table:formula="of:=[Snippets.$B$20]&amp;[Translations.D28]&amp;[Snippets.$C$20]&amp;[Translations.D28]&amp;[Snippets.$D$20]" office:value-type="string" office:string-value="&lt;label locale=&quot;rm_CH&quot; preferred=&quot;1&quot;&gt;&lt;name_singular&gt;Archeologia&lt;/name_singular&gt;&lt;name_plural&gt;Archeologia&lt;/name_plural&gt;&lt;/label&gt;" calcext:value-type="string">
            <text:p>&lt;label locale="rm_CH" preferred="1"&gt;&lt;name_singular&gt;Archeologia&lt;/name_singular&gt;&lt;name_plural&gt;Archeologia&lt;/name_plural&gt;&lt;/label&gt;</text:p>
          </table:table-cell>
          <table:table-cell table:formula="of:=[Snippets.$B$21]&amp;[Translations.E28]&amp;[Snippets.$C$21]&amp;[Translations.E28]&amp;[Snippets.$D$21]" office:value-type="string" office:string-value="&lt;label locale=&quot;en_US&quot; preferred=&quot;1&quot;&gt;&lt;name_singular&gt;Archaeology&lt;/name_singular&gt;&lt;name_plural&gt;Archaeology&lt;/name_plural&gt;&lt;/label&gt;" calcext:value-type="string">
            <text:p>&lt;label locale="en_US" preferred="1"&gt;&lt;name_singular&gt;Archaeology&lt;/name_singular&gt;&lt;name_plural&gt;Archaeology&lt;/name_plural&gt;&lt;/label&gt;</text:p>
          </table:table-cell>
          <table:table-cell table:formula="of:=[Snippets.B$15]&amp;[.B28]&amp;[Snippets.C$15]" office:value-type="string" office:string-value="&lt;item idno=&quot;archaeologie&quot; enabled=&quot;1&quot; default=&quot;0&quot; value=&quot;0&quot;&gt;" calcext:value-type="string">
            <text:p>&lt;item idno="archaeologie" enabled="1" default="0" value="0"&gt;</text:p>
          </table:table-cell>
          <table:table-cell table:formula="of:=[.H28]&amp;[Snippets.B$16]&amp;[.C28]&amp;[.D28]&amp;[.E28]&amp;[.F28]&amp;[.G28]&amp;[Snippets.B$22]&amp;[Snippets.B$23]" office:value-type="string" office:string-value="&lt;item idno=&quot;archaeologie&quot; enabled=&quot;1&quot; default=&quot;0&quot; value=&quot;0&quot;&gt;&lt;labels&gt;&lt;label locale=&quot;de_CH&quot; preferred=&quot;1&quot;&gt;&lt;name_singular&gt;Archäologie&lt;/name_singular&gt;&lt;name_plural&gt;Archäologie&lt;/name_plural&gt;&lt;/label&gt;&lt;label locale=&quot;fr_CH&quot; preferred=&quot;1&quot;&gt;&lt;name_singular&gt;Archéologie&lt;/name_singular&gt;&lt;name_plural&gt;Archéologie&lt;/name_plural&gt;&lt;/label&gt;&lt;label locale=&quot;it_CH&quot; preferred=&quot;1&quot;&gt;&lt;name_singular&gt;Archeologia&lt;/name_singular&gt;&lt;name_plural&gt;Archeologia&lt;/name_plural&gt;&lt;/label&gt;&lt;label locale=&quot;rm_CH&quot; preferred=&quot;1&quot;&gt;&lt;name_singular&gt;Archeologia&lt;/name_singular&gt;&lt;name_plural&gt;Archeologia&lt;/name_plural&gt;&lt;/label&gt;&lt;label locale=&quot;en_US&quot; preferred=&quot;1&quot;&gt;&lt;name_singular&gt;Archaeology&lt;/name_singular&gt;&lt;name_plural&gt;Archaeology&lt;/name_plural&gt;&lt;/label&gt;&lt;/labels&gt;&lt;/item&gt;" calcext:value-type="string">
            <text:p>&lt;item idno="archaeologie" enabled="1" default="0" value="0"&gt;&lt;labels&gt;&lt;label locale="de_CH" preferred="1"&gt;&lt;name_singular&gt;Archäologie&lt;/name_singular&gt;&lt;name_plural&gt;Archäologie&lt;/name_plural&gt;&lt;/label&gt;&lt;label locale="fr_CH" preferred="1"&gt;&lt;name_singular&gt;Archéologie&lt;/name_singular&gt;&lt;name_plural&gt;Archéologie&lt;/name_plural&gt;&lt;/label&gt;&lt;label locale="it_CH" preferred="1"&gt;&lt;name_singular&gt;Archeologia&lt;/name_singular&gt;&lt;name_plural&gt;Archeologia&lt;/name_plural&gt;&lt;/label&gt;&lt;label locale="rm_CH" preferred="1"&gt;&lt;name_singular&gt;Archeologia&lt;/name_singular&gt;&lt;name_plural&gt;Archeologia&lt;/name_plural&gt;&lt;/label&gt;&lt;label locale="en_US" preferred="1"&gt;&lt;name_singular&gt;Archaeology&lt;/name_singular&gt;&lt;name_plural&gt;Archaeology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Medizin</text:p>
          </table:table-cell>
          <table:table-cell office:value-type="string" calcext:value-type="string">
            <text:p>medizin</text:p>
          </table:table-cell>
          <table:table-cell table:formula="of:=[Snippets.$B$17]&amp;[Translations.A29]&amp;[Snippets.$C$17]&amp;[Translations.A29]&amp;[Snippets.$D$17]" office:value-type="string" office:string-value="&lt;label locale=&quot;de_CH&quot; preferred=&quot;1&quot;&gt;&lt;name_singular&gt;Medizin&lt;/name_singular&gt;&lt;name_plural&gt;Medizin&lt;/name_plural&gt;&lt;/label&gt;" calcext:value-type="string">
            <text:p>&lt;label locale="de_CH" preferred="1"&gt;&lt;name_singular&gt;Medizin&lt;/name_singular&gt;&lt;name_plural&gt;Medizin&lt;/name_plural&gt;&lt;/label&gt;</text:p>
          </table:table-cell>
          <table:table-cell table:formula="of:=[Snippets.$B$18]&amp;[Translations.B29]&amp;[Snippets.$C$18]&amp;[Translations.B29]&amp;[Snippets.$D$18]" office:value-type="string" office:string-value="&lt;label locale=&quot;fr_CH&quot; preferred=&quot;1&quot;&gt;&lt;name_singular&gt;Médecine&lt;/name_singular&gt;&lt;name_plural&gt;Médecine&lt;/name_plural&gt;&lt;/label&gt;" calcext:value-type="string">
            <text:p>&lt;label locale="fr_CH" preferred="1"&gt;&lt;name_singular&gt;Médecine&lt;/name_singular&gt;&lt;name_plural&gt;Médecine&lt;/name_plural&gt;&lt;/label&gt;</text:p>
          </table:table-cell>
          <table:table-cell table:formula="of:=[Snippets.$B$19]&amp;[Translations.C29]&amp;[Snippets.$C$19]&amp;[Translations.C29]&amp;[Snippets.$D$19]" office:value-type="string" office:string-value="&lt;label locale=&quot;it_CH&quot; preferred=&quot;1&quot;&gt;&lt;name_singular&gt;Medicina&lt;/name_singular&gt;&lt;name_plural&gt;Medicina&lt;/name_plural&gt;&lt;/label&gt;" calcext:value-type="string">
            <text:p>&lt;label locale="it_CH" preferred="1"&gt;&lt;name_singular&gt;Medicina&lt;/name_singular&gt;&lt;name_plural&gt;Medicina&lt;/name_plural&gt;&lt;/label&gt;</text:p>
          </table:table-cell>
          <table:table-cell table:formula="of:=[Snippets.$B$20]&amp;[Translations.D29]&amp;[Snippets.$C$20]&amp;[Translations.D29]&amp;[Snippets.$D$20]" office:value-type="string" office:string-value="&lt;label locale=&quot;rm_CH&quot; preferred=&quot;1&quot;&gt;&lt;name_singular&gt;Medischina&lt;/name_singular&gt;&lt;name_plural&gt;Medischina&lt;/name_plural&gt;&lt;/label&gt;" calcext:value-type="string">
            <text:p>&lt;label locale="rm_CH" preferred="1"&gt;&lt;name_singular&gt;Medischina&lt;/name_singular&gt;&lt;name_plural&gt;Medischina&lt;/name_plural&gt;&lt;/label&gt;</text:p>
          </table:table-cell>
          <table:table-cell table:formula="of:=[Snippets.$B$21]&amp;[Translations.E29]&amp;[Snippets.$C$21]&amp;[Translations.E29]&amp;[Snippets.$D$21]" office:value-type="string" office:string-value="&lt;label locale=&quot;en_US&quot; preferred=&quot;1&quot;&gt;&lt;name_singular&gt;Medicine&lt;/name_singular&gt;&lt;name_plural&gt;Medicine&lt;/name_plural&gt;&lt;/label&gt;" calcext:value-type="string">
            <text:p>&lt;label locale="en_US" preferred="1"&gt;&lt;name_singular&gt;Medicine&lt;/name_singular&gt;&lt;name_plural&gt;Medicine&lt;/name_plural&gt;&lt;/label&gt;</text:p>
          </table:table-cell>
          <table:table-cell table:formula="of:=[Snippets.B$15]&amp;[.B29]&amp;[Snippets.C$15]" office:value-type="string" office:string-value="&lt;item idno=&quot;medizin&quot; enabled=&quot;1&quot; default=&quot;0&quot; value=&quot;0&quot;&gt;" calcext:value-type="string">
            <text:p>&lt;item idno="medizin" enabled="1" default="0" value="0"&gt;</text:p>
          </table:table-cell>
          <table:table-cell table:formula="of:=[.H29]&amp;[Snippets.B$16]&amp;[.C29]&amp;[.D29]&amp;[.E29]&amp;[.F29]&amp;[.G29]&amp;[Snippets.B$22]&amp;[Snippets.B$23]" office:value-type="string" office:string-value="&lt;item idno=&quot;medizin&quot; enabled=&quot;1&quot; default=&quot;0&quot; value=&quot;0&quot;&gt;&lt;labels&gt;&lt;label locale=&quot;de_CH&quot; preferred=&quot;1&quot;&gt;&lt;name_singular&gt;Medizin&lt;/name_singular&gt;&lt;name_plural&gt;Medizin&lt;/name_plural&gt;&lt;/label&gt;&lt;label locale=&quot;fr_CH&quot; preferred=&quot;1&quot;&gt;&lt;name_singular&gt;Médecine&lt;/name_singular&gt;&lt;name_plural&gt;Médecine&lt;/name_plural&gt;&lt;/label&gt;&lt;label locale=&quot;it_CH&quot; preferred=&quot;1&quot;&gt;&lt;name_singular&gt;Medicina&lt;/name_singular&gt;&lt;name_plural&gt;Medicina&lt;/name_plural&gt;&lt;/label&gt;&lt;label locale=&quot;rm_CH&quot; preferred=&quot;1&quot;&gt;&lt;name_singular&gt;Medischina&lt;/name_singular&gt;&lt;name_plural&gt;Medischina&lt;/name_plural&gt;&lt;/label&gt;&lt;label locale=&quot;en_US&quot; preferred=&quot;1&quot;&gt;&lt;name_singular&gt;Medicine&lt;/name_singular&gt;&lt;name_plural&gt;Medicine&lt;/name_plural&gt;&lt;/label&gt;&lt;/labels&gt;&lt;/item&gt;" calcext:value-type="string">
            <text:p>&lt;item idno="medizin" enabled="1" default="0" value="0"&gt;&lt;labels&gt;&lt;label locale="de_CH" preferred="1"&gt;&lt;name_singular&gt;Medizin&lt;/name_singular&gt;&lt;name_plural&gt;Medizin&lt;/name_plural&gt;&lt;/label&gt;&lt;label locale="fr_CH" preferred="1"&gt;&lt;name_singular&gt;Médecine&lt;/name_singular&gt;&lt;name_plural&gt;Médecine&lt;/name_plural&gt;&lt;/label&gt;&lt;label locale="it_CH" preferred="1"&gt;&lt;name_singular&gt;Medicina&lt;/name_singular&gt;&lt;name_plural&gt;Medicina&lt;/name_plural&gt;&lt;/label&gt;&lt;label locale="rm_CH" preferred="1"&gt;&lt;name_singular&gt;Medischina&lt;/name_singular&gt;&lt;name_plural&gt;Medischina&lt;/name_plural&gt;&lt;/label&gt;&lt;label locale="en_US" preferred="1"&gt;&lt;name_singular&gt;Medicine&lt;/name_singular&gt;&lt;name_plural&gt;Medicin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Kriminologie</text:p>
          </table:table-cell>
          <table:table-cell office:value-type="string" calcext:value-type="string">
            <text:p>kriminologie</text:p>
          </table:table-cell>
          <table:table-cell table:formula="of:=[Snippets.$B$17]&amp;[Translations.A30]&amp;[Snippets.$C$17]&amp;[Translations.A30]&amp;[Snippets.$D$17]" office:value-type="string" office:string-value="&lt;label locale=&quot;de_CH&quot; preferred=&quot;1&quot;&gt;&lt;name_singular&gt;Kriminologie&lt;/name_singular&gt;&lt;name_plural&gt;Kriminologie&lt;/name_plural&gt;&lt;/label&gt;" calcext:value-type="string">
            <text:p>&lt;label locale="de_CH" preferred="1"&gt;&lt;name_singular&gt;Kriminologie&lt;/name_singular&gt;&lt;name_plural&gt;Kriminologie&lt;/name_plural&gt;&lt;/label&gt;</text:p>
          </table:table-cell>
          <table:table-cell table:formula="of:=[Snippets.$B$18]&amp;[Translations.B30]&amp;[Snippets.$C$18]&amp;[Translations.B30]&amp;[Snippets.$D$18]" office:value-type="string" office:string-value="&lt;label locale=&quot;fr_CH&quot; preferred=&quot;1&quot;&gt;&lt;name_singular&gt;Criminologie&lt;/name_singular&gt;&lt;name_plural&gt;Criminologie&lt;/name_plural&gt;&lt;/label&gt;" calcext:value-type="string">
            <text:p>&lt;label locale="fr_CH" preferred="1"&gt;&lt;name_singular&gt;Criminologie&lt;/name_singular&gt;&lt;name_plural&gt;Criminologie&lt;/name_plural&gt;&lt;/label&gt;</text:p>
          </table:table-cell>
          <table:table-cell table:formula="of:=[Snippets.$B$19]&amp;[Translations.C30]&amp;[Snippets.$C$19]&amp;[Translations.C30]&amp;[Snippets.$D$19]" office:value-type="string" office:string-value="&lt;label locale=&quot;it_CH&quot; preferred=&quot;1&quot;&gt;&lt;name_singular&gt;Criminologia&lt;/name_singular&gt;&lt;name_plural&gt;Criminologia&lt;/name_plural&gt;&lt;/label&gt;" calcext:value-type="string">
            <text:p>&lt;label locale="it_CH" preferred="1"&gt;&lt;name_singular&gt;Criminologia&lt;/name_singular&gt;&lt;name_plural&gt;Criminologia&lt;/name_plural&gt;&lt;/label&gt;</text:p>
          </table:table-cell>
          <table:table-cell table:formula="of:=[Snippets.$B$20]&amp;[Translations.D30]&amp;[Snippets.$C$20]&amp;[Translations.D30]&amp;[Snippets.$D$20]" office:value-type="string" office:string-value="&lt;label locale=&quot;rm_CH&quot; preferred=&quot;1&quot;&gt;&lt;name_singular&gt;Criminologia&lt;/name_singular&gt;&lt;name_plural&gt;Criminologia&lt;/name_plural&gt;&lt;/label&gt;" calcext:value-type="string">
            <text:p>&lt;label locale="rm_CH" preferred="1"&gt;&lt;name_singular&gt;Criminologia&lt;/name_singular&gt;&lt;name_plural&gt;Criminologia&lt;/name_plural&gt;&lt;/label&gt;</text:p>
          </table:table-cell>
          <table:table-cell table:formula="of:=[Snippets.$B$21]&amp;[Translations.E30]&amp;[Snippets.$C$21]&amp;[Translations.E30]&amp;[Snippets.$D$21]" office:value-type="string" office:string-value="&lt;label locale=&quot;en_US&quot; preferred=&quot;1&quot;&gt;&lt;name_singular&gt;Criminology&lt;/name_singular&gt;&lt;name_plural&gt;Criminology&lt;/name_plural&gt;&lt;/label&gt;" calcext:value-type="string">
            <text:p>&lt;label locale="en_US" preferred="1"&gt;&lt;name_singular&gt;Criminology&lt;/name_singular&gt;&lt;name_plural&gt;Criminology&lt;/name_plural&gt;&lt;/label&gt;</text:p>
          </table:table-cell>
          <table:table-cell table:formula="of:=[Snippets.B$15]&amp;[.B30]&amp;[Snippets.C$15]" office:value-type="string" office:string-value="&lt;item idno=&quot;kriminologie&quot; enabled=&quot;1&quot; default=&quot;0&quot; value=&quot;0&quot;&gt;" calcext:value-type="string">
            <text:p>&lt;item idno="kriminologie" enabled="1" default="0" value="0"&gt;</text:p>
          </table:table-cell>
          <table:table-cell table:formula="of:=[.H30]&amp;[Snippets.B$16]&amp;[.C30]&amp;[.D30]&amp;[.E30]&amp;[.F30]&amp;[.G30]&amp;[Snippets.B$22]&amp;[Snippets.B$23]" office:value-type="string" office:string-value="&lt;item idno=&quot;kriminologie&quot; enabled=&quot;1&quot; default=&quot;0&quot; value=&quot;0&quot;&gt;&lt;labels&gt;&lt;label locale=&quot;de_CH&quot; preferred=&quot;1&quot;&gt;&lt;name_singular&gt;Kriminologie&lt;/name_singular&gt;&lt;name_plural&gt;Kriminologie&lt;/name_plural&gt;&lt;/label&gt;&lt;label locale=&quot;fr_CH&quot; preferred=&quot;1&quot;&gt;&lt;name_singular&gt;Criminologie&lt;/name_singular&gt;&lt;name_plural&gt;Criminologie&lt;/name_plural&gt;&lt;/label&gt;&lt;label locale=&quot;it_CH&quot; preferred=&quot;1&quot;&gt;&lt;name_singular&gt;Criminologia&lt;/name_singular&gt;&lt;name_plural&gt;Criminologia&lt;/name_plural&gt;&lt;/label&gt;&lt;label locale=&quot;rm_CH&quot; preferred=&quot;1&quot;&gt;&lt;name_singular&gt;Criminologia&lt;/name_singular&gt;&lt;name_plural&gt;Criminologia&lt;/name_plural&gt;&lt;/label&gt;&lt;label locale=&quot;en_US&quot; preferred=&quot;1&quot;&gt;&lt;name_singular&gt;Criminology&lt;/name_singular&gt;&lt;name_plural&gt;Criminology&lt;/name_plural&gt;&lt;/label&gt;&lt;/labels&gt;&lt;/item&gt;" calcext:value-type="string">
            <text:p>&lt;item idno="kriminologie" enabled="1" default="0" value="0"&gt;&lt;labels&gt;&lt;label locale="de_CH" preferred="1"&gt;&lt;name_singular&gt;Kriminologie&lt;/name_singular&gt;&lt;name_plural&gt;Kriminologie&lt;/name_plural&gt;&lt;/label&gt;&lt;label locale="fr_CH" preferred="1"&gt;&lt;name_singular&gt;Criminologie&lt;/name_singular&gt;&lt;name_plural&gt;Criminologie&lt;/name_plural&gt;&lt;/label&gt;&lt;label locale="it_CH" preferred="1"&gt;&lt;name_singular&gt;Criminologia&lt;/name_singular&gt;&lt;name_plural&gt;Criminologia&lt;/name_plural&gt;&lt;/label&gt;&lt;label locale="rm_CH" preferred="1"&gt;&lt;name_singular&gt;Criminologia&lt;/name_singular&gt;&lt;name_plural&gt;Criminologia&lt;/name_plural&gt;&lt;/label&gt;&lt;label locale="en_US" preferred="1"&gt;&lt;name_singular&gt;Criminology&lt;/name_singular&gt;&lt;name_plural&gt;Criminology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Musik</text:p>
          </table:table-cell>
          <table:table-cell office:value-type="string" calcext:value-type="string">
            <text:p>musik</text:p>
          </table:table-cell>
          <table:table-cell table:formula="of:=[Snippets.$B$17]&amp;[Translations.A31]&amp;[Snippets.$C$17]&amp;[Translations.A31]&amp;[Snippets.$D$17]" office:value-type="string" office:string-value="&lt;label locale=&quot;de_CH&quot; preferred=&quot;1&quot;&gt;&lt;name_singular&gt;Musik&lt;/name_singular&gt;&lt;name_plural&gt;Musik&lt;/name_plural&gt;&lt;/label&gt;" calcext:value-type="string">
            <text:p>&lt;label locale="de_CH" preferred="1"&gt;&lt;name_singular&gt;Musik&lt;/name_singular&gt;&lt;name_plural&gt;Musik&lt;/name_plural&gt;&lt;/label&gt;</text:p>
          </table:table-cell>
          <table:table-cell table:formula="of:=[Snippets.$B$18]&amp;[Translations.B31]&amp;[Snippets.$C$18]&amp;[Translations.B31]&amp;[Snippets.$D$18]" office:value-type="string" office:string-value="&lt;label locale=&quot;fr_CH&quot; preferred=&quot;1&quot;&gt;&lt;name_singular&gt;Musique&lt;/name_singular&gt;&lt;name_plural&gt;Musique&lt;/name_plural&gt;&lt;/label&gt;" calcext:value-type="string">
            <text:p>&lt;label locale="fr_CH" preferred="1"&gt;&lt;name_singular&gt;Musique&lt;/name_singular&gt;&lt;name_plural&gt;Musique&lt;/name_plural&gt;&lt;/label&gt;</text:p>
          </table:table-cell>
          <table:table-cell table:formula="of:=[Snippets.$B$19]&amp;[Translations.C31]&amp;[Snippets.$C$19]&amp;[Translations.C31]&amp;[Snippets.$D$19]" office:value-type="string" office:string-value="&lt;label locale=&quot;it_CH&quot; preferred=&quot;1&quot;&gt;&lt;name_singular&gt;Musica&lt;/name_singular&gt;&lt;name_plural&gt;Musica&lt;/name_plural&gt;&lt;/label&gt;" calcext:value-type="string">
            <text:p>&lt;label locale="it_CH" preferred="1"&gt;&lt;name_singular&gt;Musica&lt;/name_singular&gt;&lt;name_plural&gt;Musica&lt;/name_plural&gt;&lt;/label&gt;</text:p>
          </table:table-cell>
          <table:table-cell table:formula="of:=[Snippets.$B$20]&amp;[Translations.D31]&amp;[Snippets.$C$20]&amp;[Translations.D31]&amp;[Snippets.$D$20]" office:value-type="string" office:string-value="&lt;label locale=&quot;rm_CH&quot; preferred=&quot;1&quot;&gt;&lt;name_singular&gt;Musica&lt;/name_singular&gt;&lt;name_plural&gt;Musica&lt;/name_plural&gt;&lt;/label&gt;" calcext:value-type="string">
            <text:p>&lt;label locale="rm_CH" preferred="1"&gt;&lt;name_singular&gt;Musica&lt;/name_singular&gt;&lt;name_plural&gt;Musica&lt;/name_plural&gt;&lt;/label&gt;</text:p>
          </table:table-cell>
          <table:table-cell table:formula="of:=[Snippets.$B$21]&amp;[Translations.E31]&amp;[Snippets.$C$21]&amp;[Translations.E31]&amp;[Snippets.$D$21]" office:value-type="string" office:string-value="&lt;label locale=&quot;en_US&quot; preferred=&quot;1&quot;&gt;&lt;name_singular&gt;Music&lt;/name_singular&gt;&lt;name_plural&gt;Music&lt;/name_plural&gt;&lt;/label&gt;" calcext:value-type="string">
            <text:p>&lt;label locale="en_US" preferred="1"&gt;&lt;name_singular&gt;Music&lt;/name_singular&gt;&lt;name_plural&gt;Music&lt;/name_plural&gt;&lt;/label&gt;</text:p>
          </table:table-cell>
          <table:table-cell table:formula="of:=[Snippets.B$15]&amp;[.B31]&amp;[Snippets.C$15]" office:value-type="string" office:string-value="&lt;item idno=&quot;musik&quot; enabled=&quot;1&quot; default=&quot;0&quot; value=&quot;0&quot;&gt;" calcext:value-type="string">
            <text:p>&lt;item idno="musik" enabled="1" default="0" value="0"&gt;</text:p>
          </table:table-cell>
          <table:table-cell table:formula="of:=[.H31]&amp;[Snippets.B$16]&amp;[.C31]&amp;[.D31]&amp;[.E31]&amp;[.F31]&amp;[.G31]&amp;[Snippets.B$22]&amp;[Snippets.B$23]" office:value-type="string" office:string-value="&lt;item idno=&quot;musik&quot; enabled=&quot;1&quot; default=&quot;0&quot; value=&quot;0&quot;&gt;&lt;labels&gt;&lt;label locale=&quot;de_CH&quot; preferred=&quot;1&quot;&gt;&lt;name_singular&gt;Musik&lt;/name_singular&gt;&lt;name_plural&gt;Musik&lt;/name_plural&gt;&lt;/label&gt;&lt;label locale=&quot;fr_CH&quot; preferred=&quot;1&quot;&gt;&lt;name_singular&gt;Musique&lt;/name_singular&gt;&lt;name_plural&gt;Musique&lt;/name_plural&gt;&lt;/label&gt;&lt;label locale=&quot;it_CH&quot; preferred=&quot;1&quot;&gt;&lt;name_singular&gt;Musica&lt;/name_singular&gt;&lt;name_plural&gt;Musica&lt;/name_plural&gt;&lt;/label&gt;&lt;label locale=&quot;rm_CH&quot; preferred=&quot;1&quot;&gt;&lt;name_singular&gt;Musica&lt;/name_singular&gt;&lt;name_plural&gt;Musica&lt;/name_plural&gt;&lt;/label&gt;&lt;label locale=&quot;en_US&quot; preferred=&quot;1&quot;&gt;&lt;name_singular&gt;Music&lt;/name_singular&gt;&lt;name_plural&gt;Music&lt;/name_plural&gt;&lt;/label&gt;&lt;/labels&gt;&lt;/item&gt;" calcext:value-type="string">
            <text:p>&lt;item idno="musik" enabled="1" default="0" value="0"&gt;&lt;labels&gt;&lt;label locale="de_CH" preferred="1"&gt;&lt;name_singular&gt;Musik&lt;/name_singular&gt;&lt;name_plural&gt;Musik&lt;/name_plural&gt;&lt;/label&gt;&lt;label locale="fr_CH" preferred="1"&gt;&lt;name_singular&gt;Musique&lt;/name_singular&gt;&lt;name_plural&gt;Musique&lt;/name_plural&gt;&lt;/label&gt;&lt;label locale="it_CH" preferred="1"&gt;&lt;name_singular&gt;Musica&lt;/name_singular&gt;&lt;name_plural&gt;Musica&lt;/name_plural&gt;&lt;/label&gt;&lt;label locale="rm_CH" preferred="1"&gt;&lt;name_singular&gt;Musica&lt;/name_singular&gt;&lt;name_plural&gt;Musica&lt;/name_plural&gt;&lt;/label&gt;&lt;label locale="en_US" preferred="1"&gt;&lt;name_singular&gt;Music&lt;/name_singular&gt;&lt;name_plural&gt;Music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Theater</text:p>
          </table:table-cell>
          <table:table-cell office:value-type="string" calcext:value-type="string">
            <text:p>theater</text:p>
          </table:table-cell>
          <table:table-cell table:formula="of:=[Snippets.$B$17]&amp;[Translations.A32]&amp;[Snippets.$C$17]&amp;[Translations.A32]&amp;[Snippets.$D$17]" office:value-type="string" office:string-value="&lt;label locale=&quot;de_CH&quot; preferred=&quot;1&quot;&gt;&lt;name_singular&gt;Theater&lt;/name_singular&gt;&lt;name_plural&gt;Theater&lt;/name_plural&gt;&lt;/label&gt;" calcext:value-type="string">
            <text:p>&lt;label locale="de_CH" preferred="1"&gt;&lt;name_singular&gt;Theater&lt;/name_singular&gt;&lt;name_plural&gt;Theater&lt;/name_plural&gt;&lt;/label&gt;</text:p>
          </table:table-cell>
          <table:table-cell table:formula="of:=[Snippets.$B$18]&amp;[Translations.B32]&amp;[Snippets.$C$18]&amp;[Translations.B32]&amp;[Snippets.$D$18]" office:value-type="string" office:string-value="&lt;label locale=&quot;fr_CH&quot; preferred=&quot;1&quot;&gt;&lt;name_singular&gt;Théâtre&lt;/name_singular&gt;&lt;name_plural&gt;Théâtre&lt;/name_plural&gt;&lt;/label&gt;" calcext:value-type="string">
            <text:p>&lt;label locale="fr_CH" preferred="1"&gt;&lt;name_singular&gt;Théâtre&lt;/name_singular&gt;&lt;name_plural&gt;Théâtre&lt;/name_plural&gt;&lt;/label&gt;</text:p>
          </table:table-cell>
          <table:table-cell table:formula="of:=[Snippets.$B$19]&amp;[Translations.C32]&amp;[Snippets.$C$19]&amp;[Translations.C32]&amp;[Snippets.$D$19]" office:value-type="string" office:string-value="&lt;label locale=&quot;it_CH&quot; preferred=&quot;1&quot;&gt;&lt;name_singular&gt;Teatro&lt;/name_singular&gt;&lt;name_plural&gt;Teatro&lt;/name_plural&gt;&lt;/label&gt;" calcext:value-type="string">
            <text:p>&lt;label locale="it_CH" preferred="1"&gt;&lt;name_singular&gt;Teatro&lt;/name_singular&gt;&lt;name_plural&gt;Teatro&lt;/name_plural&gt;&lt;/label&gt;</text:p>
          </table:table-cell>
          <table:table-cell table:formula="of:=[Snippets.$B$20]&amp;[Translations.D32]&amp;[Snippets.$C$20]&amp;[Translations.D32]&amp;[Snippets.$D$20]" office:value-type="string" office:string-value="&lt;label locale=&quot;rm_CH&quot; preferred=&quot;1&quot;&gt;&lt;name_singular&gt;Teater&lt;/name_singular&gt;&lt;name_plural&gt;Teater&lt;/name_plural&gt;&lt;/label&gt;" calcext:value-type="string">
            <text:p>&lt;label locale="rm_CH" preferred="1"&gt;&lt;name_singular&gt;Teater&lt;/name_singular&gt;&lt;name_plural&gt;Teater&lt;/name_plural&gt;&lt;/label&gt;</text:p>
          </table:table-cell>
          <table:table-cell table:formula="of:=[Snippets.$B$21]&amp;[Translations.E32]&amp;[Snippets.$C$21]&amp;[Translations.E32]&amp;[Snippets.$D$21]" office:value-type="string" office:string-value="&lt;label locale=&quot;en_US&quot; preferred=&quot;1&quot;&gt;&lt;name_singular&gt;Theatre&lt;/name_singular&gt;&lt;name_plural&gt;Theatre&lt;/name_plural&gt;&lt;/label&gt;" calcext:value-type="string">
            <text:p>&lt;label locale="en_US" preferred="1"&gt;&lt;name_singular&gt;Theatre&lt;/name_singular&gt;&lt;name_plural&gt;Theatre&lt;/name_plural&gt;&lt;/label&gt;</text:p>
          </table:table-cell>
          <table:table-cell table:formula="of:=[Snippets.B$15]&amp;[.B32]&amp;[Snippets.C$15]" office:value-type="string" office:string-value="&lt;item idno=&quot;theater&quot; enabled=&quot;1&quot; default=&quot;0&quot; value=&quot;0&quot;&gt;" calcext:value-type="string">
            <text:p>&lt;item idno="theater" enabled="1" default="0" value="0"&gt;</text:p>
          </table:table-cell>
          <table:table-cell table:formula="of:=[.H32]&amp;[Snippets.B$16]&amp;[.C32]&amp;[.D32]&amp;[.E32]&amp;[.F32]&amp;[.G32]&amp;[Snippets.B$22]&amp;[Snippets.B$23]" office:value-type="string" office:string-value="&lt;item idno=&quot;theater&quot; enabled=&quot;1&quot; default=&quot;0&quot; value=&quot;0&quot;&gt;&lt;labels&gt;&lt;label locale=&quot;de_CH&quot; preferred=&quot;1&quot;&gt;&lt;name_singular&gt;Theater&lt;/name_singular&gt;&lt;name_plural&gt;Theater&lt;/name_plural&gt;&lt;/label&gt;&lt;label locale=&quot;fr_CH&quot; preferred=&quot;1&quot;&gt;&lt;name_singular&gt;Théâtre&lt;/name_singular&gt;&lt;name_plural&gt;Théâtre&lt;/name_plural&gt;&lt;/label&gt;&lt;label locale=&quot;it_CH&quot; preferred=&quot;1&quot;&gt;&lt;name_singular&gt;Teatro&lt;/name_singular&gt;&lt;name_plural&gt;Teatro&lt;/name_plural&gt;&lt;/label&gt;&lt;label locale=&quot;rm_CH&quot; preferred=&quot;1&quot;&gt;&lt;name_singular&gt;Teater&lt;/name_singular&gt;&lt;name_plural&gt;Teater&lt;/name_plural&gt;&lt;/label&gt;&lt;label locale=&quot;en_US&quot; preferred=&quot;1&quot;&gt;&lt;name_singular&gt;Theatre&lt;/name_singular&gt;&lt;name_plural&gt;Theatre&lt;/name_plural&gt;&lt;/label&gt;&lt;/labels&gt;&lt;/item&gt;" calcext:value-type="string">
            <text:p>&lt;item idno="theater" enabled="1" default="0" value="0"&gt;&lt;labels&gt;&lt;label locale="de_CH" preferred="1"&gt;&lt;name_singular&gt;Theater&lt;/name_singular&gt;&lt;name_plural&gt;Theater&lt;/name_plural&gt;&lt;/label&gt;&lt;label locale="fr_CH" preferred="1"&gt;&lt;name_singular&gt;Théâtre&lt;/name_singular&gt;&lt;name_plural&gt;Théâtre&lt;/name_plural&gt;&lt;/label&gt;&lt;label locale="it_CH" preferred="1"&gt;&lt;name_singular&gt;Teatro&lt;/name_singular&gt;&lt;name_plural&gt;Teatro&lt;/name_plural&gt;&lt;/label&gt;&lt;label locale="rm_CH" preferred="1"&gt;&lt;name_singular&gt;Teater&lt;/name_singular&gt;&lt;name_plural&gt;Teater&lt;/name_plural&gt;&lt;/label&gt;&lt;label locale="en_US" preferred="1"&gt;&lt;name_singular&gt;Theatre&lt;/name_singular&gt;&lt;name_plural&gt;Theatr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Kunst</text:p>
          </table:table-cell>
          <table:table-cell office:value-type="string" calcext:value-type="string">
            <text:p>kunst</text:p>
          </table:table-cell>
          <table:table-cell table:formula="of:=[Snippets.$B$17]&amp;[Translations.A33]&amp;[Snippets.$C$17]&amp;[Translations.A33]&amp;[Snippets.$D$17]" office:value-type="string" office:string-value="&lt;label locale=&quot;de_CH&quot; preferred=&quot;1&quot;&gt;&lt;name_singular&gt;Kunst&lt;/name_singular&gt;&lt;name_plural&gt;Kunst&lt;/name_plural&gt;&lt;/label&gt;" calcext:value-type="string">
            <text:p>&lt;label locale="de_CH" preferred="1"&gt;&lt;name_singular&gt;Kunst&lt;/name_singular&gt;&lt;name_plural&gt;Kunst&lt;/name_plural&gt;&lt;/label&gt;</text:p>
          </table:table-cell>
          <table:table-cell table:formula="of:=[Snippets.$B$18]&amp;[Translations.B33]&amp;[Snippets.$C$18]&amp;[Translations.B33]&amp;[Snippets.$D$18]" office:value-type="string" office:string-value="&lt;label locale=&quot;fr_CH&quot; preferred=&quot;1&quot;&gt;&lt;name_singular&gt;Art&lt;/name_singular&gt;&lt;name_plural&gt;Art&lt;/name_plural&gt;&lt;/label&gt;" calcext:value-type="string">
            <text:p>&lt;label locale="fr_CH" preferred="1"&gt;&lt;name_singular&gt;Art&lt;/name_singular&gt;&lt;name_plural&gt;Art&lt;/name_plural&gt;&lt;/label&gt;</text:p>
          </table:table-cell>
          <table:table-cell table:formula="of:=[Snippets.$B$19]&amp;[Translations.C33]&amp;[Snippets.$C$19]&amp;[Translations.C33]&amp;[Snippets.$D$19]" office:value-type="string" office:string-value="&lt;label locale=&quot;it_CH&quot; preferred=&quot;1&quot;&gt;&lt;name_singular&gt;Arte&lt;/name_singular&gt;&lt;name_plural&gt;Arte&lt;/name_plural&gt;&lt;/label&gt;" calcext:value-type="string">
            <text:p>&lt;label locale="it_CH" preferred="1"&gt;&lt;name_singular&gt;Arte&lt;/name_singular&gt;&lt;name_plural&gt;Arte&lt;/name_plural&gt;&lt;/label&gt;</text:p>
          </table:table-cell>
          <table:table-cell table:formula="of:=[Snippets.$B$20]&amp;[Translations.D33]&amp;[Snippets.$C$20]&amp;[Translations.D33]&amp;[Snippets.$D$20]" office:value-type="string" office:string-value="&lt;label locale=&quot;rm_CH&quot; preferred=&quot;1&quot;&gt;&lt;name_singular&gt;Art&lt;/name_singular&gt;&lt;name_plural&gt;Art&lt;/name_plural&gt;&lt;/label&gt;" calcext:value-type="string">
            <text:p>&lt;label locale="rm_CH" preferred="1"&gt;&lt;name_singular&gt;Art&lt;/name_singular&gt;&lt;name_plural&gt;Art&lt;/name_plural&gt;&lt;/label&gt;</text:p>
          </table:table-cell>
          <table:table-cell table:formula="of:=[Snippets.$B$21]&amp;[Translations.E33]&amp;[Snippets.$C$21]&amp;[Translations.E33]&amp;[Snippets.$D$21]" office:value-type="string" office:string-value="&lt;label locale=&quot;en_US&quot; preferred=&quot;1&quot;&gt;&lt;name_singular&gt;Art&lt;/name_singular&gt;&lt;name_plural&gt;Art&lt;/name_plural&gt;&lt;/label&gt;" calcext:value-type="string">
            <text:p>&lt;label locale="en_US" preferred="1"&gt;&lt;name_singular&gt;Art&lt;/name_singular&gt;&lt;name_plural&gt;Art&lt;/name_plural&gt;&lt;/label&gt;</text:p>
          </table:table-cell>
          <table:table-cell table:formula="of:=[Snippets.B$15]&amp;[.B33]&amp;[Snippets.C$15]" office:value-type="string" office:string-value="&lt;item idno=&quot;kunst&quot; enabled=&quot;1&quot; default=&quot;0&quot; value=&quot;0&quot;&gt;" calcext:value-type="string">
            <text:p>&lt;item idno="kunst" enabled="1" default="0" value="0"&gt;</text:p>
          </table:table-cell>
          <table:table-cell table:formula="of:=[.H33]&amp;[Snippets.B$16]&amp;[.C33]&amp;[.D33]&amp;[.E33]&amp;[.F33]&amp;[.G33]&amp;[Snippets.B$22]&amp;[Snippets.B$23]" office:value-type="string" office:string-value="&lt;item idno=&quot;kunst&quot; enabled=&quot;1&quot; default=&quot;0&quot; value=&quot;0&quot;&gt;&lt;labels&gt;&lt;label locale=&quot;de_CH&quot; preferred=&quot;1&quot;&gt;&lt;name_singular&gt;Kunst&lt;/name_singular&gt;&lt;name_plural&gt;Kunst&lt;/name_plural&gt;&lt;/label&gt;&lt;label locale=&quot;fr_CH&quot; preferred=&quot;1&quot;&gt;&lt;name_singular&gt;Art&lt;/name_singular&gt;&lt;name_plural&gt;Art&lt;/name_plural&gt;&lt;/label&gt;&lt;label locale=&quot;it_CH&quot; preferred=&quot;1&quot;&gt;&lt;name_singular&gt;Arte&lt;/name_singular&gt;&lt;name_plural&gt;Arte&lt;/name_plural&gt;&lt;/label&gt;&lt;label locale=&quot;rm_CH&quot; preferred=&quot;1&quot;&gt;&lt;name_singular&gt;Art&lt;/name_singular&gt;&lt;name_plural&gt;Art&lt;/name_plural&gt;&lt;/label&gt;&lt;label locale=&quot;en_US&quot; preferred=&quot;1&quot;&gt;&lt;name_singular&gt;Art&lt;/name_singular&gt;&lt;name_plural&gt;Art&lt;/name_plural&gt;&lt;/label&gt;&lt;/labels&gt;&lt;/item&gt;" calcext:value-type="string">
            <text:p>&lt;item idno="kunst" enabled="1" default="0" value="0"&gt;&lt;labels&gt;&lt;label locale="de_CH" preferred="1"&gt;&lt;name_singular&gt;Kunst&lt;/name_singular&gt;&lt;name_plural&gt;Kunst&lt;/name_plural&gt;&lt;/label&gt;&lt;label locale="fr_CH" preferred="1"&gt;&lt;name_singular&gt;Art&lt;/name_singular&gt;&lt;name_plural&gt;Art&lt;/name_plural&gt;&lt;/label&gt;&lt;label locale="it_CH" preferred="1"&gt;&lt;name_singular&gt;Arte&lt;/name_singular&gt;&lt;name_plural&gt;Arte&lt;/name_plural&gt;&lt;/label&gt;&lt;label locale="rm_CH" preferred="1"&gt;&lt;name_singular&gt;Art&lt;/name_singular&gt;&lt;name_plural&gt;Art&lt;/name_plural&gt;&lt;/label&gt;&lt;label locale="en_US" preferred="1"&gt;&lt;name_singular&gt;Art&lt;/name_singular&gt;&lt;name_plural&gt;Art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Literatur</text:p>
          </table:table-cell>
          <table:table-cell office:value-type="string" calcext:value-type="string">
            <text:p>literatur</text:p>
          </table:table-cell>
          <table:table-cell table:formula="of:=[Snippets.$B$17]&amp;[Translations.A34]&amp;[Snippets.$C$17]&amp;[Translations.A34]&amp;[Snippets.$D$17]" office:value-type="string" office:string-value="&lt;label locale=&quot;de_CH&quot; preferred=&quot;1&quot;&gt;&lt;name_singular&gt;Literatur&lt;/name_singular&gt;&lt;name_plural&gt;Literatur&lt;/name_plural&gt;&lt;/label&gt;" calcext:value-type="string">
            <text:p>&lt;label locale="de_CH" preferred="1"&gt;&lt;name_singular&gt;Literatur&lt;/name_singular&gt;&lt;name_plural&gt;Literatur&lt;/name_plural&gt;&lt;/label&gt;</text:p>
          </table:table-cell>
          <table:table-cell table:formula="of:=[Snippets.$B$18]&amp;[Translations.B34]&amp;[Snippets.$C$18]&amp;[Translations.B34]&amp;[Snippets.$D$18]" office:value-type="string" office:string-value="&lt;label locale=&quot;fr_CH&quot; preferred=&quot;1&quot;&gt;&lt;name_singular&gt;Littérature&lt;/name_singular&gt;&lt;name_plural&gt;Littérature&lt;/name_plural&gt;&lt;/label&gt;" calcext:value-type="string">
            <text:p>&lt;label locale="fr_CH" preferred="1"&gt;&lt;name_singular&gt;Littérature&lt;/name_singular&gt;&lt;name_plural&gt;Littérature&lt;/name_plural&gt;&lt;/label&gt;</text:p>
          </table:table-cell>
          <table:table-cell table:formula="of:=[Snippets.$B$19]&amp;[Translations.C34]&amp;[Snippets.$C$19]&amp;[Translations.C34]&amp;[Snippets.$D$19]" office:value-type="string" office:string-value="&lt;label locale=&quot;it_CH&quot; preferred=&quot;1&quot;&gt;&lt;name_singular&gt;Letteratura&lt;/name_singular&gt;&lt;name_plural&gt;Letteratura&lt;/name_plural&gt;&lt;/label&gt;" calcext:value-type="string">
            <text:p>&lt;label locale="it_CH" preferred="1"&gt;&lt;name_singular&gt;Letteratura&lt;/name_singular&gt;&lt;name_plural&gt;Letteratura&lt;/name_plural&gt;&lt;/label&gt;</text:p>
          </table:table-cell>
          <table:table-cell table:formula="of:=[Snippets.$B$20]&amp;[Translations.D34]&amp;[Snippets.$C$20]&amp;[Translations.D34]&amp;[Snippets.$D$20]" office:value-type="string" office:string-value="&lt;label locale=&quot;rm_CH&quot; preferred=&quot;1&quot;&gt;&lt;name_singular&gt;Litteratura&lt;/name_singular&gt;&lt;name_plural&gt;Litteratura&lt;/name_plural&gt;&lt;/label&gt;" calcext:value-type="string">
            <text:p>&lt;label locale="rm_CH" preferred="1"&gt;&lt;name_singular&gt;Litteratura&lt;/name_singular&gt;&lt;name_plural&gt;Litteratura&lt;/name_plural&gt;&lt;/label&gt;</text:p>
          </table:table-cell>
          <table:table-cell table:formula="of:=[Snippets.$B$21]&amp;[Translations.E34]&amp;[Snippets.$C$21]&amp;[Translations.E34]&amp;[Snippets.$D$21]" office:value-type="string" office:string-value="&lt;label locale=&quot;en_US&quot; preferred=&quot;1&quot;&gt;&lt;name_singular&gt;Literature&lt;/name_singular&gt;&lt;name_plural&gt;Literature&lt;/name_plural&gt;&lt;/label&gt;" calcext:value-type="string">
            <text:p>&lt;label locale="en_US" preferred="1"&gt;&lt;name_singular&gt;Literature&lt;/name_singular&gt;&lt;name_plural&gt;Literature&lt;/name_plural&gt;&lt;/label&gt;</text:p>
          </table:table-cell>
          <table:table-cell table:formula="of:=[Snippets.B$15]&amp;[.B34]&amp;[Snippets.C$15]" office:value-type="string" office:string-value="&lt;item idno=&quot;literatur&quot; enabled=&quot;1&quot; default=&quot;0&quot; value=&quot;0&quot;&gt;" calcext:value-type="string">
            <text:p>&lt;item idno="literatur" enabled="1" default="0" value="0"&gt;</text:p>
          </table:table-cell>
          <table:table-cell table:formula="of:=[.H34]&amp;[Snippets.B$16]&amp;[.C34]&amp;[.D34]&amp;[.E34]&amp;[.F34]&amp;[.G34]&amp;[Snippets.B$22]&amp;[Snippets.B$23]" office:value-type="string" office:string-value="&lt;item idno=&quot;literatur&quot; enabled=&quot;1&quot; default=&quot;0&quot; value=&quot;0&quot;&gt;&lt;labels&gt;&lt;label locale=&quot;de_CH&quot; preferred=&quot;1&quot;&gt;&lt;name_singular&gt;Literatur&lt;/name_singular&gt;&lt;name_plural&gt;Literatur&lt;/name_plural&gt;&lt;/label&gt;&lt;label locale=&quot;fr_CH&quot; preferred=&quot;1&quot;&gt;&lt;name_singular&gt;Littérature&lt;/name_singular&gt;&lt;name_plural&gt;Littérature&lt;/name_plural&gt;&lt;/label&gt;&lt;label locale=&quot;it_CH&quot; preferred=&quot;1&quot;&gt;&lt;name_singular&gt;Letteratura&lt;/name_singular&gt;&lt;name_plural&gt;Letteratura&lt;/name_plural&gt;&lt;/label&gt;&lt;label locale=&quot;rm_CH&quot; preferred=&quot;1&quot;&gt;&lt;name_singular&gt;Litteratura&lt;/name_singular&gt;&lt;name_plural&gt;Litteratura&lt;/name_plural&gt;&lt;/label&gt;&lt;label locale=&quot;en_US&quot; preferred=&quot;1&quot;&gt;&lt;name_singular&gt;Literature&lt;/name_singular&gt;&lt;name_plural&gt;Literature&lt;/name_plural&gt;&lt;/label&gt;&lt;/labels&gt;&lt;/item&gt;" calcext:value-type="string">
            <text:p>&lt;item idno="literatur" enabled="1" default="0" value="0"&gt;&lt;labels&gt;&lt;label locale="de_CH" preferred="1"&gt;&lt;name_singular&gt;Literatur&lt;/name_singular&gt;&lt;name_plural&gt;Literatur&lt;/name_plural&gt;&lt;/label&gt;&lt;label locale="fr_CH" preferred="1"&gt;&lt;name_singular&gt;Littérature&lt;/name_singular&gt;&lt;name_plural&gt;Littérature&lt;/name_plural&gt;&lt;/label&gt;&lt;label locale="it_CH" preferred="1"&gt;&lt;name_singular&gt;Letteratura&lt;/name_singular&gt;&lt;name_plural&gt;Letteratura&lt;/name_plural&gt;&lt;/label&gt;&lt;label locale="rm_CH" preferred="1"&gt;&lt;name_singular&gt;Litteratura&lt;/name_singular&gt;&lt;name_plural&gt;Litteratura&lt;/name_plural&gt;&lt;/label&gt;&lt;label locale="en_US" preferred="1"&gt;&lt;name_singular&gt;Literature&lt;/name_singular&gt;&lt;name_plural&gt;Literatur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Piktorialismus</text:p>
          </table:table-cell>
          <table:table-cell office:value-type="string" calcext:value-type="string">
            <text:p>piktorialismus</text:p>
          </table:table-cell>
          <table:table-cell table:formula="of:=[Snippets.$B$17]&amp;[Translations.A35]&amp;[Snippets.$C$17]&amp;[Translations.A35]&amp;[Snippets.$D$17]" office:value-type="string" office:string-value="&lt;label locale=&quot;de_CH&quot; preferred=&quot;1&quot;&gt;&lt;name_singular&gt;Piktorialismus&lt;/name_singular&gt;&lt;name_plural&gt;Piktorialismus&lt;/name_plural&gt;&lt;/label&gt;" calcext:value-type="string">
            <text:p>&lt;label locale="de_CH" preferred="1"&gt;&lt;name_singular&gt;Piktorialismus&lt;/name_singular&gt;&lt;name_plural&gt;Piktorialismus&lt;/name_plural&gt;&lt;/label&gt;</text:p>
          </table:table-cell>
          <table:table-cell table:formula="of:=[Snippets.$B$18]&amp;[Translations.B35]&amp;[Snippets.$C$18]&amp;[Translations.B35]&amp;[Snippets.$D$18]" office:value-type="string" office:string-value="&lt;label locale=&quot;fr_CH&quot; preferred=&quot;1&quot;&gt;&lt;name_singular&gt;Pictorialisme&lt;/name_singular&gt;&lt;name_plural&gt;Pictorialisme&lt;/name_plural&gt;&lt;/label&gt;" calcext:value-type="string">
            <text:p>&lt;label locale="fr_CH" preferred="1"&gt;&lt;name_singular&gt;Pictorialisme&lt;/name_singular&gt;&lt;name_plural&gt;Pictorialisme&lt;/name_plural&gt;&lt;/label&gt;</text:p>
          </table:table-cell>
          <table:table-cell table:formula="of:=[Snippets.$B$19]&amp;[Translations.C35]&amp;[Snippets.$C$19]&amp;[Translations.C35]&amp;[Snippets.$D$19]" office:value-type="string" office:string-value="&lt;label locale=&quot;it_CH&quot; preferred=&quot;1&quot;&gt;&lt;name_singular&gt;Pittorialismo&lt;/name_singular&gt;&lt;name_plural&gt;Pittorialismo&lt;/name_plural&gt;&lt;/label&gt;" calcext:value-type="string">
            <text:p>&lt;label locale="it_CH" preferred="1"&gt;&lt;name_singular&gt;Pittorialismo&lt;/name_singular&gt;&lt;name_plural&gt;Pittorialismo&lt;/name_plural&gt;&lt;/label&gt;</text:p>
          </table:table-cell>
          <table:table-cell table:formula="of:=[Snippets.$B$20]&amp;[Translations.D35]&amp;[Snippets.$C$20]&amp;[Translations.D35]&amp;[Snippets.$D$20]" office:value-type="string" office:string-value="&lt;label locale=&quot;rm_CH&quot; preferred=&quot;1&quot;&gt;&lt;name_singular&gt;Picturialissem&lt;/name_singular&gt;&lt;name_plural&gt;Picturialissem&lt;/name_plural&gt;&lt;/label&gt;" calcext:value-type="string">
            <text:p>&lt;label locale="rm_CH" preferred="1"&gt;&lt;name_singular&gt;Picturialissem&lt;/name_singular&gt;&lt;name_plural&gt;Picturialissem&lt;/name_plural&gt;&lt;/label&gt;</text:p>
          </table:table-cell>
          <table:table-cell table:formula="of:=[Snippets.$B$21]&amp;[Translations.E35]&amp;[Snippets.$C$21]&amp;[Translations.E35]&amp;[Snippets.$D$21]" office:value-type="string" office:string-value="&lt;label locale=&quot;en_US&quot; preferred=&quot;1&quot;&gt;&lt;name_singular&gt;Pictorialism&lt;/name_singular&gt;&lt;name_plural&gt;Pictorialism&lt;/name_plural&gt;&lt;/label&gt;" calcext:value-type="string">
            <text:p>&lt;label locale="en_US" preferred="1"&gt;&lt;name_singular&gt;Pictorialism&lt;/name_singular&gt;&lt;name_plural&gt;Pictorialism&lt;/name_plural&gt;&lt;/label&gt;</text:p>
          </table:table-cell>
          <table:table-cell table:formula="of:=[Snippets.B$15]&amp;[.B35]&amp;[Snippets.C$15]" office:value-type="string" office:string-value="&lt;item idno=&quot;piktorialismus&quot; enabled=&quot;1&quot; default=&quot;0&quot; value=&quot;0&quot;&gt;" calcext:value-type="string">
            <text:p>&lt;item idno="piktorialismus" enabled="1" default="0" value="0"&gt;</text:p>
          </table:table-cell>
          <table:table-cell table:formula="of:=[.H35]&amp;[Snippets.B$16]&amp;[.C35]&amp;[.D35]&amp;[.E35]&amp;[.F35]&amp;[.G35]&amp;[Snippets.B$22]&amp;[Snippets.B$23]" office:value-type="string" office:string-value="&lt;item idno=&quot;piktorialismus&quot; enabled=&quot;1&quot; default=&quot;0&quot; value=&quot;0&quot;&gt;&lt;labels&gt;&lt;label locale=&quot;de_CH&quot; preferred=&quot;1&quot;&gt;&lt;name_singular&gt;Piktorialismus&lt;/name_singular&gt;&lt;name_plural&gt;Piktorialismus&lt;/name_plural&gt;&lt;/label&gt;&lt;label locale=&quot;fr_CH&quot; preferred=&quot;1&quot;&gt;&lt;name_singular&gt;Pictorialisme&lt;/name_singular&gt;&lt;name_plural&gt;Pictorialisme&lt;/name_plural&gt;&lt;/label&gt;&lt;label locale=&quot;it_CH&quot; preferred=&quot;1&quot;&gt;&lt;name_singular&gt;Pittorialismo&lt;/name_singular&gt;&lt;name_plural&gt;Pittorialismo&lt;/name_plural&gt;&lt;/label&gt;&lt;label locale=&quot;rm_CH&quot; preferred=&quot;1&quot;&gt;&lt;name_singular&gt;Picturialissem&lt;/name_singular&gt;&lt;name_plural&gt;Picturialissem&lt;/name_plural&gt;&lt;/label&gt;&lt;label locale=&quot;en_US&quot; preferred=&quot;1&quot;&gt;&lt;name_singular&gt;Pictorialism&lt;/name_singular&gt;&lt;name_plural&gt;Pictorialism&lt;/name_plural&gt;&lt;/label&gt;&lt;/labels&gt;&lt;/item&gt;" calcext:value-type="string">
            <text:p>&lt;item idno="piktorialismus" enabled="1" default="0" value="0"&gt;&lt;labels&gt;&lt;label locale="de_CH" preferred="1"&gt;&lt;name_singular&gt;Piktorialismus&lt;/name_singular&gt;&lt;name_plural&gt;Piktorialismus&lt;/name_plural&gt;&lt;/label&gt;&lt;label locale="fr_CH" preferred="1"&gt;&lt;name_singular&gt;Pictorialisme&lt;/name_singular&gt;&lt;name_plural&gt;Pictorialisme&lt;/name_plural&gt;&lt;/label&gt;&lt;label locale="it_CH" preferred="1"&gt;&lt;name_singular&gt;Pittorialismo&lt;/name_singular&gt;&lt;name_plural&gt;Pittorialismo&lt;/name_plural&gt;&lt;/label&gt;&lt;label locale="rm_CH" preferred="1"&gt;&lt;name_singular&gt;Picturialissem&lt;/name_singular&gt;&lt;name_plural&gt;Picturialissem&lt;/name_plural&gt;&lt;/label&gt;&lt;label locale="en_US" preferred="1"&gt;&lt;name_singular&gt;Pictorialism&lt;/name_singular&gt;&lt;name_plural&gt;Pictorialism&lt;/name_plural&gt;&lt;/label&gt;&lt;/labels&gt;&lt;/item&gt;</text:p>
          </table:table-cell>
        </table:table-row>
        <table:table-row table:style-name="ro3">
          <table:table-cell table:style-name="ce2" office:value-type="string" calcext:value-type="string">
            <text:p>Kunst mit Fotografie</text:p>
          </table:table-cell>
          <table:table-cell table:style-name="ce2" office:value-type="string" calcext:value-type="string">
            <text:p>kunst_fotografie</text:p>
          </table:table-cell>
          <table:table-cell table:formula="of:=[Snippets.$B$17]&amp;[Translations.A36]&amp;[Snippets.$C$17]&amp;[Translations.A36]&amp;[Snippets.$D$17]" office:value-type="string" office:string-value="&lt;label locale=&quot;de_CH&quot; preferred=&quot;1&quot;&gt;&lt;name_singular&gt;Kunst mit Fotografie&lt;/name_singular&gt;&lt;name_plural&gt;Kunst mit Fotografie&lt;/name_plural&gt;&lt;/label&gt;" calcext:value-type="string">
            <text:p>&lt;label locale="de_CH" preferred="1"&gt;&lt;name_singular&gt;Kunst mit Fotografie&lt;/name_singular&gt;&lt;name_plural&gt;Kunst mit Fotografie&lt;/name_plural&gt;&lt;/label&gt;</text:p>
          </table:table-cell>
          <table:table-cell table:formula="of:=[Snippets.$B$18]&amp;[Translations.B36]&amp;[Snippets.$C$18]&amp;[Translations.B36]&amp;[Snippets.$D$18]" office:value-type="string" office:string-value="&lt;label locale=&quot;fr_CH&quot; preferred=&quot;1&quot;&gt;&lt;name_singular&gt;Art photographique&lt;/name_singular&gt;&lt;name_plural&gt;Art photographique&lt;/name_plural&gt;&lt;/label&gt;" calcext:value-type="string">
            <text:p>&lt;label locale="fr_CH" preferred="1"&gt;&lt;name_singular&gt;Art photographique&lt;/name_singular&gt;&lt;name_plural&gt;Art photographique&lt;/name_plural&gt;&lt;/label&gt;</text:p>
          </table:table-cell>
          <table:table-cell table:formula="of:=[Snippets.$B$19]&amp;[Translations.C36]&amp;[Snippets.$C$19]&amp;[Translations.C36]&amp;[Snippets.$D$19]" office:value-type="string" office:string-value="&lt;label locale=&quot;it_CH&quot; preferred=&quot;1&quot;&gt;&lt;name_singular&gt;Arte fotografica&lt;/name_singular&gt;&lt;name_plural&gt;Arte fotografica&lt;/name_plural&gt;&lt;/label&gt;" calcext:value-type="string">
            <text:p>&lt;label locale="it_CH" preferred="1"&gt;&lt;name_singular&gt;Arte fotografica&lt;/name_singular&gt;&lt;name_plural&gt;Arte fotografica&lt;/name_plural&gt;&lt;/label&gt;</text:p>
          </table:table-cell>
          <table:table-cell table:formula="of:=[Snippets.$B$20]&amp;[Translations.D36]&amp;[Snippets.$C$20]&amp;[Translations.D36]&amp;[Snippets.$D$20]" office:value-type="string" office:string-value="&lt;label locale=&quot;rm_CH&quot; preferred=&quot;1&quot;&gt;&lt;name_singular&gt;Art fotografic&lt;/name_singular&gt;&lt;name_plural&gt;Art fotografic&lt;/name_plural&gt;&lt;/label&gt;" calcext:value-type="string">
            <text:p>&lt;label locale="rm_CH" preferred="1"&gt;&lt;name_singular&gt;Art fotografic&lt;/name_singular&gt;&lt;name_plural&gt;Art fotografic&lt;/name_plural&gt;&lt;/label&gt;</text:p>
          </table:table-cell>
          <table:table-cell table:formula="of:=[Snippets.$B$21]&amp;[Translations.E36]&amp;[Snippets.$C$21]&amp;[Translations.E36]&amp;[Snippets.$D$21]" office:value-type="string" office:string-value="&lt;label locale=&quot;en_US&quot; preferred=&quot;1&quot;&gt;&lt;name_singular&gt;Photographic art&lt;/name_singular&gt;&lt;name_plural&gt;Photographic art&lt;/name_plural&gt;&lt;/label&gt;" calcext:value-type="string">
            <text:p>&lt;label locale="en_US" preferred="1"&gt;&lt;name_singular&gt;Photographic art&lt;/name_singular&gt;&lt;name_plural&gt;Photographic art&lt;/name_plural&gt;&lt;/label&gt;</text:p>
          </table:table-cell>
          <table:table-cell table:formula="of:=[Snippets.B$15]&amp;[.B36]&amp;[Snippets.C$15]" office:value-type="string" office:string-value="&lt;item idno=&quot;kunst_fotografie&quot; enabled=&quot;1&quot; default=&quot;0&quot; value=&quot;0&quot;&gt;" calcext:value-type="string">
            <text:p>&lt;item idno="kunst_fotografie" enabled="1" default="0" value="0"&gt;</text:p>
          </table:table-cell>
          <table:table-cell table:formula="of:=[.H36]&amp;[Snippets.B$16]&amp;[.C36]&amp;[.D36]&amp;[.E36]&amp;[.F36]&amp;[.G36]&amp;[Snippets.B$22]&amp;[Snippets.B$23]" office:value-type="string" office:string-value="&lt;item idno=&quot;kunst_fotografie&quot; enabled=&quot;1&quot; default=&quot;0&quot; value=&quot;0&quot;&gt;&lt;labels&gt;&lt;label locale=&quot;de_CH&quot; preferred=&quot;1&quot;&gt;&lt;name_singular&gt;Kunst mit Fotografie&lt;/name_singular&gt;&lt;name_plural&gt;Kunst mit Fotografie&lt;/name_plural&gt;&lt;/label&gt;&lt;label locale=&quot;fr_CH&quot; preferred=&quot;1&quot;&gt;&lt;name_singular&gt;Art photographique&lt;/name_singular&gt;&lt;name_plural&gt;Art photographique&lt;/name_plural&gt;&lt;/label&gt;&lt;label locale=&quot;it_CH&quot; preferred=&quot;1&quot;&gt;&lt;name_singular&gt;Arte fotografica&lt;/name_singular&gt;&lt;name_plural&gt;Arte fotografica&lt;/name_plural&gt;&lt;/label&gt;&lt;label locale=&quot;rm_CH&quot; preferred=&quot;1&quot;&gt;&lt;name_singular&gt;Art fotografic&lt;/name_singular&gt;&lt;name_plural&gt;Art fotografic&lt;/name_plural&gt;&lt;/label&gt;&lt;label locale=&quot;en_US&quot; preferred=&quot;1&quot;&gt;&lt;name_singular&gt;Photographic art&lt;/name_singular&gt;&lt;name_plural&gt;Photographic art&lt;/name_plural&gt;&lt;/label&gt;&lt;/labels&gt;&lt;/item&gt;" calcext:value-type="string">
            <text:p>&lt;item idno="kunst_fotografie" enabled="1" default="0" value="0"&gt;&lt;labels&gt;&lt;label locale="de_CH" preferred="1"&gt;&lt;name_singular&gt;Kunst mit Fotografie&lt;/name_singular&gt;&lt;name_plural&gt;Kunst mit Fotografie&lt;/name_plural&gt;&lt;/label&gt;&lt;label locale="fr_CH" preferred="1"&gt;&lt;name_singular&gt;Art photographique&lt;/name_singular&gt;&lt;name_plural&gt;Art photographique&lt;/name_plural&gt;&lt;/label&gt;&lt;label locale="it_CH" preferred="1"&gt;&lt;name_singular&gt;Arte fotografica&lt;/name_singular&gt;&lt;name_plural&gt;Arte fotografica&lt;/name_plural&gt;&lt;/label&gt;&lt;label locale="rm_CH" preferred="1"&gt;&lt;name_singular&gt;Art fotografic&lt;/name_singular&gt;&lt;name_plural&gt;Art fotografic&lt;/name_plural&gt;&lt;/label&gt;&lt;label locale="en_US" preferred="1"&gt;&lt;name_singular&gt;Photographic art&lt;/name_singular&gt;&lt;name_plural&gt;Photographic art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Alltag</text:p>
          </table:table-cell>
          <table:table-cell office:value-type="string" calcext:value-type="string">
            <text:p>alltag</text:p>
          </table:table-cell>
          <table:table-cell table:formula="of:=[Snippets.$B$17]&amp;[Translations.A37]&amp;[Snippets.$C$17]&amp;[Translations.A37]&amp;[Snippets.$D$17]" office:value-type="string" office:string-value="&lt;label locale=&quot;de_CH&quot; preferred=&quot;1&quot;&gt;&lt;name_singular&gt;Alltag&lt;/name_singular&gt;&lt;name_plural&gt;Alltag&lt;/name_plural&gt;&lt;/label&gt;" calcext:value-type="string">
            <text:p>&lt;label locale="de_CH" preferred="1"&gt;&lt;name_singular&gt;Alltag&lt;/name_singular&gt;&lt;name_plural&gt;Alltag&lt;/name_plural&gt;&lt;/label&gt;</text:p>
          </table:table-cell>
          <table:table-cell table:formula="of:=[Snippets.$B$18]&amp;[Translations.B37]&amp;[Snippets.$C$18]&amp;[Translations.B37]&amp;[Snippets.$D$18]" office:value-type="string" office:string-value="&lt;label locale=&quot;fr_CH&quot; preferred=&quot;1&quot;&gt;&lt;name_singular&gt;Vie quotidienne&lt;/name_singular&gt;&lt;name_plural&gt;Vie quotidienne&lt;/name_plural&gt;&lt;/label&gt;" calcext:value-type="string">
            <text:p>&lt;label locale="fr_CH" preferred="1"&gt;&lt;name_singular&gt;Vie quotidienne&lt;/name_singular&gt;&lt;name_plural&gt;Vie quotidienne&lt;/name_plural&gt;&lt;/label&gt;</text:p>
          </table:table-cell>
          <table:table-cell table:formula="of:=[Snippets.$B$19]&amp;[Translations.C37]&amp;[Snippets.$C$19]&amp;[Translations.C37]&amp;[Snippets.$D$19]" office:value-type="string" office:string-value="&lt;label locale=&quot;it_CH&quot; preferred=&quot;1&quot;&gt;&lt;name_singular&gt;Vita quotidiana&lt;/name_singular&gt;&lt;name_plural&gt;Vita quotidiana&lt;/name_plural&gt;&lt;/label&gt;" calcext:value-type="string">
            <text:p>&lt;label locale="it_CH" preferred="1"&gt;&lt;name_singular&gt;Vita quotidiana&lt;/name_singular&gt;&lt;name_plural&gt;Vita quotidiana&lt;/name_plural&gt;&lt;/label&gt;</text:p>
          </table:table-cell>
          <table:table-cell table:formula="of:=[Snippets.$B$20]&amp;[Translations.D37]&amp;[Snippets.$C$20]&amp;[Translations.D37]&amp;[Snippets.$D$20]" office:value-type="string" office:string-value="&lt;label locale=&quot;rm_CH&quot; preferred=&quot;1&quot;&gt;&lt;name_singular&gt;Mintgadi&lt;/name_singular&gt;&lt;name_plural&gt;Mintgadi&lt;/name_plural&gt;&lt;/label&gt;" calcext:value-type="string">
            <text:p>&lt;label locale="rm_CH" preferred="1"&gt;&lt;name_singular&gt;Mintgadi&lt;/name_singular&gt;&lt;name_plural&gt;Mintgadi&lt;/name_plural&gt;&lt;/label&gt;</text:p>
          </table:table-cell>
          <table:table-cell table:formula="of:=[Snippets.$B$21]&amp;[Translations.E37]&amp;[Snippets.$C$21]&amp;[Translations.E37]&amp;[Snippets.$D$21]" office:value-type="string" office:string-value="&lt;label locale=&quot;en_US&quot; preferred=&quot;1&quot;&gt;&lt;name_singular&gt;Everyday life&lt;/name_singular&gt;&lt;name_plural&gt;Everyday life&lt;/name_plural&gt;&lt;/label&gt;" calcext:value-type="string">
            <text:p>&lt;label locale="en_US" preferred="1"&gt;&lt;name_singular&gt;Everyday life&lt;/name_singular&gt;&lt;name_plural&gt;Everyday life&lt;/name_plural&gt;&lt;/label&gt;</text:p>
          </table:table-cell>
          <table:table-cell table:formula="of:=[Snippets.B$15]&amp;[.B37]&amp;[Snippets.C$15]" office:value-type="string" office:string-value="&lt;item idno=&quot;alltag&quot; enabled=&quot;1&quot; default=&quot;0&quot; value=&quot;0&quot;&gt;" calcext:value-type="string">
            <text:p>&lt;item idno="alltag" enabled="1" default="0" value="0"&gt;</text:p>
          </table:table-cell>
          <table:table-cell table:formula="of:=[.H37]&amp;[Snippets.B$16]&amp;[.C37]&amp;[.D37]&amp;[.E37]&amp;[.F37]&amp;[.G37]&amp;[Snippets.B$22]&amp;[Snippets.B$23]" office:value-type="string" office:string-value="&lt;item idno=&quot;alltag&quot; enabled=&quot;1&quot; default=&quot;0&quot; value=&quot;0&quot;&gt;&lt;labels&gt;&lt;label locale=&quot;de_CH&quot; preferred=&quot;1&quot;&gt;&lt;name_singular&gt;Alltag&lt;/name_singular&gt;&lt;name_plural&gt;Alltag&lt;/name_plural&gt;&lt;/label&gt;&lt;label locale=&quot;fr_CH&quot; preferred=&quot;1&quot;&gt;&lt;name_singular&gt;Vie quotidienne&lt;/name_singular&gt;&lt;name_plural&gt;Vie quotidienne&lt;/name_plural&gt;&lt;/label&gt;&lt;label locale=&quot;it_CH&quot; preferred=&quot;1&quot;&gt;&lt;name_singular&gt;Vita quotidiana&lt;/name_singular&gt;&lt;name_plural&gt;Vita quotidiana&lt;/name_plural&gt;&lt;/label&gt;&lt;label locale=&quot;rm_CH&quot; preferred=&quot;1&quot;&gt;&lt;name_singular&gt;Mintgadi&lt;/name_singular&gt;&lt;name_plural&gt;Mintgadi&lt;/name_plural&gt;&lt;/label&gt;&lt;label locale=&quot;en_US&quot; preferred=&quot;1&quot;&gt;&lt;name_singular&gt;Everyday life&lt;/name_singular&gt;&lt;name_plural&gt;Everyday life&lt;/name_plural&gt;&lt;/label&gt;&lt;/labels&gt;&lt;/item&gt;" calcext:value-type="string">
            <text:p>&lt;item idno="alltag" enabled="1" default="0" value="0"&gt;&lt;labels&gt;&lt;label locale="de_CH" preferred="1"&gt;&lt;name_singular&gt;Alltag&lt;/name_singular&gt;&lt;name_plural&gt;Alltag&lt;/name_plural&gt;&lt;/label&gt;&lt;label locale="fr_CH" preferred="1"&gt;&lt;name_singular&gt;Vie quotidienne&lt;/name_singular&gt;&lt;name_plural&gt;Vie quotidienne&lt;/name_plural&gt;&lt;/label&gt;&lt;label locale="it_CH" preferred="1"&gt;&lt;name_singular&gt;Vita quotidiana&lt;/name_singular&gt;&lt;name_plural&gt;Vita quotidiana&lt;/name_plural&gt;&lt;/label&gt;&lt;label locale="rm_CH" preferred="1"&gt;&lt;name_singular&gt;Mintgadi&lt;/name_singular&gt;&lt;name_plural&gt;Mintgadi&lt;/name_plural&gt;&lt;/label&gt;&lt;label locale="en_US" preferred="1"&gt;&lt;name_singular&gt;Everyday life&lt;/name_singular&gt;&lt;name_plural&gt;Everyday lif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Akt</text:p>
          </table:table-cell>
          <table:table-cell office:value-type="string" calcext:value-type="string">
            <text:p>akt</text:p>
          </table:table-cell>
          <table:table-cell table:formula="of:=[Snippets.$B$17]&amp;[Translations.A38]&amp;[Snippets.$C$17]&amp;[Translations.A38]&amp;[Snippets.$D$17]" office:value-type="string" office:string-value="&lt;label locale=&quot;de_CH&quot; preferred=&quot;1&quot;&gt;&lt;name_singular&gt;Akt&lt;/name_singular&gt;&lt;name_plural&gt;Akt&lt;/name_plural&gt;&lt;/label&gt;" calcext:value-type="string">
            <text:p>&lt;label locale="de_CH" preferred="1"&gt;&lt;name_singular&gt;Akt&lt;/name_singular&gt;&lt;name_plural&gt;Akt&lt;/name_plural&gt;&lt;/label&gt;</text:p>
          </table:table-cell>
          <table:table-cell table:formula="of:=[Snippets.$B$18]&amp;[Translations.B38]&amp;[Snippets.$C$18]&amp;[Translations.B38]&amp;[Snippets.$D$18]" office:value-type="string" office:string-value="&lt;label locale=&quot;fr_CH&quot; preferred=&quot;1&quot;&gt;&lt;name_singular&gt;Nu&lt;/name_singular&gt;&lt;name_plural&gt;Nu&lt;/name_plural&gt;&lt;/label&gt;" calcext:value-type="string">
            <text:p>&lt;label locale="fr_CH" preferred="1"&gt;&lt;name_singular&gt;Nu&lt;/name_singular&gt;&lt;name_plural&gt;Nu&lt;/name_plural&gt;&lt;/label&gt;</text:p>
          </table:table-cell>
          <table:table-cell table:formula="of:=[Snippets.$B$19]&amp;[Translations.C38]&amp;[Snippets.$C$19]&amp;[Translations.C38]&amp;[Snippets.$D$19]" office:value-type="string" office:string-value="&lt;label locale=&quot;it_CH&quot; preferred=&quot;1&quot;&gt;&lt;name_singular&gt;Nudo&lt;/name_singular&gt;&lt;name_plural&gt;Nudo&lt;/name_plural&gt;&lt;/label&gt;" calcext:value-type="string">
            <text:p>&lt;label locale="it_CH" preferred="1"&gt;&lt;name_singular&gt;Nudo&lt;/name_singular&gt;&lt;name_plural&gt;Nudo&lt;/name_plural&gt;&lt;/label&gt;</text:p>
          </table:table-cell>
          <table:table-cell table:formula="of:=[Snippets.$B$20]&amp;[Translations.D38]&amp;[Snippets.$C$20]&amp;[Translations.D38]&amp;[Snippets.$D$20]" office:value-type="string" office:string-value="&lt;label locale=&quot;rm_CH&quot; preferred=&quot;1&quot;&gt;&lt;name_singular&gt;Niv&lt;/name_singular&gt;&lt;name_plural&gt;Niv&lt;/name_plural&gt;&lt;/label&gt;" calcext:value-type="string">
            <text:p>&lt;label locale="rm_CH" preferred="1"&gt;&lt;name_singular&gt;Niv&lt;/name_singular&gt;&lt;name_plural&gt;Niv&lt;/name_plural&gt;&lt;/label&gt;</text:p>
          </table:table-cell>
          <table:table-cell table:formula="of:=[Snippets.$B$21]&amp;[Translations.E38]&amp;[Snippets.$C$21]&amp;[Translations.E38]&amp;[Snippets.$D$21]" office:value-type="string" office:string-value="&lt;label locale=&quot;en_US&quot; preferred=&quot;1&quot;&gt;&lt;name_singular&gt;Act&lt;/name_singular&gt;&lt;name_plural&gt;Act&lt;/name_plural&gt;&lt;/label&gt;" calcext:value-type="string">
            <text:p>&lt;label locale="en_US" preferred="1"&gt;&lt;name_singular&gt;Act&lt;/name_singular&gt;&lt;name_plural&gt;Act&lt;/name_plural&gt;&lt;/label&gt;</text:p>
          </table:table-cell>
          <table:table-cell table:formula="of:=[Snippets.B$15]&amp;[.B38]&amp;[Snippets.C$15]" office:value-type="string" office:string-value="&lt;item idno=&quot;akt&quot; enabled=&quot;1&quot; default=&quot;0&quot; value=&quot;0&quot;&gt;" calcext:value-type="string">
            <text:p>&lt;item idno="akt" enabled="1" default="0" value="0"&gt;</text:p>
          </table:table-cell>
          <table:table-cell table:formula="of:=[.H38]&amp;[Snippets.B$16]&amp;[.C38]&amp;[.D38]&amp;[.E38]&amp;[.F38]&amp;[.G38]&amp;[Snippets.B$22]&amp;[Snippets.B$23]" office:value-type="string" office:string-value="&lt;item idno=&quot;akt&quot; enabled=&quot;1&quot; default=&quot;0&quot; value=&quot;0&quot;&gt;&lt;labels&gt;&lt;label locale=&quot;de_CH&quot; preferred=&quot;1&quot;&gt;&lt;name_singular&gt;Akt&lt;/name_singular&gt;&lt;name_plural&gt;Akt&lt;/name_plural&gt;&lt;/label&gt;&lt;label locale=&quot;fr_CH&quot; preferred=&quot;1&quot;&gt;&lt;name_singular&gt;Nu&lt;/name_singular&gt;&lt;name_plural&gt;Nu&lt;/name_plural&gt;&lt;/label&gt;&lt;label locale=&quot;it_CH&quot; preferred=&quot;1&quot;&gt;&lt;name_singular&gt;Nudo&lt;/name_singular&gt;&lt;name_plural&gt;Nudo&lt;/name_plural&gt;&lt;/label&gt;&lt;label locale=&quot;rm_CH&quot; preferred=&quot;1&quot;&gt;&lt;name_singular&gt;Niv&lt;/name_singular&gt;&lt;name_plural&gt;Niv&lt;/name_plural&gt;&lt;/label&gt;&lt;label locale=&quot;en_US&quot; preferred=&quot;1&quot;&gt;&lt;name_singular&gt;Act&lt;/name_singular&gt;&lt;name_plural&gt;Act&lt;/name_plural&gt;&lt;/label&gt;&lt;/labels&gt;&lt;/item&gt;" calcext:value-type="string">
            <text:p>&lt;item idno="akt" enabled="1" default="0" value="0"&gt;&lt;labels&gt;&lt;label locale="de_CH" preferred="1"&gt;&lt;name_singular&gt;Akt&lt;/name_singular&gt;&lt;name_plural&gt;Akt&lt;/name_plural&gt;&lt;/label&gt;&lt;label locale="fr_CH" preferred="1"&gt;&lt;name_singular&gt;Nu&lt;/name_singular&gt;&lt;name_plural&gt;Nu&lt;/name_plural&gt;&lt;/label&gt;&lt;label locale="it_CH" preferred="1"&gt;&lt;name_singular&gt;Nudo&lt;/name_singular&gt;&lt;name_plural&gt;Nudo&lt;/name_plural&gt;&lt;/label&gt;&lt;label locale="rm_CH" preferred="1"&gt;&lt;name_singular&gt;Niv&lt;/name_singular&gt;&lt;name_plural&gt;Niv&lt;/name_plural&gt;&lt;/label&gt;&lt;label locale="en_US" preferred="1"&gt;&lt;name_singular&gt;Act&lt;/name_singular&gt;&lt;name_plural&gt;Act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Film</text:p>
          </table:table-cell>
          <table:table-cell office:value-type="string" calcext:value-type="string">
            <text:p>film</text:p>
          </table:table-cell>
          <table:table-cell table:formula="of:=[Snippets.$B$17]&amp;[Translations.A39]&amp;[Snippets.$C$17]&amp;[Translations.A39]&amp;[Snippets.$D$17]" office:value-type="string" office:string-value="&lt;label locale=&quot;de_CH&quot; preferred=&quot;1&quot;&gt;&lt;name_singular&gt;Film&lt;/name_singular&gt;&lt;name_plural&gt;Film&lt;/name_plural&gt;&lt;/label&gt;" calcext:value-type="string">
            <text:p>&lt;label locale="de_CH" preferred="1"&gt;&lt;name_singular&gt;Film&lt;/name_singular&gt;&lt;name_plural&gt;Film&lt;/name_plural&gt;&lt;/label&gt;</text:p>
          </table:table-cell>
          <table:table-cell table:formula="of:=[Snippets.$B$18]&amp;[Translations.B39]&amp;[Snippets.$C$18]&amp;[Translations.B39]&amp;[Snippets.$D$18]" office:value-type="string" office:string-value="&lt;label locale=&quot;fr_CH&quot; preferred=&quot;1&quot;&gt;&lt;name_singular&gt;Film&lt;/name_singular&gt;&lt;name_plural&gt;Film&lt;/name_plural&gt;&lt;/label&gt;" calcext:value-type="string">
            <text:p>&lt;label locale="fr_CH" preferred="1"&gt;&lt;name_singular&gt;Film&lt;/name_singular&gt;&lt;name_plural&gt;Film&lt;/name_plural&gt;&lt;/label&gt;</text:p>
          </table:table-cell>
          <table:table-cell table:formula="of:=[Snippets.$B$19]&amp;[Translations.C39]&amp;[Snippets.$C$19]&amp;[Translations.C39]&amp;[Snippets.$D$19]" office:value-type="string" office:string-value="&lt;label locale=&quot;it_CH&quot; preferred=&quot;1&quot;&gt;&lt;name_singular&gt;Film&lt;/name_singular&gt;&lt;name_plural&gt;Film&lt;/name_plural&gt;&lt;/label&gt;" calcext:value-type="string">
            <text:p>&lt;label locale="it_CH" preferred="1"&gt;&lt;name_singular&gt;Film&lt;/name_singular&gt;&lt;name_plural&gt;Film&lt;/name_plural&gt;&lt;/label&gt;</text:p>
          </table:table-cell>
          <table:table-cell table:formula="of:=[Snippets.$B$20]&amp;[Translations.D39]&amp;[Snippets.$C$20]&amp;[Translations.D39]&amp;[Snippets.$D$20]" office:value-type="string" office:string-value="&lt;label locale=&quot;rm_CH&quot; preferred=&quot;1&quot;&gt;&lt;name_singular&gt;Film&lt;/name_singular&gt;&lt;name_plural&gt;Film&lt;/name_plural&gt;&lt;/label&gt;" calcext:value-type="string">
            <text:p>&lt;label locale="rm_CH" preferred="1"&gt;&lt;name_singular&gt;Film&lt;/name_singular&gt;&lt;name_plural&gt;Film&lt;/name_plural&gt;&lt;/label&gt;</text:p>
          </table:table-cell>
          <table:table-cell table:formula="of:=[Snippets.$B$21]&amp;[Translations.E39]&amp;[Snippets.$C$21]&amp;[Translations.E39]&amp;[Snippets.$D$21]" office:value-type="string" office:string-value="&lt;label locale=&quot;en_US&quot; preferred=&quot;1&quot;&gt;&lt;name_singular&gt;Movie&lt;/name_singular&gt;&lt;name_plural&gt;Movie&lt;/name_plural&gt;&lt;/label&gt;" calcext:value-type="string">
            <text:p>&lt;label locale="en_US" preferred="1"&gt;&lt;name_singular&gt;Movie&lt;/name_singular&gt;&lt;name_plural&gt;Movie&lt;/name_plural&gt;&lt;/label&gt;</text:p>
          </table:table-cell>
          <table:table-cell table:formula="of:=[Snippets.B$15]&amp;[.B39]&amp;[Snippets.C$15]" office:value-type="string" office:string-value="&lt;item idno=&quot;film&quot; enabled=&quot;1&quot; default=&quot;0&quot; value=&quot;0&quot;&gt;" calcext:value-type="string">
            <text:p>&lt;item idno="film" enabled="1" default="0" value="0"&gt;</text:p>
          </table:table-cell>
          <table:table-cell table:formula="of:=[.H39]&amp;[Snippets.B$16]&amp;[.C39]&amp;[.D39]&amp;[.E39]&amp;[.F39]&amp;[.G39]&amp;[Snippets.B$22]&amp;[Snippets.B$23]" office:value-type="string" office:string-value="&lt;item idno=&quot;film&quot; enabled=&quot;1&quot; default=&quot;0&quot; value=&quot;0&quot;&gt;&lt;labels&gt;&lt;label locale=&quot;de_CH&quot; preferred=&quot;1&quot;&gt;&lt;name_singular&gt;Film&lt;/name_singular&gt;&lt;name_plural&gt;Film&lt;/name_plural&gt;&lt;/label&gt;&lt;label locale=&quot;fr_CH&quot; preferred=&quot;1&quot;&gt;&lt;name_singular&gt;Film&lt;/name_singular&gt;&lt;name_plural&gt;Film&lt;/name_plural&gt;&lt;/label&gt;&lt;label locale=&quot;it_CH&quot; preferred=&quot;1&quot;&gt;&lt;name_singular&gt;Film&lt;/name_singular&gt;&lt;name_plural&gt;Film&lt;/name_plural&gt;&lt;/label&gt;&lt;label locale=&quot;rm_CH&quot; preferred=&quot;1&quot;&gt;&lt;name_singular&gt;Film&lt;/name_singular&gt;&lt;name_plural&gt;Film&lt;/name_plural&gt;&lt;/label&gt;&lt;label locale=&quot;en_US&quot; preferred=&quot;1&quot;&gt;&lt;name_singular&gt;Movie&lt;/name_singular&gt;&lt;name_plural&gt;Movie&lt;/name_plural&gt;&lt;/label&gt;&lt;/labels&gt;&lt;/item&gt;" calcext:value-type="string">
            <text:p>&lt;item idno="film" enabled="1" default="0" value="0"&gt;&lt;labels&gt;&lt;label locale="de_CH" preferred="1"&gt;&lt;name_singular&gt;Film&lt;/name_singular&gt;&lt;name_plural&gt;Film&lt;/name_plural&gt;&lt;/label&gt;&lt;label locale="fr_CH" preferred="1"&gt;&lt;name_singular&gt;Film&lt;/name_singular&gt;&lt;name_plural&gt;Film&lt;/name_plural&gt;&lt;/label&gt;&lt;label locale="it_CH" preferred="1"&gt;&lt;name_singular&gt;Film&lt;/name_singular&gt;&lt;name_plural&gt;Film&lt;/name_plural&gt;&lt;/label&gt;&lt;label locale="rm_CH" preferred="1"&gt;&lt;name_singular&gt;Film&lt;/name_singular&gt;&lt;name_plural&gt;Film&lt;/name_plural&gt;&lt;/label&gt;&lt;label locale="en_US" preferred="1"&gt;&lt;name_singular&gt;Movie&lt;/name_singular&gt;&lt;name_plural&gt;Movie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Dokumentation</text:p>
          </table:table-cell>
          <table:table-cell office:value-type="string" calcext:value-type="string">
            <text:p>dokumentation</text:p>
          </table:table-cell>
          <table:table-cell table:formula="of:=[Snippets.$B$17]&amp;[Translations.A40]&amp;[Snippets.$C$17]&amp;[Translations.A40]&amp;[Snippets.$D$17]" office:value-type="string" office:string-value="&lt;label locale=&quot;de_CH&quot; preferred=&quot;1&quot;&gt;&lt;name_singular&gt;Dokumentation&lt;/name_singular&gt;&lt;name_plural&gt;Dokumentation&lt;/name_plural&gt;&lt;/label&gt;" calcext:value-type="string">
            <text:p>&lt;label locale="de_CH" preferred="1"&gt;&lt;name_singular&gt;Dokumentation&lt;/name_singular&gt;&lt;name_plural&gt;Dokumentation&lt;/name_plural&gt;&lt;/label&gt;</text:p>
          </table:table-cell>
          <table:table-cell table:formula="of:=[Snippets.$B$18]&amp;[Translations.B40]&amp;[Snippets.$C$18]&amp;[Translations.B40]&amp;[Snippets.$D$18]" office:value-type="string" office:string-value="&lt;label locale=&quot;fr_CH&quot; preferred=&quot;1&quot;&gt;&lt;name_singular&gt;Photographie documentaire&lt;/name_singular&gt;&lt;name_plural&gt;Photographie documentaire&lt;/name_plural&gt;&lt;/label&gt;" calcext:value-type="string">
            <text:p>&lt;label locale="fr_CH" preferred="1"&gt;&lt;name_singular&gt;Photographie documentaire&lt;/name_singular&gt;&lt;name_plural&gt;Photographie documentaire&lt;/name_plural&gt;&lt;/label&gt;</text:p>
          </table:table-cell>
          <table:table-cell table:formula="of:=[Snippets.$B$19]&amp;[Translations.C40]&amp;[Snippets.$C$19]&amp;[Translations.C40]&amp;[Snippets.$D$19]" office:value-type="string" office:string-value="&lt;label locale=&quot;it_CH&quot; preferred=&quot;1&quot;&gt;&lt;name_singular&gt;Fotografia documentaria&lt;/name_singular&gt;&lt;name_plural&gt;Fotografia documentaria&lt;/name_plural&gt;&lt;/label&gt;" calcext:value-type="string">
            <text:p>&lt;label locale="it_CH" preferred="1"&gt;&lt;name_singular&gt;Fotografia documentaria&lt;/name_singular&gt;&lt;name_plural&gt;Fotografia documentaria&lt;/name_plural&gt;&lt;/label&gt;</text:p>
          </table:table-cell>
          <table:table-cell table:formula="of:=[Snippets.$B$20]&amp;[Translations.D40]&amp;[Snippets.$C$20]&amp;[Translations.D40]&amp;[Snippets.$D$20]" office:value-type="string" office:string-value="&lt;label locale=&quot;rm_CH&quot; preferred=&quot;1&quot;&gt;&lt;name_singular&gt;Documentaziun&lt;/name_singular&gt;&lt;name_plural&gt;Documentaziun&lt;/name_plural&gt;&lt;/label&gt;" calcext:value-type="string">
            <text:p>&lt;label locale="rm_CH" preferred="1"&gt;&lt;name_singular&gt;Documentaziun&lt;/name_singular&gt;&lt;name_plural&gt;Documentaziun&lt;/name_plural&gt;&lt;/label&gt;</text:p>
          </table:table-cell>
          <table:table-cell table:formula="of:=[Snippets.$B$21]&amp;[Translations.E40]&amp;[Snippets.$C$21]&amp;[Translations.E40]&amp;[Snippets.$D$21]" office:value-type="string" office:string-value="&lt;label locale=&quot;en_US&quot; preferred=&quot;1&quot;&gt;&lt;name_singular&gt;Documentation&lt;/name_singular&gt;&lt;name_plural&gt;Documentation&lt;/name_plural&gt;&lt;/label&gt;" calcext:value-type="string">
            <text:p>&lt;label locale="en_US" preferred="1"&gt;&lt;name_singular&gt;Documentation&lt;/name_singular&gt;&lt;name_plural&gt;Documentation&lt;/name_plural&gt;&lt;/label&gt;</text:p>
          </table:table-cell>
          <table:table-cell table:formula="of:=[Snippets.B$15]&amp;[.B40]&amp;[Snippets.C$15]" office:value-type="string" office:string-value="&lt;item idno=&quot;dokumentation&quot; enabled=&quot;1&quot; default=&quot;0&quot; value=&quot;0&quot;&gt;" calcext:value-type="string">
            <text:p>&lt;item idno="dokumentation" enabled="1" default="0" value="0"&gt;</text:p>
          </table:table-cell>
          <table:table-cell table:formula="of:=[.H40]&amp;[Snippets.B$16]&amp;[.C40]&amp;[.D40]&amp;[.E40]&amp;[.F40]&amp;[.G40]&amp;[Snippets.B$22]&amp;[Snippets.B$23]" office:value-type="string" office:string-value="&lt;item idno=&quot;dokumentation&quot; enabled=&quot;1&quot; default=&quot;0&quot; value=&quot;0&quot;&gt;&lt;labels&gt;&lt;label locale=&quot;de_CH&quot; preferred=&quot;1&quot;&gt;&lt;name_singular&gt;Dokumentation&lt;/name_singular&gt;&lt;name_plural&gt;Dokumentation&lt;/name_plural&gt;&lt;/label&gt;&lt;label locale=&quot;fr_CH&quot; preferred=&quot;1&quot;&gt;&lt;name_singular&gt;Photographie documentaire&lt;/name_singular&gt;&lt;name_plural&gt;Photographie documentaire&lt;/name_plural&gt;&lt;/label&gt;&lt;label locale=&quot;it_CH&quot; preferred=&quot;1&quot;&gt;&lt;name_singular&gt;Fotografia documentaria&lt;/name_singular&gt;&lt;name_plural&gt;Fotografia documentaria&lt;/name_plural&gt;&lt;/label&gt;&lt;label locale=&quot;rm_CH&quot; preferred=&quot;1&quot;&gt;&lt;name_singular&gt;Documentaziun&lt;/name_singular&gt;&lt;name_plural&gt;Documentaziun&lt;/name_plural&gt;&lt;/label&gt;&lt;label locale=&quot;en_US&quot; preferred=&quot;1&quot;&gt;&lt;name_singular&gt;Documentation&lt;/name_singular&gt;&lt;name_plural&gt;Documentation&lt;/name_plural&gt;&lt;/label&gt;&lt;/labels&gt;&lt;/item&gt;" calcext:value-type="string">
            <text:p>&lt;item idno="dokumentation" enabled="1" default="0" value="0"&gt;&lt;labels&gt;&lt;label locale="de_CH" preferred="1"&gt;&lt;name_singular&gt;Dokumentation&lt;/name_singular&gt;&lt;name_plural&gt;Dokumentation&lt;/name_plural&gt;&lt;/label&gt;&lt;label locale="fr_CH" preferred="1"&gt;&lt;name_singular&gt;Photographie documentaire&lt;/name_singular&gt;&lt;name_plural&gt;Photographie documentaire&lt;/name_plural&gt;&lt;/label&gt;&lt;label locale="it_CH" preferred="1"&gt;&lt;name_singular&gt;Fotografia documentaria&lt;/name_singular&gt;&lt;name_plural&gt;Fotografia documentaria&lt;/name_plural&gt;&lt;/label&gt;&lt;label locale="rm_CH" preferred="1"&gt;&lt;name_singular&gt;Documentaziun&lt;/name_singular&gt;&lt;name_plural&gt;Documentaziun&lt;/name_plural&gt;&lt;/label&gt;&lt;label locale="en_US" preferred="1"&gt;&lt;name_singular&gt;Documentation&lt;/name_singular&gt;&lt;name_plural&gt;Documentation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Multivision</text:p>
          </table:table-cell>
          <table:table-cell office:value-type="string" calcext:value-type="string">
            <text:p>multivision</text:p>
          </table:table-cell>
          <table:table-cell table:formula="of:=[Snippets.$B$17]&amp;[Translations.A41]&amp;[Snippets.$C$17]&amp;[Translations.A41]&amp;[Snippets.$D$17]" office:value-type="string" office:string-value="&lt;label locale=&quot;de_CH&quot; preferred=&quot;1&quot;&gt;&lt;name_singular&gt;Multivision&lt;/name_singular&gt;&lt;name_plural&gt;Multivision&lt;/name_plural&gt;&lt;/label&gt;" calcext:value-type="string">
            <text:p>&lt;label locale="de_CH" preferred="1"&gt;&lt;name_singular&gt;Multivision&lt;/name_singular&gt;&lt;name_plural&gt;Multivision&lt;/name_plural&gt;&lt;/label&gt;</text:p>
          </table:table-cell>
          <table:table-cell table:formula="of:=[Snippets.$B$18]&amp;[Translations.B41]&amp;[Snippets.$C$18]&amp;[Translations.B41]&amp;[Snippets.$D$18]" office:value-type="string" office:string-value="&lt;label locale=&quot;fr_CH&quot; preferred=&quot;1&quot;&gt;&lt;name_singular&gt;Diaporama&lt;/name_singular&gt;&lt;name_plural&gt;Diaporama&lt;/name_plural&gt;&lt;/label&gt;" calcext:value-type="string">
            <text:p>&lt;label locale="fr_CH" preferred="1"&gt;&lt;name_singular&gt;Diaporama&lt;/name_singular&gt;&lt;name_plural&gt;Diaporama&lt;/name_plural&gt;&lt;/label&gt;</text:p>
          </table:table-cell>
          <table:table-cell table:formula="of:=[Snippets.$B$19]&amp;[Translations.C41]&amp;[Snippets.$C$19]&amp;[Translations.C41]&amp;[Snippets.$D$19]" office:value-type="string" office:string-value="&lt;label locale=&quot;it_CH&quot; preferred=&quot;1&quot;&gt;&lt;name_singular&gt;Multivisione&lt;/name_singular&gt;&lt;name_plural&gt;Multivisione&lt;/name_plural&gt;&lt;/label&gt;" calcext:value-type="string">
            <text:p>&lt;label locale="it_CH" preferred="1"&gt;&lt;name_singular&gt;Multivisione&lt;/name_singular&gt;&lt;name_plural&gt;Multivisione&lt;/name_plural&gt;&lt;/label&gt;</text:p>
          </table:table-cell>
          <table:table-cell table:formula="of:=[Snippets.$B$20]&amp;[Translations.D41]&amp;[Snippets.$C$20]&amp;[Translations.D41]&amp;[Snippets.$D$20]" office:value-type="string" office:string-value="&lt;label locale=&quot;rm_CH&quot; preferred=&quot;1&quot;&gt;&lt;name_singular&gt;Multivisiun&lt;/name_singular&gt;&lt;name_plural&gt;Multivisiun&lt;/name_plural&gt;&lt;/label&gt;" calcext:value-type="string">
            <text:p>&lt;label locale="rm_CH" preferred="1"&gt;&lt;name_singular&gt;Multivisiun&lt;/name_singular&gt;&lt;name_plural&gt;Multivisiun&lt;/name_plural&gt;&lt;/label&gt;</text:p>
          </table:table-cell>
          <table:table-cell table:formula="of:=[Snippets.$B$21]&amp;[Translations.E41]&amp;[Snippets.$C$21]&amp;[Translations.E41]&amp;[Snippets.$D$21]" office:value-type="string" office:string-value="&lt;label locale=&quot;en_US&quot; preferred=&quot;1&quot;&gt;&lt;name_singular&gt;Multivision&lt;/name_singular&gt;&lt;name_plural&gt;Multivision&lt;/name_plural&gt;&lt;/label&gt;" calcext:value-type="string">
            <text:p>&lt;label locale="en_US" preferred="1"&gt;&lt;name_singular&gt;Multivision&lt;/name_singular&gt;&lt;name_plural&gt;Multivision&lt;/name_plural&gt;&lt;/label&gt;</text:p>
          </table:table-cell>
          <table:table-cell table:formula="of:=[Snippets.B$15]&amp;[.B41]&amp;[Snippets.C$15]" office:value-type="string" office:string-value="&lt;item idno=&quot;multivision&quot; enabled=&quot;1&quot; default=&quot;0&quot; value=&quot;0&quot;&gt;" calcext:value-type="string">
            <text:p>&lt;item idno="multivision" enabled="1" default="0" value="0"&gt;</text:p>
          </table:table-cell>
          <table:table-cell table:formula="of:=[.H41]&amp;[Snippets.B$16]&amp;[.C41]&amp;[.D41]&amp;[.E41]&amp;[.F41]&amp;[.G41]&amp;[Snippets.B$22]&amp;[Snippets.B$23]" office:value-type="string" office:string-value="&lt;item idno=&quot;multivision&quot; enabled=&quot;1&quot; default=&quot;0&quot; value=&quot;0&quot;&gt;&lt;labels&gt;&lt;label locale=&quot;de_CH&quot; preferred=&quot;1&quot;&gt;&lt;name_singular&gt;Multivision&lt;/name_singular&gt;&lt;name_plural&gt;Multivision&lt;/name_plural&gt;&lt;/label&gt;&lt;label locale=&quot;fr_CH&quot; preferred=&quot;1&quot;&gt;&lt;name_singular&gt;Diaporama&lt;/name_singular&gt;&lt;name_plural&gt;Diaporama&lt;/name_plural&gt;&lt;/label&gt;&lt;label locale=&quot;it_CH&quot; preferred=&quot;1&quot;&gt;&lt;name_singular&gt;Multivisione&lt;/name_singular&gt;&lt;name_plural&gt;Multivisione&lt;/name_plural&gt;&lt;/label&gt;&lt;label locale=&quot;rm_CH&quot; preferred=&quot;1&quot;&gt;&lt;name_singular&gt;Multivisiun&lt;/name_singular&gt;&lt;name_plural&gt;Multivisiun&lt;/name_plural&gt;&lt;/label&gt;&lt;label locale=&quot;en_US&quot; preferred=&quot;1&quot;&gt;&lt;name_singular&gt;Multivision&lt;/name_singular&gt;&lt;name_plural&gt;Multivision&lt;/name_plural&gt;&lt;/label&gt;&lt;/labels&gt;&lt;/item&gt;" calcext:value-type="string">
            <text:p>&lt;item idno="multivision" enabled="1" default="0" value="0"&gt;&lt;labels&gt;&lt;label locale="de_CH" preferred="1"&gt;&lt;name_singular&gt;Multivision&lt;/name_singular&gt;&lt;name_plural&gt;Multivision&lt;/name_plural&gt;&lt;/label&gt;&lt;label locale="fr_CH" preferred="1"&gt;&lt;name_singular&gt;Diaporama&lt;/name_singular&gt;&lt;name_plural&gt;Diaporama&lt;/name_plural&gt;&lt;/label&gt;&lt;label locale="it_CH" preferred="1"&gt;&lt;name_singular&gt;Multivisione&lt;/name_singular&gt;&lt;name_plural&gt;Multivisione&lt;/name_plural&gt;&lt;/label&gt;&lt;label locale="rm_CH" preferred="1"&gt;&lt;name_singular&gt;Multivisiun&lt;/name_singular&gt;&lt;name_plural&gt;Multivisiun&lt;/name_plural&gt;&lt;/label&gt;&lt;label locale="en_US" preferred="1"&gt;&lt;name_singular&gt;Multivision&lt;/name_singular&gt;&lt;name_plural&gt;Multivision&lt;/name_plural&gt;&lt;/label&gt;&lt;/labels&gt;&lt;/item&gt;</text:p>
          </table:table-cell>
        </table:table-row>
        <table:table-row table:style-name="ro3">
          <table:table-cell table:style-name="ce2" office:value-type="string" calcext:value-type="string">
            <text:p>private Fotografie</text:p>
          </table:table-cell>
          <table:table-cell table:style-name="ce2" office:value-type="string" calcext:value-type="string">
            <text:p>private</text:p>
          </table:table-cell>
          <table:table-cell table:formula="of:=[Snippets.$B$17]&amp;[Translations.A42]&amp;[Snippets.$C$17]&amp;[Translations.A42]&amp;[Snippets.$D$17]" office:value-type="string" office:string-value="&lt;label locale=&quot;de_CH&quot; preferred=&quot;1&quot;&gt;&lt;name_singular&gt;private Fotografie&lt;/name_singular&gt;&lt;name_plural&gt;private Fotografie&lt;/name_plural&gt;&lt;/label&gt;" calcext:value-type="string">
            <text:p>&lt;label locale="de_CH" preferred="1"&gt;&lt;name_singular&gt;private Fotografie&lt;/name_singular&gt;&lt;name_plural&gt;private Fotografie&lt;/name_plural&gt;&lt;/label&gt;</text:p>
          </table:table-cell>
          <table:table-cell table:formula="of:=[Snippets.$B$18]&amp;[Translations.B42]&amp;[Snippets.$C$18]&amp;[Translations.B42]&amp;[Snippets.$D$18]" office:value-type="string" office:string-value="&lt;label locale=&quot;fr_CH&quot; preferred=&quot;1&quot;&gt;&lt;name_singular&gt;Photographie privée&lt;/name_singular&gt;&lt;name_plural&gt;Photographie privée&lt;/name_plural&gt;&lt;/label&gt;" calcext:value-type="string">
            <text:p>&lt;label locale="fr_CH" preferred="1"&gt;&lt;name_singular&gt;Photographie privée&lt;/name_singular&gt;&lt;name_plural&gt;Photographie privée&lt;/name_plural&gt;&lt;/label&gt;</text:p>
          </table:table-cell>
          <table:table-cell table:formula="of:=[Snippets.$B$19]&amp;[Translations.C42]&amp;[Snippets.$C$19]&amp;[Translations.C42]&amp;[Snippets.$D$19]" office:value-type="string" office:string-value="&lt;label locale=&quot;it_CH&quot; preferred=&quot;1&quot;&gt;&lt;name_singular&gt;Fotografia privata&lt;/name_singular&gt;&lt;name_plural&gt;Fotografia privata&lt;/name_plural&gt;&lt;/label&gt;" calcext:value-type="string">
            <text:p>&lt;label locale="it_CH" preferred="1"&gt;&lt;name_singular&gt;Fotografia privata&lt;/name_singular&gt;&lt;name_plural&gt;Fotografia privata&lt;/name_plural&gt;&lt;/label&gt;</text:p>
          </table:table-cell>
          <table:table-cell table:formula="of:=[Snippets.$B$20]&amp;[Translations.D42]&amp;[Snippets.$C$20]&amp;[Translations.D42]&amp;[Snippets.$D$20]" office:value-type="string" office:string-value="&lt;label locale=&quot;rm_CH&quot; preferred=&quot;1&quot;&gt;&lt;name_singular&gt;Fotografia privata&lt;/name_singular&gt;&lt;name_plural&gt;Fotografia privata&lt;/name_plural&gt;&lt;/label&gt;" calcext:value-type="string">
            <text:p>&lt;label locale="rm_CH" preferred="1"&gt;&lt;name_singular&gt;Fotografia privata&lt;/name_singular&gt;&lt;name_plural&gt;Fotografia privata&lt;/name_plural&gt;&lt;/label&gt;</text:p>
          </table:table-cell>
          <table:table-cell table:formula="of:=[Snippets.$B$21]&amp;[Translations.E42]&amp;[Snippets.$C$21]&amp;[Translations.E42]&amp;[Snippets.$D$21]" office:value-type="string" office:string-value="&lt;label locale=&quot;en_US&quot; preferred=&quot;1&quot;&gt;&lt;name_singular&gt;Private photography&lt;/name_singular&gt;&lt;name_plural&gt;Private photography&lt;/name_plural&gt;&lt;/label&gt;" calcext:value-type="string">
            <text:p>&lt;label locale="en_US" preferred="1"&gt;&lt;name_singular&gt;Private photography&lt;/name_singular&gt;&lt;name_plural&gt;Private photography&lt;/name_plural&gt;&lt;/label&gt;</text:p>
          </table:table-cell>
          <table:table-cell table:formula="of:=[Snippets.B$15]&amp;[.B42]&amp;[Snippets.C$15]" office:value-type="string" office:string-value="&lt;item idno=&quot;private&quot; enabled=&quot;1&quot; default=&quot;0&quot; value=&quot;0&quot;&gt;" calcext:value-type="string">
            <text:p>&lt;item idno="private" enabled="1" default="0" value="0"&gt;</text:p>
          </table:table-cell>
          <table:table-cell table:formula="of:=[.H42]&amp;[Snippets.B$16]&amp;[.C42]&amp;[.D42]&amp;[.E42]&amp;[.F42]&amp;[.G42]&amp;[Snippets.B$22]&amp;[Snippets.B$23]" office:value-type="string" office:string-value="&lt;item idno=&quot;private&quot; enabled=&quot;1&quot; default=&quot;0&quot; value=&quot;0&quot;&gt;&lt;labels&gt;&lt;label locale=&quot;de_CH&quot; preferred=&quot;1&quot;&gt;&lt;name_singular&gt;private Fotografie&lt;/name_singular&gt;&lt;name_plural&gt;private Fotografie&lt;/name_plural&gt;&lt;/label&gt;&lt;label locale=&quot;fr_CH&quot; preferred=&quot;1&quot;&gt;&lt;name_singular&gt;Photographie privée&lt;/name_singular&gt;&lt;name_plural&gt;Photographie privée&lt;/name_plural&gt;&lt;/label&gt;&lt;label locale=&quot;it_CH&quot; preferred=&quot;1&quot;&gt;&lt;name_singular&gt;Fotografia privata&lt;/name_singular&gt;&lt;name_plural&gt;Fotografia privata&lt;/name_plural&gt;&lt;/label&gt;&lt;label locale=&quot;rm_CH&quot; preferred=&quot;1&quot;&gt;&lt;name_singular&gt;Fotografia privata&lt;/name_singular&gt;&lt;name_plural&gt;Fotografia privata&lt;/name_plural&gt;&lt;/label&gt;&lt;label locale=&quot;en_US&quot; preferred=&quot;1&quot;&gt;&lt;name_singular&gt;Private photography&lt;/name_singular&gt;&lt;name_plural&gt;Private photography&lt;/name_plural&gt;&lt;/label&gt;&lt;/labels&gt;&lt;/item&gt;" calcext:value-type="string">
            <text:p>&lt;item idno="private" enabled="1" default="0" value="0"&gt;&lt;labels&gt;&lt;label locale="de_CH" preferred="1"&gt;&lt;name_singular&gt;private Fotografie&lt;/name_singular&gt;&lt;name_plural&gt;private Fotografie&lt;/name_plural&gt;&lt;/label&gt;&lt;label locale="fr_CH" preferred="1"&gt;&lt;name_singular&gt;Photographie privée&lt;/name_singular&gt;&lt;name_plural&gt;Photographie privée&lt;/name_plural&gt;&lt;/label&gt;&lt;label locale="it_CH" preferred="1"&gt;&lt;name_singular&gt;Fotografia privata&lt;/name_singular&gt;&lt;name_plural&gt;Fotografia privata&lt;/name_plural&gt;&lt;/label&gt;&lt;label locale="rm_CH" preferred="1"&gt;&lt;name_singular&gt;Fotografia privata&lt;/name_singular&gt;&lt;name_plural&gt;Fotografia privata&lt;/name_plural&gt;&lt;/label&gt;&lt;label locale="en_US" preferred="1"&gt;&lt;name_singular&gt;Private photography&lt;/name_singular&gt;&lt;name_plural&gt;Private photography&lt;/name_plural&gt;&lt;/label&gt;&lt;/labels&gt;&lt;/item&gt;</text:p>
          </table:table-cell>
        </table:table-row>
        <table:table-row table:style-name="ro3">
          <table:table-cell table:style-name="ce2" office:value-type="string" calcext:value-type="string">
            <text:p>wissenschaftliche Fotografie</text:p>
          </table:table-cell>
          <table:table-cell table:style-name="ce2" office:value-type="string" calcext:value-type="string">
            <text:p>wissenschaft</text:p>
          </table:table-cell>
          <table:table-cell table:formula="of:=[Snippets.$B$17]&amp;[Translations.A43]&amp;[Snippets.$C$17]&amp;[Translations.A43]&amp;[Snippets.$D$17]" office:value-type="string" office:string-value="&lt;label locale=&quot;de_CH&quot; preferred=&quot;1&quot;&gt;&lt;name_singular&gt;wissenschaftliche Fotografie&lt;/name_singular&gt;&lt;name_plural&gt;wissenschaftliche Fotografie&lt;/name_plural&gt;&lt;/label&gt;" calcext:value-type="string">
            <text:p>&lt;label locale="de_CH" preferred="1"&gt;&lt;name_singular&gt;wissenschaftliche Fotografie&lt;/name_singular&gt;&lt;name_plural&gt;wissenschaftliche Fotografie&lt;/name_plural&gt;&lt;/label&gt;</text:p>
          </table:table-cell>
          <table:table-cell table:formula="of:=[Snippets.$B$18]&amp;[Translations.B43]&amp;[Snippets.$C$18]&amp;[Translations.B43]&amp;[Snippets.$D$18]" office:value-type="string" office:string-value="&lt;label locale=&quot;fr_CH&quot; preferred=&quot;1&quot;&gt;&lt;name_singular&gt;Photographie scientifique&lt;/name_singular&gt;&lt;name_plural&gt;Photographie scientifique&lt;/name_plural&gt;&lt;/label&gt;" calcext:value-type="string">
            <text:p>&lt;label locale="fr_CH" preferred="1"&gt;&lt;name_singular&gt;Photographie scientifique&lt;/name_singular&gt;&lt;name_plural&gt;Photographie scientifique&lt;/name_plural&gt;&lt;/label&gt;</text:p>
          </table:table-cell>
          <table:table-cell table:formula="of:=[Snippets.$B$19]&amp;[Translations.C43]&amp;[Snippets.$C$19]&amp;[Translations.C43]&amp;[Snippets.$D$19]" office:value-type="string" office:string-value="&lt;label locale=&quot;it_CH&quot; preferred=&quot;1&quot;&gt;&lt;name_singular&gt;Fotografia scientifica&lt;/name_singular&gt;&lt;name_plural&gt;Fotografia scientifica&lt;/name_plural&gt;&lt;/label&gt;" calcext:value-type="string">
            <text:p>&lt;label locale="it_CH" preferred="1"&gt;&lt;name_singular&gt;Fotografia scientifica&lt;/name_singular&gt;&lt;name_plural&gt;Fotografia scientifica&lt;/name_plural&gt;&lt;/label&gt;</text:p>
          </table:table-cell>
          <table:table-cell table:formula="of:=[Snippets.$B$20]&amp;[Translations.D43]&amp;[Snippets.$C$20]&amp;[Translations.D43]&amp;[Snippets.$D$20]" office:value-type="string" office:string-value="&lt;label locale=&quot;rm_CH&quot; preferred=&quot;1&quot;&gt;&lt;name_singular&gt;Fotografia scientifica&lt;/name_singular&gt;&lt;name_plural&gt;Fotografia scientifica&lt;/name_plural&gt;&lt;/label&gt;" calcext:value-type="string">
            <text:p>&lt;label locale="rm_CH" preferred="1"&gt;&lt;name_singular&gt;Fotografia scientifica&lt;/name_singular&gt;&lt;name_plural&gt;Fotografia scientifica&lt;/name_plural&gt;&lt;/label&gt;</text:p>
          </table:table-cell>
          <table:table-cell table:formula="of:=[Snippets.$B$21]&amp;[Translations.E43]&amp;[Snippets.$C$21]&amp;[Translations.E43]&amp;[Snippets.$D$21]" office:value-type="string" office:string-value="&lt;label locale=&quot;en_US&quot; preferred=&quot;1&quot;&gt;&lt;name_singular&gt;Scientific photography&lt;/name_singular&gt;&lt;name_plural&gt;Scientific photography&lt;/name_plural&gt;&lt;/label&gt;" calcext:value-type="string">
            <text:p>&lt;label locale="en_US" preferred="1"&gt;&lt;name_singular&gt;Scientific photography&lt;/name_singular&gt;&lt;name_plural&gt;Scientific photography&lt;/name_plural&gt;&lt;/label&gt;</text:p>
          </table:table-cell>
          <table:table-cell table:formula="of:=[Snippets.B$15]&amp;[.B43]&amp;[Snippets.C$15]" office:value-type="string" office:string-value="&lt;item idno=&quot;wissenschaft&quot; enabled=&quot;1&quot; default=&quot;0&quot; value=&quot;0&quot;&gt;" calcext:value-type="string">
            <text:p>&lt;item idno="wissenschaft" enabled="1" default="0" value="0"&gt;</text:p>
          </table:table-cell>
          <table:table-cell table:formula="of:=[.H43]&amp;[Snippets.B$16]&amp;[.C43]&amp;[.D43]&amp;[.E43]&amp;[.F43]&amp;[.G43]&amp;[Snippets.B$22]&amp;[Snippets.B$23]" office:value-type="string" office:string-value="&lt;item idno=&quot;wissenschaft&quot; enabled=&quot;1&quot; default=&quot;0&quot; value=&quot;0&quot;&gt;&lt;labels&gt;&lt;label locale=&quot;de_CH&quot; preferred=&quot;1&quot;&gt;&lt;name_singular&gt;wissenschaftliche Fotografie&lt;/name_singular&gt;&lt;name_plural&gt;wissenschaftliche Fotografie&lt;/name_plural&gt;&lt;/label&gt;&lt;label locale=&quot;fr_CH&quot; preferred=&quot;1&quot;&gt;&lt;name_singular&gt;Photographie scientifique&lt;/name_singular&gt;&lt;name_plural&gt;Photographie scientifique&lt;/name_plural&gt;&lt;/label&gt;&lt;label locale=&quot;it_CH&quot; preferred=&quot;1&quot;&gt;&lt;name_singular&gt;Fotografia scientifica&lt;/name_singular&gt;&lt;name_plural&gt;Fotografia scientifica&lt;/name_plural&gt;&lt;/label&gt;&lt;label locale=&quot;rm_CH&quot; preferred=&quot;1&quot;&gt;&lt;name_singular&gt;Fotografia scientifica&lt;/name_singular&gt;&lt;name_plural&gt;Fotografia scientifica&lt;/name_plural&gt;&lt;/label&gt;&lt;label locale=&quot;en_US&quot; preferred=&quot;1&quot;&gt;&lt;name_singular&gt;Scientific photography&lt;/name_singular&gt;&lt;name_plural&gt;Scientific photography&lt;/name_plural&gt;&lt;/label&gt;&lt;/labels&gt;&lt;/item&gt;" calcext:value-type="string">
            <text:p>&lt;item idno="wissenschaft" enabled="1" default="0" value="0"&gt;&lt;labels&gt;&lt;label locale="de_CH" preferred="1"&gt;&lt;name_singular&gt;wissenschaftliche Fotografie&lt;/name_singular&gt;&lt;name_plural&gt;wissenschaftliche Fotografie&lt;/name_plural&gt;&lt;/label&gt;&lt;label locale="fr_CH" preferred="1"&gt;&lt;name_singular&gt;Photographie scientifique&lt;/name_singular&gt;&lt;name_plural&gt;Photographie scientifique&lt;/name_plural&gt;&lt;/label&gt;&lt;label locale="it_CH" preferred="1"&gt;&lt;name_singular&gt;Fotografia scientifica&lt;/name_singular&gt;&lt;name_plural&gt;Fotografia scientifica&lt;/name_plural&gt;&lt;/label&gt;&lt;label locale="rm_CH" preferred="1"&gt;&lt;name_singular&gt;Fotografia scientifica&lt;/name_singular&gt;&lt;name_plural&gt;Fotografia scientifica&lt;/name_plural&gt;&lt;/label&gt;&lt;label locale="en_US" preferred="1"&gt;&lt;name_singular&gt;Scientific photography&lt;/name_singular&gt;&lt;name_plural&gt;Scientific photography&lt;/name_plural&gt;&lt;/label&gt;&lt;/labels&gt;&lt;/item&gt;</text:p>
          </table:table-cell>
        </table:table-row>
        <table:table-row table:style-name="ro3">
          <table:table-cell office:value-type="string" calcext:value-type="string">
            <text:p>Reise</text:p>
          </table:table-cell>
          <table:table-cell office:value-type="string" calcext:value-type="string">
            <text:p>reise</text:p>
          </table:table-cell>
          <table:table-cell table:formula="of:=[Snippets.$B$17]&amp;[Translations.A44]&amp;[Snippets.$C$17]&amp;[Translations.A44]&amp;[Snippets.$D$17]" office:value-type="string" office:string-value="&lt;label locale=&quot;de_CH&quot; preferred=&quot;1&quot;&gt;&lt;name_singular&gt;Reise&lt;/name_singular&gt;&lt;name_plural&gt;Reise&lt;/name_plural&gt;&lt;/label&gt;" calcext:value-type="string">
            <text:p>&lt;label locale="de_CH" preferred="1"&gt;&lt;name_singular&gt;Reise&lt;/name_singular&gt;&lt;name_plural&gt;Reise&lt;/name_plural&gt;&lt;/label&gt;</text:p>
          </table:table-cell>
          <table:table-cell table:formula="of:=[Snippets.$B$18]&amp;[Translations.B44]&amp;[Snippets.$C$18]&amp;[Translations.B44]&amp;[Snippets.$D$18]" office:value-type="string" office:string-value="&lt;label locale=&quot;fr_CH&quot; preferred=&quot;1&quot;&gt;&lt;name_singular&gt;Voyage&lt;/name_singular&gt;&lt;name_plural&gt;Voyage&lt;/name_plural&gt;&lt;/label&gt;" calcext:value-type="string">
            <text:p>&lt;label locale="fr_CH" preferred="1"&gt;&lt;name_singular&gt;Voyage&lt;/name_singular&gt;&lt;name_plural&gt;Voyage&lt;/name_plural&gt;&lt;/label&gt;</text:p>
          </table:table-cell>
          <table:table-cell table:formula="of:=[Snippets.$B$19]&amp;[Translations.C44]&amp;[Snippets.$C$19]&amp;[Translations.C44]&amp;[Snippets.$D$19]" office:value-type="string" office:string-value="&lt;label locale=&quot;it_CH&quot; preferred=&quot;1&quot;&gt;&lt;name_singular&gt;Viaggio&lt;/name_singular&gt;&lt;name_plural&gt;Viaggio&lt;/name_plural&gt;&lt;/label&gt;" calcext:value-type="string">
            <text:p>&lt;label locale="it_CH" preferred="1"&gt;&lt;name_singular&gt;Viaggio&lt;/name_singular&gt;&lt;name_plural&gt;Viaggio&lt;/name_plural&gt;&lt;/label&gt;</text:p>
          </table:table-cell>
          <table:table-cell table:formula="of:=[Snippets.$B$20]&amp;[Translations.D44]&amp;[Snippets.$C$20]&amp;[Translations.D44]&amp;[Snippets.$D$20]" office:value-type="string" office:string-value="&lt;label locale=&quot;rm_CH&quot; preferred=&quot;1&quot;&gt;&lt;name_singular&gt;Viadi&lt;/name_singular&gt;&lt;name_plural&gt;Viadi&lt;/name_plural&gt;&lt;/label&gt;" calcext:value-type="string">
            <text:p>&lt;label locale="rm_CH" preferred="1"&gt;&lt;name_singular&gt;Viadi&lt;/name_singular&gt;&lt;name_plural&gt;Viadi&lt;/name_plural&gt;&lt;/label&gt;</text:p>
          </table:table-cell>
          <table:table-cell table:formula="of:=[Snippets.$B$21]&amp;[Translations.E44]&amp;[Snippets.$C$21]&amp;[Translations.E44]&amp;[Snippets.$D$21]" office:value-type="string" office:string-value="&lt;label locale=&quot;en_US&quot; preferred=&quot;1&quot;&gt;&lt;name_singular&gt;Travelling photography&lt;/name_singular&gt;&lt;name_plural&gt;Travelling photography&lt;/name_plural&gt;&lt;/label&gt;" calcext:value-type="string">
            <text:p>&lt;label locale="en_US" preferred="1"&gt;&lt;name_singular&gt;Travelling photography&lt;/name_singular&gt;&lt;name_plural&gt;Travelling photography&lt;/name_plural&gt;&lt;/label&gt;</text:p>
          </table:table-cell>
          <table:table-cell table:formula="of:=[Snippets.B$15]&amp;[.B44]&amp;[Snippets.C$15]" office:value-type="string" office:string-value="&lt;item idno=&quot;reise&quot; enabled=&quot;1&quot; default=&quot;0&quot; value=&quot;0&quot;&gt;" calcext:value-type="string">
            <text:p>&lt;item idno="reise" enabled="1" default="0" value="0"&gt;</text:p>
          </table:table-cell>
          <table:table-cell table:formula="of:=[.H44]&amp;[Snippets.B$16]&amp;[.C44]&amp;[.D44]&amp;[.E44]&amp;[.F44]&amp;[.G44]&amp;[Snippets.B$22]&amp;[Snippets.B$23]" office:value-type="string" office:string-value="&lt;item idno=&quot;reise&quot; enabled=&quot;1&quot; default=&quot;0&quot; value=&quot;0&quot;&gt;&lt;labels&gt;&lt;label locale=&quot;de_CH&quot; preferred=&quot;1&quot;&gt;&lt;name_singular&gt;Reise&lt;/name_singular&gt;&lt;name_plural&gt;Reise&lt;/name_plural&gt;&lt;/label&gt;&lt;label locale=&quot;fr_CH&quot; preferred=&quot;1&quot;&gt;&lt;name_singular&gt;Voyage&lt;/name_singular&gt;&lt;name_plural&gt;Voyage&lt;/name_plural&gt;&lt;/label&gt;&lt;label locale=&quot;it_CH&quot; preferred=&quot;1&quot;&gt;&lt;name_singular&gt;Viaggio&lt;/name_singular&gt;&lt;name_plural&gt;Viaggio&lt;/name_plural&gt;&lt;/label&gt;&lt;label locale=&quot;rm_CH&quot; preferred=&quot;1&quot;&gt;&lt;name_singular&gt;Viadi&lt;/name_singular&gt;&lt;name_plural&gt;Viadi&lt;/name_plural&gt;&lt;/label&gt;&lt;label locale=&quot;en_US&quot; preferred=&quot;1&quot;&gt;&lt;name_singular&gt;Travelling photography&lt;/name_singular&gt;&lt;name_plural&gt;Travelling photography&lt;/name_plural&gt;&lt;/label&gt;&lt;/labels&gt;&lt;/item&gt;" calcext:value-type="string">
            <text:p>&lt;item idno="reise" enabled="1" default="0" value="0"&gt;&lt;labels&gt;&lt;label locale="de_CH" preferred="1"&gt;&lt;name_singular&gt;Reise&lt;/name_singular&gt;&lt;name_plural&gt;Reise&lt;/name_plural&gt;&lt;/label&gt;&lt;label locale="fr_CH" preferred="1"&gt;&lt;name_singular&gt;Voyage&lt;/name_singular&gt;&lt;name_plural&gt;Voyage&lt;/name_plural&gt;&lt;/label&gt;&lt;label locale="it_CH" preferred="1"&gt;&lt;name_singular&gt;Viaggio&lt;/name_singular&gt;&lt;name_plural&gt;Viaggio&lt;/name_plural&gt;&lt;/label&gt;&lt;label locale="rm_CH" preferred="1"&gt;&lt;name_singular&gt;Viadi&lt;/name_singular&gt;&lt;name_plural&gt;Viadi&lt;/name_plural&gt;&lt;/label&gt;&lt;label locale="en_US" preferred="1"&gt;&lt;name_singular&gt;Travelling photography&lt;/name_singular&gt;&lt;name_plural&gt;Travelling photography&lt;/name_plural&gt;&lt;/label&gt;&lt;/labels&gt;&lt;/item&gt;</text:p>
          </table:table-cell>
        </table:table-row>
      </table:table>
      <table:table table:name="Translations" table:style-name="ta1">
        <table:table-column table:style-name="co3" table:number-columns-repeated="5" table:default-cell-style-name="Default"/>
        <table:table-row table:style-name="ro3">
          <table:table-cell table:style-name="ce5" table:number-columns-repeated="5"/>
        </table:table-row>
        <table:table-row table:style-name="ro3"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IT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EN</text:p>
          </table:table-cell>
        </table:table-row>
        <table:table-row table:style-name="ro3">
          <table:table-cell office:value-type="string" calcext:value-type="string">
            <text:p>Personen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Persunas</text:p>
          </table:table-cell>
          <table:table-cell office:value-type="string" calcext:value-type="string">
            <text:p>People</text:p>
          </table:table-cell>
        </table:table-row>
        <table:table-row table:style-name="ro3">
          <table:table-cell table:number-columns-repeated="3" office:value-type="string" calcext:value-type="string">
            <text:p>Reportage</text:p>
          </table:table-cell>
          <table:table-cell office:value-type="string" calcext:value-type="string">
            <text:p>Reportascha</text:p>
          </table:table-cell>
          <table:table-cell office:value-type="string" calcext:value-type="string">
            <text:p>Reportage</text:p>
          </table:table-cell>
        </table:table-row>
        <table:table-row table:style-name="ro3">
          <table:table-cell office:value-type="string" calcext:value-type="string">
            <text:p>Presse</text:p>
          </table:table-cell>
          <table:table-cell office:value-type="string" calcext:value-type="string">
            <text:p>Photojournalisme</text:p>
          </table:table-cell>
          <table:table-cell office:value-type="string" calcext:value-type="string">
            <text:p>Fotogiornalismo</text:p>
          </table:table-cell>
          <table:table-cell office:value-type="string" calcext:value-type="string">
            <text:p>Pressa</text:p>
          </table:table-cell>
          <table:table-cell office:value-type="string" calcext:value-type="string">
            <text:p>Press</text:p>
          </table:table-cell>
        </table:table-row>
        <table:table-row table:style-name="ro3">
          <table:table-cell office:value-type="string" calcext:value-type="string">
            <text:p>Porträ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Ritratto</text:p>
          </table:table-cell>
          <table:table-cell office:value-type="string" calcext:value-type="string">
            <text:p>Purtret</text:p>
          </table:table-cell>
          <table:table-cell office:value-type="string" calcext:value-type="string">
            <text:p>Portrait</text:p>
          </table:table-cell>
        </table:table-row>
        <table:table-row table:style-name="ro3">
          <table:table-cell office:value-type="string" calcext:value-type="string">
            <text:p>Ortsbild</text:p>
          </table:table-cell>
          <table:table-cell office:value-type="string" calcext:value-type="string">
            <text:p>Paysage urbain</text:p>
          </table:table-cell>
          <table:table-cell office:value-type="string" calcext:value-type="string">
            <text:p>Paesaggio urbano</text:p>
          </table:table-cell>
          <table:table-cell office:value-type="string" calcext:value-type="string">
            <text:p>Maletg dal vitg</text:p>
          </table:table-cell>
          <table:table-cell office:value-type="string" calcext:value-type="string">
            <text:p>Townscape</text:p>
          </table:table-cell>
        </table:table-row>
        <table:table-row table:style-name="ro3">
          <table:table-cell office:value-type="string" calcext:value-type="string">
            <text:p>Architektu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Architettura</text:p>
          </table:table-cell>
          <table:table-cell office:value-type="string" calcext:value-type="string">
            <text:p>Architectura</text:p>
          </table:table-cell>
          <table:table-cell office:value-type="string" calcext:value-type="string">
            <text:p>Architecture</text:p>
          </table:table-cell>
        </table:table-row>
        <table:table-row table:style-name="ro3">
          <table:table-cell office:value-type="string" calcext:value-type="string">
            <text:p>Landschaft</text:p>
          </table:table-cell>
          <table:table-cell office:value-type="string" calcext:value-type="string">
            <text:p>Paysage</text:p>
          </table:table-cell>
          <table:table-cell office:value-type="string" calcext:value-type="string">
            <text:p>Paesaggio</text:p>
          </table:table-cell>
          <table:table-cell office:value-type="string" calcext:value-type="string">
            <text:p>Cuntrada</text:p>
          </table:table-cell>
          <table:table-cell office:value-type="string" calcext:value-type="string">
            <text:p>Landscape</text:p>
          </table:table-cell>
        </table:table-row>
        <table:table-row table:style-name="ro3">
          <table:table-cell office:value-type="string" calcext:value-type="string">
            <text:p>Natu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atura</text:p>
          </table:table-cell>
          <table:table-cell office:value-type="string" calcext:value-type="string">
            <text:p>Natira</text:p>
          </table:table-cell>
          <table:table-cell office:value-type="string" calcext:value-type="string">
            <text:p>Nature</text:p>
          </table:table-cell>
        </table:table-row>
        <table:table-row table:style-name="ro3">
          <table:table-cell office:value-type="string" calcext:value-type="string">
            <text:p>Bergfotografie</text:p>
          </table:table-cell>
          <table:table-cell office:value-type="string" calcext:value-type="string">
            <text:p>Photographie de montagne</text:p>
          </table:table-cell>
          <table:table-cell office:value-type="string" calcext:value-type="string">
            <text:p>Fotografia di montagna</text:p>
          </table:table-cell>
          <table:table-cell office:value-type="string" calcext:value-type="string">
            <text:p>Fotografia da muntogna</text:p>
          </table:table-cell>
          <table:table-cell office:value-type="string" calcext:value-type="string">
            <text:p>Alpine photography</text:p>
          </table:table-cell>
        </table:table-row>
        <table:table-row table:style-name="ro3">
          <table:table-cell office:value-type="string" calcext:value-type="string">
            <text:p>Flugaufnahme</text:p>
          </table:table-cell>
          <table:table-cell office:value-type="string" calcext:value-type="string">
            <text:p>Photographie aérienne</text:p>
          </table:table-cell>
          <table:table-cell office:value-type="string" calcext:value-type="string">
            <text:p>Fotografia aerea</text:p>
          </table:table-cell>
          <table:table-cell office:value-type="string" calcext:value-type="string">
            <text:p>Fotografia or da l'aria</text:p>
          </table:table-cell>
          <table:table-cell office:value-type="string" calcext:value-type="string">
            <text:p>Aerial photography</text:p>
          </table:table-cell>
        </table:table-row>
        <table:table-row table:style-name="ro3">
          <table:table-cell office:value-type="string" calcext:value-type="string">
            <text:p>Gewerbe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Arti e mestieri</text:p>
          </table:table-cell>
          <table:table-cell office:value-type="string" calcext:value-type="string">
            <text:p>Commerzi</text:p>
          </table:table-cell>
          <table:table-cell office:value-type="string" calcext:value-type="string">
            <text:p>Commercial photography</text:p>
          </table:table-cell>
        </table:table-row>
        <table:table-row table:style-name="ro3">
          <table:table-cell table:number-columns-repeated="2" office:value-type="string" calcext:value-type="string">
            <text:p>Industrie</text:p>
          </table:table-cell>
          <table:table-cell table:number-columns-repeated="2" office:value-type="string" calcext:value-type="string">
            <text:p>Industria</text:p>
          </table:table-cell>
          <table:table-cell office:value-type="string" calcext:value-type="string">
            <text:p>Industrial photography</text:p>
          </table:table-cell>
        </table:table-row>
        <table:table-row table:style-name="ro3">
          <table:table-cell office:value-type="string" calcext:value-type="string">
            <text:p>Tourismu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Turissem</text:p>
          </table:table-cell>
          <table:table-cell office:value-type="string" calcext:value-type="string">
            <text:p>Tourism</text:p>
          </table:table-cell>
        </table:table-row>
        <table:table-row table:style-name="ro3">
          <table:table-cell office:value-type="string" calcext:value-type="string">
            <text:p>Landwirtschaft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Agricoltura</text:p>
          </table:table-cell>
          <table:table-cell office:value-type="string" calcext:value-type="string">
            <text:p>Agricultura</text:p>
          </table:table-cell>
          <table:table-cell office:value-type="string" calcext:value-type="string">
            <text:p>Agriculture</text:p>
          </table:table-cell>
        </table:table-row>
        <table:table-row table:style-name="ro3">
          <table:table-cell office:value-type="string" calcext:value-type="string">
            <text:p>Tiere</text:p>
          </table:table-cell>
          <table:table-cell office:value-type="string" calcext:value-type="string">
            <text:p>Photographie animalière</text:p>
          </table:table-cell>
          <table:table-cell office:value-type="string" calcext:value-type="string">
            <text:p>Fotografia animale</text:p>
          </table:table-cell>
          <table:table-cell table:number-columns-repeated="2" office:value-type="string" calcext:value-type="string">
            <text:p>Animals</text:p>
          </table:table-cell>
        </table:table-row>
        <table:table-row table:style-name="ro3">
          <table:table-cell office:value-type="string" calcext:value-type="string">
            <text:p>Sachaufnahme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ggettistic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bject photography</text:p>
          </table:table-cell>
        </table:table-row>
        <table:table-row table:style-name="ro3">
          <table:table-cell office:value-type="string" calcext:value-type="string">
            <text:p>Reproduktion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Riproduzione</text:p>
          </table:table-cell>
          <table:table-cell office:value-type="string" calcext:value-type="string">
            <text:p>Reproducziun</text:p>
          </table:table-cell>
          <table:table-cell office:value-type="string" calcext:value-type="string">
            <text:p>Reproduction</text:p>
          </table:table-cell>
        </table:table-row>
        <table:table-row table:style-name="ro3">
          <table:table-cell office:value-type="string" calcext:value-type="string">
            <text:p>Werbung</text:p>
          </table:table-cell>
          <table:table-cell office:value-type="string" calcext:value-type="string">
            <text:p>Publicité</text:p>
          </table:table-cell>
          <table:table-cell office:value-type="string" calcext:value-type="string">
            <text:p>Pubblicità</text:p>
          </table:table-cell>
          <table:table-cell office:value-type="string" calcext:value-type="string">
            <text:p>Reclama</text:p>
          </table:table-cell>
          <table:table-cell office:value-type="string" calcext:value-type="string">
            <text:p>Publicity</text:p>
          </table:table-cell>
        </table:table-row>
        <table:table-row table:style-name="ro3">
          <table:table-cell table:number-columns-repeated="2" office:value-type="string" calcext:value-type="string">
            <text:p>Mode</text:p>
          </table:table-cell>
          <table:table-cell table:number-columns-repeated="2" office:value-type="string" calcext:value-type="string">
            <text:p>Moda</text:p>
          </table:table-cell>
          <table:table-cell office:value-type="string" calcext:value-type="string">
            <text:p>Fashion</text:p>
          </table:table-cell>
        </table:table-row>
        <table:table-row table:style-name="ro3">
          <table:table-cell office:value-type="string" calcext:value-type="string">
            <text:p>Firmenporträt</text:p>
          </table:table-cell>
          <table:table-cell office:value-type="string" calcext:value-type="string">
            <text:p>Portrait d'entreprise</text:p>
          </table:table-cell>
          <table:table-cell office:value-type="string" calcext:value-type="string">
            <text:p>Ritratto d’impresa</text:p>
          </table:table-cell>
          <table:table-cell office:value-type="string" calcext:value-type="string">
            <text:p>Purtret da firma</text:p>
          </table:table-cell>
          <table:table-cell office:value-type="string" calcext:value-type="string">
            <text:p>Enterprise representation</text:p>
          </table:table-cell>
        </table:table-row>
        <table:table-row table:style-name="ro3">
          <table:table-cell table:number-columns-repeated="4" office:value-type="string" calcext:value-type="string">
            <text:p>Sport</text:p>
          </table:table-cell>
          <table:table-cell office:value-type="string" calcext:value-type="string">
            <text:p>Sports</text:p>
          </table:table-cell>
        </table:table-row>
        <table:table-row table:style-name="ro3">
          <table:table-cell office:value-type="string" calcext:value-type="string">
            <text:p>Unfall/Katastrophe</text:p>
          </table:table-cell>
          <table:table-cell office:value-type="string" calcext:value-type="string">
            <text:p>Accident/catastrophe</text:p>
          </table:table-cell>
          <table:table-cell office:value-type="string" calcext:value-type="string">
            <text:p>Incidente/catastrofe</text:p>
          </table:table-cell>
          <table:table-cell office:value-type="string" calcext:value-type="string">
            <text:p>Accident/catastrofa</text:p>
          </table:table-cell>
          <table:table-cell office:value-type="string" calcext:value-type="string">
            <text:p>Accident/catastrophy</text:p>
          </table:table-cell>
        </table:table-row>
        <table:table-row table:style-name="ro3">
          <table:table-cell office:value-type="string" calcext:value-type="string">
            <text:p>Verkeh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rasporti</text:p>
          </table:table-cell>
          <table:table-cell table:number-columns-repeated="2" office:value-type="string" calcext:value-type="string">
            <text:p>Traffic</text:p>
          </table:table-cell>
        </table:table-row>
        <table:table-row table:style-name="ro3">
          <table:table-cell office:value-type="string" calcext:value-type="string">
            <text:p>Militär</text:p>
          </table:table-cell>
          <table:table-cell office:value-type="string" calcext:value-type="string">
            <text:p>Militaire</text:p>
          </table:table-cell>
          <table:table-cell office:value-type="string" calcext:value-type="string">
            <text:p>Militare</text:p>
          </table:table-cell>
          <table:table-cell office:value-type="string" calcext:value-type="string">
            <text:p>Militar</text:p>
          </table:table-cell>
          <table:table-cell office:value-type="string" calcext:value-type="string">
            <text:p>Military</text:p>
          </table:table-cell>
        </table:table-row>
        <table:table-row table:style-name="ro3">
          <table:table-cell table:number-columns-repeated="2" office:value-type="string" calcext:value-type="string">
            <text:p>Ethnologie</text:p>
          </table:table-cell>
          <table:table-cell table:number-columns-repeated="2" office:value-type="string" calcext:value-type="string">
            <text:p>Etnologia</text:p>
          </table:table-cell>
          <table:table-cell office:value-type="string" calcext:value-type="string">
            <text:p>Anthropology</text:p>
          </table:table-cell>
        </table:table-row>
        <table:table-row table:style-name="ro3">
          <table:table-cell office:value-type="string" calcext:value-type="string">
            <text:p>Archäologie</text:p>
          </table:table-cell>
          <table:table-cell office:value-type="string" calcext:value-type="string">
            <text:p>Archéologie</text:p>
          </table:table-cell>
          <table:table-cell table:number-columns-repeated="2" office:value-type="string" calcext:value-type="string">
            <text:p>Archeologia</text:p>
          </table:table-cell>
          <table:table-cell office:value-type="string" calcext:value-type="string">
            <text:p>Archaeology</text:p>
          </table:table-cell>
        </table:table-row>
        <table:table-row table:style-name="ro3">
          <table:table-cell office:value-type="string" calcext:value-type="string">
            <text:p>Medizin</text:p>
          </table:table-cell>
          <table:table-cell office:value-type="string" calcext:value-type="string">
            <text:p>Médecine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Medischina</text:p>
          </table:table-cell>
          <table:table-cell office:value-type="string" calcext:value-type="string">
            <text:p>Medicine</text:p>
          </table:table-cell>
        </table:table-row>
        <table:table-row table:style-name="ro3">
          <table:table-cell office:value-type="string" calcext:value-type="string">
            <text:p>Kriminologie</text:p>
          </table:table-cell>
          <table:table-cell office:value-type="string" calcext:value-type="string">
            <text:p>Criminologie</text:p>
          </table:table-cell>
          <table:table-cell table:number-columns-repeated="2" office:value-type="string" calcext:value-type="string">
            <text:p>Criminologia</text:p>
          </table:table-cell>
          <table:table-cell office:value-type="string" calcext:value-type="string">
            <text:p>Criminology</text:p>
          </table:table-cell>
        </table:table-row>
        <table:table-row table:style-name="ro3">
          <table:table-cell office:value-type="string" calcext:value-type="string">
            <text:p>Musik</text:p>
          </table:table-cell>
          <table:table-cell office:value-type="string" calcext:value-type="string">
            <text:p>Musique</text:p>
          </table:table-cell>
          <table:table-cell table:number-columns-repeated="2" office:value-type="string" calcext:value-type="string">
            <text:p>Musica</text:p>
          </table:table-cell>
          <table:table-cell office:value-type="string" calcext:value-type="string">
            <text:p>Music</text:p>
          </table:table-cell>
        </table:table-row>
        <table:table-row table:style-name="ro3">
          <table:table-cell office:value-type="string" calcext:value-type="string">
            <text:p>Theater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Teater</text:p>
          </table:table-cell>
          <table:table-cell office:value-type="string" calcext:value-type="string">
            <text:p>Theatre</text:p>
          </table:table-cell>
        </table:table-row>
        <table:table-row table:style-name="ro3">
          <table:table-cell office:value-type="string" calcext:value-type="string">
            <text:p>Kuns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e</text:p>
          </table:table-cell>
          <table:table-cell table:number-columns-repeated="2" office:value-type="string" calcext:value-type="string">
            <text:p>Art</text:p>
          </table:table-cell>
        </table:table-row>
        <table:table-row table:style-name="ro3">
          <table:table-cell office:value-type="string" calcext:value-type="string">
            <text:p>Literatur</text:p>
          </table:table-cell>
          <table:table-cell office:value-type="string" calcext:value-type="string">
            <text:p>Littérature</text:p>
          </table:table-cell>
          <table:table-cell office:value-type="string" calcext:value-type="string">
            <text:p>Letteratura</text:p>
          </table:table-cell>
          <table:table-cell office:value-type="string" calcext:value-type="string">
            <text:p>Litteratura</text:p>
          </table:table-cell>
          <table:table-cell office:value-type="string" calcext:value-type="string">
            <text:p>Literature</text:p>
          </table:table-cell>
        </table:table-row>
        <table:table-row table:style-name="ro3">
          <table:table-cell office:value-type="string" calcext:value-type="string">
            <text:p>Piktorialismus</text:p>
          </table:table-cell>
          <table:table-cell office:value-type="string" calcext:value-type="string">
            <text:p>Pictorialisme</text:p>
          </table:table-cell>
          <table:table-cell office:value-type="string" calcext:value-type="string">
            <text:p>Pittorialismo</text:p>
          </table:table-cell>
          <table:table-cell office:value-type="string" calcext:value-type="string">
            <text:p>Picturialissem</text:p>
          </table:table-cell>
          <table:table-cell office:value-type="string" calcext:value-type="string">
            <text:p>Pictorialism</text:p>
          </table:table-cell>
        </table:table-row>
        <table:table-row table:style-name="ro3">
          <table:table-cell office:value-type="string" calcext:value-type="string">
            <text:p>Kunst mit Fotografie</text:p>
          </table:table-cell>
          <table:table-cell office:value-type="string" calcext:value-type="string">
            <text:p>Art photographique</text:p>
          </table:table-cell>
          <table:table-cell office:value-type="string" calcext:value-type="string">
            <text:p>Arte fotografica</text:p>
          </table:table-cell>
          <table:table-cell office:value-type="string" calcext:value-type="string">
            <text:p>Art fotografic</text:p>
          </table:table-cell>
          <table:table-cell office:value-type="string" calcext:value-type="string">
            <text:p>Photographic art</text:p>
          </table:table-cell>
        </table:table-row>
        <table:table-row table:style-name="ro3">
          <table:table-cell office:value-type="string" calcext:value-type="string">
            <text:p>Alltag</text:p>
          </table:table-cell>
          <table:table-cell office:value-type="string" calcext:value-type="string">
            <text:p>Vie quotidienne</text:p>
          </table:table-cell>
          <table:table-cell office:value-type="string" calcext:value-type="string">
            <text:p>Vita quotidiana</text:p>
          </table:table-cell>
          <table:table-cell office:value-type="string" calcext:value-type="string">
            <text:p>Mintgadi</text:p>
          </table:table-cell>
          <table:table-cell office:value-type="string" calcext:value-type="string">
            <text:p>Everyday life</text:p>
          </table:table-cell>
        </table:table-row>
        <table:table-row table:style-name="ro3">
          <table:table-cell office:value-type="string" calcext:value-type="string">
            <text:p>Akt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do</text:p>
          </table:table-cell>
          <table:table-cell office:value-type="string" calcext:value-type="string">
            <text:p>Niv</text:p>
          </table:table-cell>
          <table:table-cell office:value-type="string" calcext:value-type="string">
            <text:p>Act</text:p>
          </table:table-cell>
        </table:table-row>
        <table:table-row table:style-name="ro3">
          <table:table-cell table:number-columns-repeated="4" office:value-type="string" calcext:value-type="string">
            <text:p>Film</text:p>
          </table:table-cell>
          <table:table-cell office:value-type="string" calcext:value-type="string">
            <text:p>Movie</text:p>
          </table:table-cell>
        </table:table-row>
        <table:table-row table:style-name="ro3">
          <table:table-cell office:value-type="string" calcext:value-type="string">
            <text:p>Dokumentation</text:p>
          </table:table-cell>
          <table:table-cell office:value-type="string" calcext:value-type="string">
            <text:p>Photographie documentaire</text:p>
          </table:table-cell>
          <table:table-cell office:value-type="string" calcext:value-type="string">
            <text:p>Fotografia documentaria</text:p>
          </table:table-cell>
          <table:table-cell office:value-type="string" calcext:value-type="string">
            <text:p>Documentaziun</text:p>
          </table:table-cell>
          <table:table-cell office:value-type="string" calcext:value-type="string">
            <text:p>Documentation</text:p>
          </table:table-cell>
        </table:table-row>
        <table:table-row table:style-name="ro3">
          <table:table-cell office:value-type="string" calcext:value-type="string">
            <text:p>Multivision</text:p>
          </table:table-cell>
          <table:table-cell office:value-type="string" calcext:value-type="string">
            <text:p>Diaporama</text:p>
          </table:table-cell>
          <table:table-cell office:value-type="string" calcext:value-type="string">
            <text:p>Multivisione</text:p>
          </table:table-cell>
          <table:table-cell office:value-type="string" calcext:value-type="string">
            <text:p>Multivisiun</text:p>
          </table:table-cell>
          <table:table-cell office:value-type="string" calcext:value-type="string">
            <text:p>Multivision</text:p>
          </table:table-cell>
        </table:table-row>
        <table:table-row table:style-name="ro3">
          <table:table-cell office:value-type="string" calcext:value-type="string">
            <text:p>private Fotografie</text:p>
          </table:table-cell>
          <table:table-cell office:value-type="string" calcext:value-type="string">
            <text:p>Photographie privée</text:p>
          </table:table-cell>
          <table:table-cell table:number-columns-repeated="2" office:value-type="string" calcext:value-type="string">
            <text:p>Fotografia privata</text:p>
          </table:table-cell>
          <table:table-cell office:value-type="string" calcext:value-type="string">
            <text:p>Private photography</text:p>
          </table:table-cell>
        </table:table-row>
        <table:table-row table:style-name="ro3">
          <table:table-cell office:value-type="string" calcext:value-type="string">
            <text:p>wissenschaftliche Fotografie</text:p>
          </table:table-cell>
          <table:table-cell office:value-type="string" calcext:value-type="string">
            <text:p>Photographie scientifique</text:p>
          </table:table-cell>
          <table:table-cell table:number-columns-repeated="2" office:value-type="string" calcext:value-type="string">
            <text:p>Fotografia scientifica</text:p>
          </table:table-cell>
          <table:table-cell office:value-type="string" calcext:value-type="string">
            <text:p>Scientific photography</text:p>
          </table:table-cell>
        </table:table-row>
        <table:table-row table:style-name="ro3">
          <table:table-cell office:value-type="string" calcext:value-type="string">
            <text:p>Reise</text:p>
          </table:table-cell>
          <table:table-cell office:value-type="string" calcext:value-type="string">
            <text:p>Voyage</text:p>
          </table:table-cell>
          <table:table-cell office:value-type="string" calcext:value-type="string">
            <text:p>Viaggio</text:p>
          </table:table-cell>
          <table:table-cell office:value-type="string" calcext:value-type="string">
            <text:p>Viadi</text:p>
          </table:table-cell>
          <table:table-cell office:value-type="string" calcext:value-type="string">
            <text:p>Travelling photography</text:p>
          </table:table-cell>
        </table:table-row>
      </table:table>
      <table:table table:name="Snippets" table:style-name="ta1">
        <table:table-column table:style-name="co3" table:number-columns-repeated="5" table:default-cell-style-name="Default"/>
        <table:table-row table:style-name="ro3">
          <table:table-cell table:style-name="ce5" office:value-type="string" calcext:value-type="string">
            <text:p>Exampl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item idno="personen" enabled="1" default="0" value="0"&gt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labels&gt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label locale="de_CH" preferred="1"&gt;&lt;name_singular&gt;Personen&lt;/name_singular&gt;&lt;name_plural&gt;Personen&lt;/name_plural&gt;&lt;/label&gt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label locale="fr_CH" preferred="0"&gt;&lt;name_singular&gt;Personen&lt;/name_singular&gt;&lt;name_plural&gt;Personen&lt;/name_plural&gt;&lt;/label&gt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label locale="it_CH" preferred="0"&gt;&lt;name_singular&gt;Personen&lt;/name_singular&gt;&lt;name_plural&gt;Personen&lt;/name_plural&gt;&lt;/label&gt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label locale="rm_CH" preferred="0"&gt;&lt;name_singular&gt;Personen&lt;/name_singular&gt;&lt;name_plural&gt;Personen&lt;/name_plural&gt;&lt;/label&gt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label locale="en_US" preferred="0"&gt;&lt;name_singular&gt;Personen&lt;/name_singular&gt;&lt;name_plural&gt;Personen&lt;/name_plural&gt;&lt;/label&gt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/labels&gt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/item&gt;</text:p>
          </table:table-cell>
          <table:table-cell table:number-columns-repeated="4"/>
        </table:table-row>
        <table:table-row table:style-name="ro3" table:number-rows-repeated="3">
          <table:table-cell table:number-columns-repeated="5"/>
        </table:table-row>
        <table:table-row table:style-name="ro3">
          <table:table-cell table:style-name="ce7" office:value-type="string" calcext:value-type="string">
            <text:p>Snippets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8"/>
        </table:table-row>
        <table:table-row table:style-name="ro3">
          <table:table-cell table:style-name="ce8"/>
          <table:table-cell table:style-name="ce8" office:value-type="string" calcext:value-type="string">
            <text:p>&lt;item idno="</text:p>
          </table:table-cell>
          <table:table-cell table:style-name="ce8" office:value-type="string" calcext:value-type="string">
            <text:p>" enabled="1" default="0" value="0"&gt;</text:p>
          </table:table-cell>
          <table:table-cell table:style-name="ce8" table:number-columns-repeated="2"/>
        </table:table-row>
        <table:table-row table:style-name="ro3">
          <table:table-cell table:style-name="ce8"/>
          <table:table-cell table:style-name="ce8" office:value-type="string" calcext:value-type="string">
            <text:p>&lt;labels&gt;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&lt;label locale="de_CH" preferred="1"&gt;&lt;name_singular&gt;</text:p>
          </table:table-cell>
          <table:table-cell table:style-name="ce8" office:value-type="string" calcext:value-type="string">
            <text:p>&lt;/name_singular&gt;&lt;name_plural&gt;</text:p>
          </table:table-cell>
          <table:table-cell table:style-name="ce8" office:value-type="string" calcext:value-type="string">
            <text:p>&lt;/name_plural&gt;&lt;/label&gt;</text:p>
          </table:table-cell>
          <table:table-cell table:style-name="ce8"/>
        </table:table-row>
        <table:table-row table:style-name="ro3">
          <table:table-cell table:style-name="ce8"/>
          <table:table-cell table:style-name="ce8" office:value-type="string" calcext:value-type="string">
            <text:p>&lt;label locale="fr_CH" preferred="1"&gt;&lt;name_singular&gt;</text:p>
          </table:table-cell>
          <table:table-cell table:style-name="ce8" office:value-type="string" calcext:value-type="string">
            <text:p>&lt;/name_singular&gt;&lt;name_plural&gt;</text:p>
          </table:table-cell>
          <table:table-cell table:style-name="ce8" office:value-type="string" calcext:value-type="string">
            <text:p>&lt;/name_plural&gt;&lt;/label&gt;</text:p>
          </table:table-cell>
          <table:table-cell table:style-name="ce8"/>
        </table:table-row>
        <table:table-row table:style-name="ro3">
          <table:table-cell table:style-name="ce8"/>
          <table:table-cell table:style-name="ce8" office:value-type="string" calcext:value-type="string">
            <text:p>&lt;label locale="it_CH" preferred="1"&gt;&lt;name_singular&gt;</text:p>
          </table:table-cell>
          <table:table-cell table:style-name="ce8" office:value-type="string" calcext:value-type="string">
            <text:p>&lt;/name_singular&gt;&lt;name_plural&gt;</text:p>
          </table:table-cell>
          <table:table-cell table:style-name="ce8" office:value-type="string" calcext:value-type="string">
            <text:p>&lt;/name_plural&gt;&lt;/label&gt;</text:p>
          </table:table-cell>
          <table:table-cell table:style-name="ce8"/>
        </table:table-row>
        <table:table-row table:style-name="ro3">
          <table:table-cell table:style-name="ce8"/>
          <table:table-cell table:style-name="ce8" office:value-type="string" calcext:value-type="string">
            <text:p>&lt;label locale="rm_CH" preferred="1"&gt;&lt;name_singular&gt;</text:p>
          </table:table-cell>
          <table:table-cell table:style-name="ce8" office:value-type="string" calcext:value-type="string">
            <text:p>&lt;/name_singular&gt;&lt;name_plural&gt;</text:p>
          </table:table-cell>
          <table:table-cell table:style-name="ce8" office:value-type="string" calcext:value-type="string">
            <text:p>&lt;/name_plural&gt;&lt;/label&gt;</text:p>
          </table:table-cell>
          <table:table-cell table:style-name="ce8"/>
        </table:table-row>
        <table:table-row table:style-name="ro3">
          <table:table-cell table:style-name="ce8"/>
          <table:table-cell table:style-name="ce8" office:value-type="string" calcext:value-type="string">
            <text:p>&lt;label locale="en_US" preferred="1"&gt;&lt;name_singular&gt;</text:p>
          </table:table-cell>
          <table:table-cell table:style-name="ce8" office:value-type="string" calcext:value-type="string">
            <text:p>&lt;/name_singular&gt;&lt;name_plural&gt;</text:p>
          </table:table-cell>
          <table:table-cell table:style-name="ce8" office:value-type="string" calcext:value-type="string">
            <text:p>&lt;/name_plural&gt;&lt;/label&gt;</text:p>
          </table:table-cell>
          <table:table-cell table:style-name="ce8"/>
        </table:table-row>
        <table:table-row table:style-name="ro3">
          <table:table-cell table:style-name="ce8"/>
          <table:table-cell table:style-name="ce8" office:value-type="string" calcext:value-type="string">
            <text:p>&lt;/labels&gt;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&lt;/item&gt;</text:p>
          </table:table-cell>
          <table:table-cell table:style-name="ce8" table:number-columns-repeated="3"/>
        </table:table-row>
        <table:table-row table:style-name="ro3"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9:42:37.3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3:59:53.251000000</meta:creation-date>
    <dc:date>2018-10-02T09:51:34.190000000</dc:date>
    <meta:editing-duration>PT1H1M3S</meta:editing-duration>
    <meta:editing-cycles>21</meta:editing-cycles>
    <meta:generator>LibreOffice/5.3.3.2$Windows_X86_64 LibreOffice_project/3d9a8b4b4e538a85e0782bd6c2d430bafe583448</meta:generator>
    <meta:document-statistic meta:table-count="3" meta:cell-count="636" meta:object-count="0"/>
  </office:meta>
</office:document-meta>
</file>